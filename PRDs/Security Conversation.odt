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4174in"/>
    </style:style>
    <style:style style:name="Table1.B" style:family="table-column">
      <style:table-column-properties style:column-width="0.8896in"/>
    </style:style>
    <style:style style:name="Table1.C" style:family="table-column">
      <style:table-column-properties style:column-width="3.5097in"/>
    </style:style>
    <style:style style:name="Table1.D" style:family="table-column">
      <style:table-column-properties style:column-width="2.1083in"/>
    </style:style>
    <style:style style:name="Table1.A1" style:family="table-cell">
      <style:table-cell-properties style:vertical-align="middle" fo:padding="0.0194in" fo:border="none"/>
    </style:style>
    <style:style style:name="Table2" style:family="table">
      <style:table-properties style:width="6.85in" table:align="left"/>
    </style:style>
    <style:style style:name="Table2.A" style:family="table-column">
      <style:table-column-properties style:column-width="3.6382in"/>
    </style:style>
    <style:style style:name="Table2.B" style:family="table-column">
      <style:table-column-properties style:column-width="3.2118in"/>
    </style:style>
    <style:style style:name="Table2.A1" style:family="table-cell">
      <style:table-cell-properties style:vertical-align="middle" fo:padding="0.0194in" fo:border="none"/>
    </style:style>
    <style:style style:name="Table3" style:family="table">
      <style:table-properties style:width="6.9132in" table:align="left"/>
    </style:style>
    <style:style style:name="Table3.A" style:family="table-column">
      <style:table-column-properties style:column-width="3.6382in"/>
    </style:style>
    <style:style style:name="Table3.B" style:family="table-column">
      <style:table-column-properties style:column-width="3.275in"/>
    </style:style>
    <style:style style:name="Table3.A1" style:family="table-cell">
      <style:table-cell-properties style:vertical-align="middle" fo:padding="0.0194in" fo:border="none"/>
    </style:style>
    <style:style style:name="Table4" style:family="table">
      <style:table-properties style:width="6.7535in" table:align="left"/>
    </style:style>
    <style:style style:name="Table4.A" style:family="table-column">
      <style:table-column-properties style:column-width="2.9813in"/>
    </style:style>
    <style:style style:name="Table4.B" style:family="table-column">
      <style:table-column-properties style:column-width="3.7722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2264in"/>
    </style:style>
    <style:style style:name="Table5.B" style:family="table-column">
      <style:table-column-properties style:column-width="2.2646in"/>
    </style:style>
    <style:style style:name="Table5.C" style:family="table-column">
      <style:table-column-properties style:column-width="3.434in"/>
    </style:style>
    <style:style style:name="Table5.A1" style:family="table-cell">
      <style:table-cell-properties style:vertical-align="middle" fo:padding="0.0194in" fo:border="none"/>
    </style:style>
    <style:style style:name="Table6" style:family="table">
      <style:table-properties style:width="5.8889in" table:align="left"/>
    </style:style>
    <style:style style:name="Table6.A" style:family="table-column">
      <style:table-column-properties style:column-width="0.9972in"/>
    </style:style>
    <style:style style:name="Table6.B" style:family="table-column">
      <style:table-column-properties style:column-width="0.6667in"/>
    </style:style>
    <style:style style:name="Table6.C" style:family="table-column">
      <style:table-column-properties style:column-width="0.5514in"/>
    </style:style>
    <style:style style:name="Table6.D" style:family="table-column">
      <style:table-column-properties style:column-width="0.4438in"/>
    </style:style>
    <style:style style:name="Table6.E" style:family="table-column">
      <style:table-column-properties style:column-width="1.3049in"/>
    </style:style>
    <style:style style:name="Table6.G" style:family="table-column">
      <style:table-column-properties style:column-width="0.6201in"/>
    </style:style>
    <style:style style:name="Table6.A1" style:family="table-cell">
      <style:table-cell-properties style:vertical-align="middle" fo:padding="0.0194in" fo:border="none"/>
    </style:style>
    <style:style style:name="Table7" style:family="table">
      <style:table-properties style:width="2.6597in" table:align="left"/>
    </style:style>
    <style:style style:name="Table7.A" style:family="table-column">
      <style:table-column-properties style:column-width="1.8056in"/>
    </style:style>
    <style:style style:name="Table7.B" style:family="table-column">
      <style:table-column-properties style:column-width="0.4438in"/>
    </style:style>
    <style:style style:name="Table7.C" style:family="table-column">
      <style:table-column-properties style:column-width="0.4104in"/>
    </style:style>
    <style:style style:name="Table7.A1" style:family="table-cell">
      <style:table-cell-properties style:vertical-align="middle" fo:padding="0.0194in" fo:border="none"/>
    </style:style>
    <style:style style:name="Table8" style:family="table">
      <style:table-properties style:width="4.0854in" table:align="left"/>
    </style:style>
    <style:style style:name="Table8.A" style:family="table-column">
      <style:table-column-properties style:column-width="0.9451in"/>
    </style:style>
    <style:style style:name="Table8.B" style:family="table-column">
      <style:table-column-properties style:column-width="0.5917in"/>
    </style:style>
    <style:style style:name="Table8.C" style:family="table-column">
      <style:table-column-properties style:column-width="0.5514in"/>
    </style:style>
    <style:style style:name="Table8.D" style:family="table-column">
      <style:table-column-properties style:column-width="0.4438in"/>
    </style:style>
    <style:style style:name="Table8.E" style:family="table-column">
      <style:table-column-properties style:column-width="0.416in"/>
    </style:style>
    <style:style style:name="Table8.F" style:family="table-column">
      <style:table-column-properties style:column-width="0.5174in"/>
    </style:style>
    <style:style style:name="Table8.G" style:family="table-column">
      <style:table-column-properties style:column-width="0.6201in"/>
    </style:style>
    <style:style style:name="Table8.A1" style:family="table-cell">
      <style:table-cell-properties style:vertical-align="middle" fo:padding="0.0194in" fo:border="none"/>
    </style:style>
    <style:style style:name="Table9" style:family="table">
      <style:table-properties style:width="2.6597in" table:align="left"/>
    </style:style>
    <style:style style:name="Table9.A" style:family="table-column">
      <style:table-column-properties style:column-width="1.8056in"/>
    </style:style>
    <style:style style:name="Table9.B" style:family="table-column">
      <style:table-column-properties style:column-width="0.4438in"/>
    </style:style>
    <style:style style:name="Table9.C" style:family="table-column">
      <style:table-column-properties style:column-width="0.4104in"/>
    </style:style>
    <style:style style:name="Table9.A1" style:family="table-cell">
      <style:table-cell-properties style:vertical-align="middle" fo:padding="0.0194in" fo:border="none"/>
    </style:style>
    <style:style style:name="Table10" style:family="table">
      <style:table-properties style:width="4.0486in" table:align="left"/>
    </style:style>
    <style:style style:name="Table10.A" style:family="table-column">
      <style:table-column-properties style:column-width="0.9451in"/>
    </style:style>
    <style:style style:name="Table10.B" style:family="table-column">
      <style:table-column-properties style:column-width="0.5917in"/>
    </style:style>
    <style:style style:name="Table10.C" style:family="table-column">
      <style:table-column-properties style:column-width="0.5514in"/>
    </style:style>
    <style:style style:name="Table10.D" style:family="table-column">
      <style:table-column-properties style:column-width="0.4438in"/>
    </style:style>
    <style:style style:name="Table10.E" style:family="table-column">
      <style:table-column-properties style:column-width="0.3792in"/>
    </style:style>
    <style:style style:name="Table10.F" style:family="table-column">
      <style:table-column-properties style:column-width="0.5174in"/>
    </style:style>
    <style:style style:name="Table10.G" style:family="table-column">
      <style:table-column-properties style:column-width="0.6201in"/>
    </style:style>
    <style:style style:name="Table10.A1" style:family="table-cell">
      <style:table-cell-properties style:vertical-align="middle" fo:padding="0.0194in" fo:border="none"/>
    </style:style>
    <style:style style:name="Table11" style:family="table">
      <style:table-properties style:width="2.6597in" table:align="left"/>
    </style:style>
    <style:style style:name="Table11.A" style:family="table-column">
      <style:table-column-properties style:column-width="1.8056in"/>
    </style:style>
    <style:style style:name="Table11.B" style:family="table-column">
      <style:table-column-properties style:column-width="0.4438in"/>
    </style:style>
    <style:style style:name="Table11.C" style:family="table-column">
      <style:table-column-properties style:column-width="0.4104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9396in"/>
    </style:style>
    <style:style style:name="Table12.B" style:family="table-column">
      <style:table-column-properties style:column-width="1.7035in"/>
    </style:style>
    <style:style style:name="Table12.C" style:family="table-column">
      <style:table-column-properties style:column-width="2.2917in"/>
    </style:style>
    <style:style style:name="Table12.D" style:family="table-column">
      <style:table-column-properties style:column-width="1.9903in"/>
    </style:style>
    <style:style style:name="Table12.A1" style:family="table-cell">
      <style:table-cell-properties style:vertical-align="middle" fo:padding="0.0194in" fo:border="none"/>
    </style:style>
    <style:style style:name="Table13" style:family="table">
      <style:table-properties style:width="4.1722in" table:align="left"/>
    </style:style>
    <style:style style:name="Table13.A" style:family="table-column">
      <style:table-column-properties style:column-width="0.9451in"/>
    </style:style>
    <style:style style:name="Table13.B" style:family="table-column">
      <style:table-column-properties style:column-width="0.6292in"/>
    </style:style>
    <style:style style:name="Table13.C" style:family="table-column">
      <style:table-column-properties style:column-width="0.5514in"/>
    </style:style>
    <style:style style:name="Table13.D" style:family="table-column">
      <style:table-column-properties style:column-width="0.4438in"/>
    </style:style>
    <style:style style:name="Table13.E" style:family="table-column">
      <style:table-column-properties style:column-width="0.4653in"/>
    </style:style>
    <style:style style:name="Table13.F" style:family="table-column">
      <style:table-column-properties style:column-width="0.5174in"/>
    </style:style>
    <style:style style:name="Table13.G" style:family="table-column">
      <style:table-column-properties style:column-width="0.6201in"/>
    </style:style>
    <style:style style:name="Table13.A1" style:family="table-cell">
      <style:table-cell-properties style:vertical-align="middle" fo:padding="0.0194in" fo:border="none"/>
    </style:style>
    <style:style style:name="Table14" style:family="table">
      <style:table-properties style:width="4.1229in" table:align="left"/>
    </style:style>
    <style:style style:name="Table14.A" style:family="table-column">
      <style:table-column-properties style:column-width="0.9451in"/>
    </style:style>
    <style:style style:name="Table14.B" style:family="table-column">
      <style:table-column-properties style:column-width="0.6292in"/>
    </style:style>
    <style:style style:name="Table14.C" style:family="table-column">
      <style:table-column-properties style:column-width="0.5514in"/>
    </style:style>
    <style:style style:name="Table14.D" style:family="table-column">
      <style:table-column-properties style:column-width="0.4438in"/>
    </style:style>
    <style:style style:name="Table14.E" style:family="table-column">
      <style:table-column-properties style:column-width="0.416in"/>
    </style:style>
    <style:style style:name="Table14.F" style:family="table-column">
      <style:table-column-properties style:column-width="0.5174in"/>
    </style:style>
    <style:style style:name="Table14.G" style:family="table-column">
      <style:table-column-properties style:column-width="0.6201in"/>
    </style:style>
    <style:style style:name="Table14.A1" style:family="table-cell">
      <style:table-cell-properties style:vertical-align="middle" fo:padding="0.0194in" fo:border="none"/>
    </style:style>
    <style:style style:name="Table15" style:family="table">
      <style:table-properties style:width="4.1229in" table:align="left"/>
    </style:style>
    <style:style style:name="Table15.A" style:family="table-column">
      <style:table-column-properties style:column-width="0.9451in"/>
    </style:style>
    <style:style style:name="Table15.B" style:family="table-column">
      <style:table-column-properties style:column-width="0.6292in"/>
    </style:style>
    <style:style style:name="Table15.C" style:family="table-column">
      <style:table-column-properties style:column-width="0.5514in"/>
    </style:style>
    <style:style style:name="Table15.D" style:family="table-column">
      <style:table-column-properties style:column-width="0.4438in"/>
    </style:style>
    <style:style style:name="Table15.E" style:family="table-column">
      <style:table-column-properties style:column-width="0.416in"/>
    </style:style>
    <style:style style:name="Table15.F" style:family="table-column">
      <style:table-column-properties style:column-width="0.5174in"/>
    </style:style>
    <style:style style:name="Table15.G" style:family="table-column">
      <style:table-column-properties style:column-width="0.6201in"/>
    </style:style>
    <style:style style:name="Table15.A1" style:family="table-cell">
      <style:table-cell-properties style:vertical-align="middle" fo:padding="0.0194in" fo:border="none"/>
    </style:style>
    <style:style style:name="Table16" style:family="table">
      <style:table-properties style:width="3.9285in" table:align="left"/>
    </style:style>
    <style:style style:name="Table16.A" style:family="table-column">
      <style:table-column-properties style:column-width="0.7319in"/>
    </style:style>
    <style:style style:name="Table16.B" style:family="table-column">
      <style:table-column-properties style:column-width="0.5917in"/>
    </style:style>
    <style:style style:name="Table16.C" style:family="table-column">
      <style:table-column-properties style:column-width="0.5514in"/>
    </style:style>
    <style:style style:name="Table16.D" style:family="table-column">
      <style:table-column-properties style:column-width="0.5271in"/>
    </style:style>
    <style:style style:name="Table16.E" style:family="table-column">
      <style:table-column-properties style:column-width="0.3792in"/>
    </style:style>
    <style:style style:name="Table16.G" style:family="table-column">
      <style:table-column-properties style:column-width="0.6201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3729in"/>
    </style:style>
    <style:style style:name="Table17.B" style:family="table-column">
      <style:table-column-properties style:column-width="1.7in"/>
    </style:style>
    <style:style style:name="Table17.C" style:family="table-column">
      <style:table-column-properties style:column-width="2.8521in"/>
    </style:style>
    <style:style style:name="Table17.A1" style:family="table-cell">
      <style:table-cell-properties style:vertical-align="middle" fo:padding="0.0194in" fo:border="none"/>
    </style:style>
    <style:style style:name="Table18" style:family="table">
      <style:table-properties style:width="6.7514in" table:align="left"/>
    </style:style>
    <style:style style:name="Table18.A" style:family="table-column">
      <style:table-column-properties style:column-width="1.5424in"/>
    </style:style>
    <style:style style:name="Table18.B" style:family="table-column">
      <style:table-column-properties style:column-width="3.8438in"/>
    </style:style>
    <style:style style:name="Table18.C" style:family="table-column">
      <style:table-column-properties style:column-width="1.3653in"/>
    </style:style>
    <style:style style:name="Table18.A1" style:family="table-cell">
      <style:table-cell-properties style:vertical-align="middle" fo:padding="0.0194in" fo:border="none"/>
    </style:style>
    <style:style style:name="Table19" style:family="table">
      <style:table-properties style:width="3.309in" table:align="left"/>
    </style:style>
    <style:style style:name="Table19.A" style:family="table-column">
      <style:table-column-properties style:column-width="1.5424in"/>
    </style:style>
    <style:style style:name="Table19.B" style:family="table-column">
      <style:table-column-properties style:column-width="1.7667in"/>
    </style:style>
    <style:style style:name="Table19.A1" style:family="table-cell">
      <style:table-cell-properties style:vertical-align="middle" fo:padding="0.0194in" fo:border="none"/>
    </style:style>
    <style:style style:name="Table20" style:family="table">
      <style:table-properties style:width="6.6007in" table:align="left"/>
    </style:style>
    <style:style style:name="Table20.A" style:family="table-column">
      <style:table-column-properties style:column-width="1.2in"/>
    </style:style>
    <style:style style:name="Table20.B" style:family="table-column">
      <style:table-column-properties style:column-width="1.7729in"/>
    </style:style>
    <style:style style:name="Table20.C" style:family="table-column">
      <style:table-column-properties style:column-width="1.5319in"/>
    </style:style>
    <style:style style:name="Table20.D" style:family="table-column">
      <style:table-column-properties style:column-width="2.0958in"/>
    </style:style>
    <style:style style:name="Table20.A1" style:family="table-cell">
      <style:table-cell-properties style:vertical-align="middle" fo:padding="0.0194in" fo:border="none"/>
    </style:style>
    <style:style style:name="Table21" style:family="table">
      <style:table-properties style:width="1.7444in" table:align="left"/>
    </style:style>
    <style:style style:name="Table21.A" style:family="table-column">
      <style:table-column-properties style:column-width="1.084in"/>
    </style:style>
    <style:style style:name="Table21.B" style:family="table-column">
      <style:table-column-properties style:column-width="0.6604in"/>
    </style:style>
    <style:style style:name="Table21.A1" style:family="table-cell">
      <style:table-cell-properties style:vertical-align="middle" fo:padding="0.0194in" fo:border="none"/>
    </style:style>
    <style:style style:name="Table22" style:family="table">
      <style:table-properties style:width="2.8083in" table:align="left"/>
    </style:style>
    <style:style style:name="Table22.A" style:family="table-column">
      <style:table-column-properties style:column-width="1.9542in"/>
    </style:style>
    <style:style style:name="Table22.B" style:family="table-column">
      <style:table-column-properties style:column-width="0.4438in"/>
    </style:style>
    <style:style style:name="Table22.C" style:family="table-column">
      <style:table-column-properties style:column-width="0.4104in"/>
    </style:style>
    <style:style style:name="Table22.A1" style:family="table-cell">
      <style:table-cell-properties style:vertical-align="middle" fo:padding="0.0194in" fo:border="none"/>
    </style:style>
    <style:style style:name="Table23" style:family="table">
      <style:table-properties style:width="6.925in" table:align="left"/>
    </style:style>
    <style:style style:name="Table23.A" style:family="table-column">
      <style:table-column-properties style:column-width="1.7063in"/>
    </style:style>
    <style:style style:name="Table23.B" style:family="table-column">
      <style:table-column-properties style:column-width="1.0194in"/>
    </style:style>
    <style:style style:name="Table23.C" style:family="table-column">
      <style:table-column-properties style:column-width="4.1993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84in"/>
    </style:style>
    <style:style style:name="Table24.B" style:family="table-column">
      <style:table-column-properties style:column-width="1.5965in"/>
    </style:style>
    <style:style style:name="Table24.C" style:family="table-column">
      <style:table-column-properties style:column-width="1.6771in"/>
    </style:style>
    <style:style style:name="Table24.D" style:family="table-column">
      <style:table-column-properties style:column-width="1.0785in"/>
    </style:style>
    <style:style style:name="Table24.E" style:family="table-column">
      <style:table-column-properties style:column-width="1.4889in"/>
    </style:style>
    <style:style style:name="Table24.A1" style:family="table-cell">
      <style:table-cell-properties style:vertical-align="middle" fo:padding="0.0194in" fo:border="none"/>
    </style:style>
    <style:style style:name="Table25" style:family="table">
      <style:table-properties style:width="3.6382in" table:align="left"/>
    </style:style>
    <style:style style:name="Table25.A" style:family="table-column">
      <style:table-column-properties style:column-width="1.5424in"/>
    </style:style>
    <style:style style:name="Table25.B" style:family="table-column">
      <style:table-column-properties style:column-width="2.0958in"/>
    </style:style>
    <style:style style:name="Table25.A1" style:family="table-cell">
      <style:table-cell-properties style:vertical-align="middle" fo:padding="0.0194in" fo:border="none"/>
    </style:style>
    <style:style style:name="Table26" style:family="table">
      <style:table-properties style:width="4.2438in" table:align="left"/>
    </style:style>
    <style:style style:name="Table26.A" style:family="table-column">
      <style:table-column-properties style:column-width="1.084in"/>
    </style:style>
    <style:style style:name="Table26.B" style:family="table-column">
      <style:table-column-properties style:column-width="0.6292in"/>
    </style:style>
    <style:style style:name="Table26.C" style:family="table-column">
      <style:table-column-properties style:column-width="0.5514in"/>
    </style:style>
    <style:style style:name="Table26.D" style:family="table-column">
      <style:table-column-properties style:column-width="0.4438in"/>
    </style:style>
    <style:style style:name="Table26.E" style:family="table-column">
      <style:table-column-properties style:column-width="0.3979in"/>
    </style:style>
    <style:style style:name="Table26.F" style:family="table-column">
      <style:table-column-properties style:column-width="0.5174in"/>
    </style:style>
    <style:style style:name="Table26.G" style:family="table-column">
      <style:table-column-properties style:column-width="0.6201in"/>
    </style:style>
    <style:style style:name="Table26.A1" style:family="table-cell">
      <style:table-cell-properties style:vertical-align="middle" fo:padding="0.0194in" fo:border="none"/>
    </style:style>
    <style:style style:name="Table27" style:family="table">
      <style:table-properties style:width="1.9104in" table:align="left"/>
    </style:style>
    <style:style style:name="Table27.A" style:family="table-column">
      <style:table-column-properties style:column-width="1.0563in"/>
    </style:style>
    <style:style style:name="Table27.B" style:family="table-column">
      <style:table-column-properties style:column-width="0.4438in"/>
    </style:style>
    <style:style style:name="Table27.C" style:family="table-column">
      <style:table-column-properties style:column-width="0.4104in"/>
    </style:style>
    <style:style style:name="Table27.A1" style:family="table-cell">
      <style:table-cell-properties style:vertical-align="middle" fo:padding="0.0194in" fo:border="none"/>
    </style:style>
    <style:style style:name="Table28" style:family="table">
      <style:table-properties style:width="4.0674in" table:align="left"/>
    </style:style>
    <style:style style:name="Table28.A" style:family="table-column">
      <style:table-column-properties style:column-width="0.9451in"/>
    </style:style>
    <style:style style:name="Table28.B" style:family="table-column">
      <style:table-column-properties style:column-width="0.5917in"/>
    </style:style>
    <style:style style:name="Table28.C" style:family="table-column">
      <style:table-column-properties style:column-width="0.5514in"/>
    </style:style>
    <style:style style:name="Table28.D" style:family="table-column">
      <style:table-column-properties style:column-width="0.4438in"/>
    </style:style>
    <style:style style:name="Table28.E" style:family="table-column">
      <style:table-column-properties style:column-width="0.3979in"/>
    </style:style>
    <style:style style:name="Table28.F" style:family="table-column">
      <style:table-column-properties style:column-width="0.5174in"/>
    </style:style>
    <style:style style:name="Table28.G" style:family="table-column">
      <style:table-column-properties style:column-width="0.6201in"/>
    </style:style>
    <style:style style:name="Table28.A1" style:family="table-cell">
      <style:table-cell-properties style:vertical-align="middle" fo:padding="0.0194in" fo:border="none"/>
    </style:style>
    <style:style style:name="Table29" style:family="table">
      <style:table-properties style:width="1.7618in" table:align="left"/>
    </style:style>
    <style:style style:name="Table29.A" style:family="table-column">
      <style:table-column-properties style:column-width="0.9076in"/>
    </style:style>
    <style:style style:name="Table29.B" style:family="table-column">
      <style:table-column-properties style:column-width="0.4438in"/>
    </style:style>
    <style:style style:name="Table29.C" style:family="table-column">
      <style:table-column-properties style:column-width="0.4104in"/>
    </style:style>
    <style:style style:name="Table29.A1" style:family="table-cell">
      <style:table-cell-properties style:vertical-align="middle" fo:padding="0.0194in" fo:border="none"/>
    </style:style>
    <style:style style:name="Table30" style:family="table">
      <style:table-properties style:width="4.2063in" table:align="left"/>
    </style:style>
    <style:style style:name="Table30.A" style:family="table-column">
      <style:table-column-properties style:column-width="1.084in"/>
    </style:style>
    <style:style style:name="Table30.B" style:family="table-column">
      <style:table-column-properties style:column-width="0.5917in"/>
    </style:style>
    <style:style style:name="Table30.C" style:family="table-column">
      <style:table-column-properties style:column-width="0.5514in"/>
    </style:style>
    <style:style style:name="Table30.D" style:family="table-column">
      <style:table-column-properties style:column-width="0.4438in"/>
    </style:style>
    <style:style style:name="Table30.E" style:family="table-column">
      <style:table-column-properties style:column-width="0.3979in"/>
    </style:style>
    <style:style style:name="Table30.F" style:family="table-column">
      <style:table-column-properties style:column-width="0.5174in"/>
    </style:style>
    <style:style style:name="Table30.G" style:family="table-column">
      <style:table-column-properties style:column-width="0.6201in"/>
    </style:style>
    <style:style style:name="Table30.A1" style:family="table-cell">
      <style:table-cell-properties style:vertical-align="middle" fo:padding="0.0194in" fo:border="none"/>
    </style:style>
    <style:style style:name="Table31" style:family="table">
      <style:table-properties style:width="1.9104in" table:align="left"/>
    </style:style>
    <style:style style:name="Table31.A" style:family="table-column">
      <style:table-column-properties style:column-width="1.0563in"/>
    </style:style>
    <style:style style:name="Table31.B" style:family="table-column">
      <style:table-column-properties style:column-width="0.4438in"/>
    </style:style>
    <style:style style:name="Table31.C" style:family="table-column">
      <style:table-column-properties style:column-width="0.4104in"/>
    </style:style>
    <style:style style:name="Table31.A1" style:family="table-cell">
      <style:table-cell-properties style:vertical-align="middle" fo:padding="0.0194in" fo:border="none"/>
    </style:style>
    <style:style style:name="Table32" style:family="table">
      <style:table-properties style:width="4.141in" table:align="left"/>
    </style:style>
    <style:style style:name="Table32.A" style:family="table-column">
      <style:table-column-properties style:column-width="1.0188in"/>
    </style:style>
    <style:style style:name="Table32.B" style:family="table-column">
      <style:table-column-properties style:column-width="0.5917in"/>
    </style:style>
    <style:style style:name="Table32.C" style:family="table-column">
      <style:table-column-properties style:column-width="0.5514in"/>
    </style:style>
    <style:style style:name="Table32.D" style:family="table-column">
      <style:table-column-properties style:column-width="0.4438in"/>
    </style:style>
    <style:style style:name="Table32.E" style:family="table-column">
      <style:table-column-properties style:column-width="0.3979in"/>
    </style:style>
    <style:style style:name="Table32.F" style:family="table-column">
      <style:table-column-properties style:column-width="0.5174in"/>
    </style:style>
    <style:style style:name="Table32.G" style:family="table-column">
      <style:table-column-properties style:column-width="0.6201in"/>
    </style:style>
    <style:style style:name="Table32.A1" style:family="table-cell">
      <style:table-cell-properties style:vertical-align="middle" fo:padding="0.0194in" fo:border="none"/>
    </style:style>
    <style:style style:name="Table33" style:family="table">
      <style:table-properties style:width="1.8639in" table:align="left"/>
    </style:style>
    <style:style style:name="Table33.A" style:family="table-column">
      <style:table-column-properties style:column-width="1.0097in"/>
    </style:style>
    <style:style style:name="Table33.B" style:family="table-column">
      <style:table-column-properties style:column-width="0.4438in"/>
    </style:style>
    <style:style style:name="Table33.C" style:family="table-column">
      <style:table-column-properties style:column-width="0.4104in"/>
    </style:style>
    <style:style style:name="Table33.A1" style:family="table-cell">
      <style:table-cell-properties style:vertical-align="middle" fo:padding="0.0194in" fo:border="none"/>
    </style:style>
    <style:style style:name="Table34" style:family="table">
      <style:table-properties style:width="4.0486in" table:align="left"/>
    </style:style>
    <style:style style:name="Table34.A" style:family="table-column">
      <style:table-column-properties style:column-width="0.9451in"/>
    </style:style>
    <style:style style:name="Table34.B" style:family="table-column">
      <style:table-column-properties style:column-width="0.5917in"/>
    </style:style>
    <style:style style:name="Table34.C" style:family="table-column">
      <style:table-column-properties style:column-width="0.5514in"/>
    </style:style>
    <style:style style:name="Table34.D" style:family="table-column">
      <style:table-column-properties style:column-width="0.4438in"/>
    </style:style>
    <style:style style:name="Table34.E" style:family="table-column">
      <style:table-column-properties style:column-width="0.3792in"/>
    </style:style>
    <style:style style:name="Table34.F" style:family="table-column">
      <style:table-column-properties style:column-width="0.5174in"/>
    </style:style>
    <style:style style:name="Table34.G" style:family="table-column">
      <style:table-column-properties style:column-width="0.6201in"/>
    </style:style>
    <style:style style:name="Table34.A1" style:family="table-cell">
      <style:table-cell-properties style:vertical-align="middle" fo:padding="0.0194in" fo:border="none"/>
    </style:style>
    <style:style style:name="Table35" style:family="table">
      <style:table-properties style:width="1.7618in" table:align="left"/>
    </style:style>
    <style:style style:name="Table35.A" style:family="table-column">
      <style:table-column-properties style:column-width="0.9076in"/>
    </style:style>
    <style:style style:name="Table35.B" style:family="table-column">
      <style:table-column-properties style:column-width="0.4438in"/>
    </style:style>
    <style:style style:name="Table35.C" style:family="table-column">
      <style:table-column-properties style:column-width="0.4104in"/>
    </style:style>
    <style:style style:name="Table35.A1" style:family="table-cell">
      <style:table-cell-properties style:vertical-align="middle" fo:padding="0.0194in" fo:border="none"/>
    </style:style>
    <style:style style:name="Table36" style:family="table">
      <style:table-properties style:width="3.9285in" table:align="left"/>
    </style:style>
    <style:style style:name="Table36.A" style:family="table-column">
      <style:table-column-properties style:column-width="0.7319in"/>
    </style:style>
    <style:style style:name="Table36.B" style:family="table-column">
      <style:table-column-properties style:column-width="0.5917in"/>
    </style:style>
    <style:style style:name="Table36.C" style:family="table-column">
      <style:table-column-properties style:column-width="0.5514in"/>
    </style:style>
    <style:style style:name="Table36.D" style:family="table-column">
      <style:table-column-properties style:column-width="0.5271in"/>
    </style:style>
    <style:style style:name="Table36.E" style:family="table-column">
      <style:table-column-properties style:column-width="0.3792in"/>
    </style:style>
    <style:style style:name="Table36.G" style:family="table-column">
      <style:table-column-properties style:column-width="0.6201in"/>
    </style:style>
    <style:style style:name="Table36.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1.8507in"/>
    </style:style>
    <style:style style:name="Table37.B" style:family="table-column">
      <style:table-column-properties style:column-width="1.8076in"/>
    </style:style>
    <style:style style:name="Table37.C" style:family="table-column">
      <style:table-column-properties style:column-width="3.2667in"/>
    </style:style>
    <style:style style:name="Table37.A1" style:family="table-cell">
      <style:table-cell-properties style:vertical-align="middle" fo:padding="0.0194in" fo:border="none"/>
    </style:style>
    <style:style style:name="Table38" style:family="table">
      <style:table-properties style:width="6.925in" table:align="left"/>
    </style:style>
    <style:style style:name="Table38.A" style:family="table-column">
      <style:table-column-properties style:column-width="2.5243in"/>
    </style:style>
    <style:style style:name="Table38.B" style:family="table-column">
      <style:table-column-properties style:column-width="2.0139in"/>
    </style:style>
    <style:style style:name="Table38.C" style:family="table-column">
      <style:table-column-properties style:column-width="2.3868in"/>
    </style:style>
    <style:style style:name="Table38.A1" style:family="table-cell">
      <style:table-cell-properties style:vertical-align="middle" fo:padding="0.0194in" fo:border="none"/>
    </style:style>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margin-top="0in" fo:margin-bottom="0.1965in" style:contextual-spacing="false" fo:text-indent="0in" style:auto-text-indent="false"/>
    </style:style>
    <style:style style:name="P6" style:family="paragraph" style:parent-style-name="Table_20_Contents">
      <style:paragraph-properties fo:margin-left="0in" fo:margin-right="0in" fo:text-indent="0in" style:auto-text-indent="false"/>
    </style:style>
    <style:style style:name="P7" style:family="paragraph" style:parent-style-name="Table_20_Heading">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list-style-name="L1">
      <style:paragraph-properties fo:margin-left="0in" fo:margin-right="0in" fo:margin-top="0in" fo:margin-bottom="0in" style:contextual-spacing="false" fo:text-indent="0in" style:auto-text-indent="false"/>
    </style:style>
    <style:style style:name="P11" style:family="paragraph" style:parent-style-name="Text_20_body" style:list-style-name="L1">
      <style:paragraph-properties fo:margin-left="0in" fo:margin-right="0in" fo:text-indent="0in" style:auto-text-indent="false"/>
    </style:style>
    <style:style style:name="P12" style:family="paragraph" style:parent-style-name="Text_20_body" style:list-style-name="L2">
      <style:paragraph-properties fo:margin-left="0in" fo:margin-right="0in" fo:margin-top="0in" fo:margin-bottom="0in" style:contextual-spacing="false" fo:text-indent="0in" style:auto-text-indent="false"/>
    </style:style>
    <style:style style:name="P13" style:family="paragraph" style:parent-style-name="Text_20_body" style:list-style-name="L2">
      <style:paragraph-properties fo:margin-left="0in" fo:margin-right="0in" fo:text-indent="0in" style:auto-text-indent="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4">
      <style:paragraph-properties fo:margin-left="0in" fo:margin-right="0in" fo:margin-top="0in" fo:margin-bottom="0in" style:contextual-spacing="false" fo:text-indent="0in" style:auto-text-indent="false"/>
    </style:style>
    <style:style style:name="P17" style:family="paragraph" style:parent-style-name="Text_20_body" style:list-style-name="L4">
      <style:paragraph-properties fo:margin-left="0in" fo:margin-right="0in" fo:text-indent="0in" style:auto-text-indent="false"/>
    </style:style>
    <style:style style:name="P18" style:family="paragraph" style:parent-style-name="Text_20_body" style:list-style-name="L5">
      <style:paragraph-properties fo:margin-left="0in" fo:margin-right="0in" fo:margin-top="0in" fo:margin-bottom="0in" style:contextual-spacing="false" fo:text-indent="0in" style:auto-text-indent="false"/>
    </style:style>
    <style:style style:name="P19" style:family="paragraph" style:parent-style-name="Text_20_body" style:list-style-name="L5">
      <style:paragraph-properties fo:margin-left="0in" fo:margin-right="0in" fo:text-indent="0in" style:auto-text-indent="false"/>
    </style:style>
    <style:style style:name="P20" style:family="paragraph" style:parent-style-name="Text_20_body" style:list-style-name="L6">
      <style:paragraph-properties fo:margin-left="0in" fo:margin-right="0in" fo:margin-top="0in" fo:margin-bottom="0in" style:contextual-spacing="false" fo:text-indent="0in" style:auto-text-indent="false"/>
    </style:style>
    <style:style style:name="P21" style:family="paragraph" style:parent-style-name="Text_20_body" style:list-style-name="L6">
      <style:paragraph-properties fo:margin-left="0in" fo:margin-right="0in" fo:text-indent="0in" style:auto-text-indent="false"/>
    </style:style>
    <style:style style:name="P22" style:family="paragraph" style:parent-style-name="Text_20_body" style:list-style-name="L7">
      <style:paragraph-properties fo:margin-left="0in" fo:margin-right="0in" fo:margin-top="0in" fo:margin-bottom="0in" style:contextual-spacing="false" fo:text-indent="0in" style:auto-text-indent="false"/>
    </style:style>
    <style:style style:name="P23" style:family="paragraph" style:parent-style-name="Text_20_body" style:list-style-name="L7">
      <style:paragraph-properties fo:margin-left="0in" fo:margin-right="0in" fo:text-indent="0in" style:auto-text-indent="false"/>
    </style:style>
    <style:style style:name="P24" style:family="paragraph" style:parent-style-name="Text_20_body" style:list-style-name="L8">
      <style:paragraph-properties fo:margin-left="0in" fo:margin-right="0in" fo:margin-top="0in" fo:margin-bottom="0in" style:contextual-spacing="false" fo:text-indent="0in" style:auto-text-indent="false"/>
    </style:style>
    <style:style style:name="P25" style:family="paragraph" style:parent-style-name="Text_20_body" style:list-style-name="L8">
      <style:paragraph-properties fo:margin-left="0in" fo:margin-right="0in" fo:text-indent="0in" style:auto-text-indent="false"/>
    </style:style>
    <style:style style:name="P26" style:family="paragraph" style:parent-style-name="Text_20_body" style:list-style-name="L9">
      <style:paragraph-properties fo:margin-left="0in" fo:margin-right="0in" fo:text-indent="0in" style:auto-text-indent="false"/>
    </style:style>
    <style:style style:name="P27" style:family="paragraph" style:parent-style-name="Text_20_body" style:list-style-name="L10">
      <style:paragraph-properties fo:margin-left="0in" fo:margin-right="0in" fo:margin-top="0in" fo:margin-bottom="0in" style:contextual-spacing="false" fo:text-indent="0in" style:auto-text-indent="false"/>
    </style:style>
    <style:style style:name="P28" style:family="paragraph" style:parent-style-name="Text_20_body" style:list-style-name="L10">
      <style:paragraph-properties fo:margin-left="0in" fo:margin-right="0in" fo:text-indent="0in" style:auto-text-indent="false"/>
    </style:style>
    <style:style style:name="P29" style:family="paragraph" style:parent-style-name="Text_20_body" style:list-style-name="L11">
      <style:paragraph-properties fo:margin-left="0in" fo:margin-right="0in" fo:margin-top="0in" fo:margin-bottom="0in" style:contextual-spacing="false" fo:text-indent="0in" style:auto-text-indent="false"/>
    </style:style>
    <style:style style:name="P30" style:family="paragraph" style:parent-style-name="Text_20_body" style:list-style-name="L11">
      <style:paragraph-properties fo:margin-left="0in" fo:margin-right="0in" fo:text-indent="0in" style:auto-text-indent="false"/>
    </style:style>
    <style:style style:name="P31" style:family="paragraph" style:parent-style-name="Text_20_body" style:list-style-name="L12">
      <style:paragraph-properties fo:margin-left="0in" fo:margin-right="0in" fo:margin-top="0in" fo:margin-bottom="0in" style:contextual-spacing="false" fo:text-indent="0in" style:auto-text-indent="false"/>
    </style:style>
    <style:style style:name="P32" style:family="paragraph" style:parent-style-name="Text_20_body" style:list-style-name="L12">
      <style:paragraph-properties fo:margin-left="0in" fo:margin-right="0in" fo:text-indent="0in" style:auto-text-indent="false"/>
    </style:style>
    <style:style style:name="P33" style:family="paragraph" style:parent-style-name="Text_20_body" style:list-style-name="L13">
      <style:paragraph-properties fo:margin-left="0in" fo:margin-right="0in" fo:margin-top="0in" fo:margin-bottom="0in" style:contextual-spacing="false" fo:text-indent="0in" style:auto-text-indent="false"/>
    </style:style>
    <style:style style:name="P34" style:family="paragraph" style:parent-style-name="Text_20_body" style:list-style-name="L13">
      <style:paragraph-properties fo:margin-left="0in" fo:margin-right="0in" fo:text-indent="0in" style:auto-text-indent="false"/>
    </style:style>
    <style:style style:name="P35" style:family="paragraph" style:parent-style-name="Text_20_body" style:list-style-name="L14">
      <style:paragraph-properties fo:margin-left="0in" fo:margin-right="0in" fo:margin-top="0in" fo:margin-bottom="0in" style:contextual-spacing="false" fo:text-indent="0in" style:auto-text-indent="false"/>
    </style:style>
    <style:style style:name="P36" style:family="paragraph" style:parent-style-name="Text_20_body" style:list-style-name="L14">
      <style:paragraph-properties fo:margin-left="0in" fo:margin-right="0in" fo:text-indent="0in" style:auto-text-indent="false"/>
    </style:style>
    <style:style style:name="P37" style:family="paragraph" style:parent-style-name="Text_20_body" style:list-style-name="L15">
      <style:paragraph-properties fo:margin-left="0in" fo:margin-right="0in" fo:margin-top="0in" fo:margin-bottom="0in" style:contextual-spacing="false" fo:text-indent="0in" style:auto-text-indent="false"/>
    </style:style>
    <style:style style:name="P38" style:family="paragraph" style:parent-style-name="Text_20_body" style:list-style-name="L15">
      <style:paragraph-properties fo:margin-left="0in" fo:margin-right="0in" fo:text-indent="0in" style:auto-text-indent="false"/>
    </style:style>
    <style:style style:name="P39" style:family="paragraph" style:parent-style-name="Text_20_body" style:list-style-name="L16">
      <style:paragraph-properties fo:margin-left="0in" fo:margin-right="0in" fo:margin-top="0in" fo:margin-bottom="0in" style:contextual-spacing="false" fo:text-indent="0in" style:auto-text-indent="false"/>
    </style:style>
    <style:style style:name="P40" style:family="paragraph" style:parent-style-name="Text_20_body" style:list-style-name="L16">
      <style:paragraph-properties fo:margin-left="0in" fo:margin-right="0in" fo:text-indent="0in" style:auto-text-indent="false"/>
    </style:style>
    <style:style style:name="P41" style:family="paragraph" style:parent-style-name="Text_20_body" style:list-style-name="L17">
      <style:paragraph-properties fo:margin-left="0in" fo:margin-right="0in" fo:margin-top="0in" fo:margin-bottom="0in" style:contextual-spacing="false" fo:text-indent="0in" style:auto-text-indent="false"/>
    </style:style>
    <style:style style:name="P42" style:family="paragraph" style:parent-style-name="Text_20_body" style:list-style-name="L17">
      <style:paragraph-properties fo:margin-left="0in" fo:margin-right="0in" fo:text-indent="0in" style:auto-text-indent="false"/>
    </style:style>
    <style:style style:name="P43" style:family="paragraph" style:parent-style-name="Text_20_body" style:list-style-name="L18">
      <style:paragraph-properties fo:margin-left="0in" fo:margin-right="0in" fo:text-indent="0in" style:auto-text-indent="false"/>
    </style:style>
    <style:style style:name="P44" style:family="paragraph" style:parent-style-name="Text_20_body" style:list-style-name="L19">
      <style:paragraph-properties fo:margin-left="0in" fo:margin-right="0in" fo:margin-top="0in" fo:margin-bottom="0in" style:contextual-spacing="false" fo:text-indent="0in" style:auto-text-indent="false"/>
    </style:style>
    <style:style style:name="P45" style:family="paragraph" style:parent-style-name="Text_20_body" style:list-style-name="L19">
      <style:paragraph-properties fo:margin-left="0in" fo:margin-right="0in" fo:text-indent="0in" style:auto-text-indent="false"/>
    </style:style>
    <style:style style:name="P46" style:family="paragraph" style:parent-style-name="Text_20_body" style:list-style-name="L20">
      <style:paragraph-properties fo:margin-left="0in" fo:margin-right="0in" fo:margin-top="0in" fo:margin-bottom="0in" style:contextual-spacing="false" fo:text-indent="0in" style:auto-text-indent="false"/>
    </style:style>
    <style:style style:name="P47" style:family="paragraph" style:parent-style-name="Text_20_body" style:list-style-name="L20">
      <style:paragraph-properties fo:margin-left="0in" fo:margin-right="0in" fo:text-indent="0in" style:auto-text-indent="false"/>
    </style:style>
    <style:style style:name="P48" style:family="paragraph" style:parent-style-name="Text_20_body" style:list-style-name="L21">
      <style:paragraph-properties fo:margin-left="0in" fo:margin-right="0in" fo:margin-top="0in" fo:margin-bottom="0in" style:contextual-spacing="false" fo:text-indent="0in" style:auto-text-indent="false"/>
    </style:style>
    <style:style style:name="P49" style:family="paragraph" style:parent-style-name="Text_20_body" style:list-style-name="L21">
      <style:paragraph-properties fo:margin-left="0in" fo:margin-right="0in" fo:text-indent="0in" style:auto-text-indent="false"/>
    </style:style>
    <style:style style:name="P50" style:family="paragraph" style:parent-style-name="Text_20_body" style:list-style-name="L22">
      <style:paragraph-properties fo:margin-left="0in" fo:margin-right="0in" fo:margin-top="0in" fo:margin-bottom="0in" style:contextual-spacing="false" fo:text-indent="0in" style:auto-text-indent="false"/>
    </style:style>
    <style:style style:name="P51" style:family="paragraph" style:parent-style-name="Text_20_body" style:list-style-name="L22">
      <style:paragraph-properties fo:margin-left="0in" fo:margin-right="0in" fo:text-indent="0in" style:auto-text-indent="false"/>
    </style:style>
    <style:style style:name="P52" style:family="paragraph" style:parent-style-name="Text_20_body" style:list-style-name="L23">
      <style:paragraph-properties fo:margin-left="0in" fo:margin-right="0in" fo:margin-top="0in" fo:margin-bottom="0in" style:contextual-spacing="false" fo:text-indent="0in" style:auto-text-indent="false"/>
    </style:style>
    <style:style style:name="P53" style:family="paragraph" style:parent-style-name="Text_20_body" style:list-style-name="L23">
      <style:paragraph-properties fo:margin-left="0in" fo:margin-right="0in" fo:text-indent="0in" style:auto-text-indent="false"/>
    </style:style>
    <style:style style:name="P54" style:family="paragraph" style:parent-style-name="Text_20_body" style:list-style-name="L24">
      <style:paragraph-properties fo:margin-left="0in" fo:margin-right="0in" fo:margin-top="0in" fo:margin-bottom="0in" style:contextual-spacing="false" fo:text-indent="0in" style:auto-text-indent="false"/>
    </style:style>
    <style:style style:name="P55" style:family="paragraph" style:parent-style-name="Text_20_body" style:list-style-name="L24">
      <style:paragraph-properties fo:margin-left="0in" fo:margin-right="0in" fo:text-indent="0in" style:auto-text-indent="false"/>
    </style:style>
    <style:style style:name="P56" style:family="paragraph" style:parent-style-name="Text_20_body" style:list-style-name="L25">
      <style:paragraph-properties fo:margin-left="0in" fo:margin-right="0in" fo:margin-top="0in" fo:margin-bottom="0in" style:contextual-spacing="false" fo:text-indent="0in" style:auto-text-indent="false"/>
    </style:style>
    <style:style style:name="P57" style:family="paragraph" style:parent-style-name="Text_20_body" style:list-style-name="L25">
      <style:paragraph-properties fo:margin-left="0in" fo:margin-right="0in" fo:text-indent="0in" style:auto-text-indent="false"/>
    </style:style>
    <style:style style:name="P58" style:family="paragraph" style:parent-style-name="Text_20_body" style:list-style-name="L26">
      <style:paragraph-properties fo:margin-left="0in" fo:margin-right="0in" fo:margin-top="0in" fo:margin-bottom="0in" style:contextual-spacing="false" fo:text-indent="0in" style:auto-text-indent="false"/>
    </style:style>
    <style:style style:name="P59" style:family="paragraph" style:parent-style-name="Text_20_body" style:list-style-name="L26">
      <style:paragraph-properties fo:margin-left="0in" fo:margin-right="0in" fo:text-indent="0in" style:auto-text-indent="false"/>
    </style:style>
    <style:style style:name="P60" style:family="paragraph" style:parent-style-name="Text_20_body" style:list-style-name="L27">
      <style:paragraph-properties fo:margin-left="0in" fo:margin-right="0in" fo:margin-top="0in" fo:margin-bottom="0in" style:contextual-spacing="false" fo:text-indent="0in" style:auto-text-indent="false"/>
    </style:style>
    <style:style style:name="P61" style:family="paragraph" style:parent-style-name="Text_20_body" style:list-style-name="L27">
      <style:paragraph-properties fo:margin-left="0in" fo:margin-right="0in" fo:text-indent="0in" style:auto-text-indent="false"/>
    </style:style>
    <style:style style:name="P62" style:family="paragraph" style:parent-style-name="Text_20_body" style:list-style-name="L28">
      <style:paragraph-properties fo:margin-left="0in" fo:margin-right="0in" fo:margin-top="0in" fo:margin-bottom="0in" style:contextual-spacing="false" fo:text-indent="0in" style:auto-text-indent="false"/>
    </style:style>
    <style:style style:name="P63" style:family="paragraph" style:parent-style-name="Text_20_body" style:list-style-name="L28">
      <style:paragraph-properties fo:margin-left="0in" fo:margin-right="0in" fo:text-indent="0in" style:auto-text-indent="false"/>
    </style:style>
    <style:style style:name="P64" style:family="paragraph" style:parent-style-name="Text_20_body" style:list-style-name="L29">
      <style:paragraph-properties fo:margin-left="0in" fo:margin-right="0in" fo:margin-top="0in" fo:margin-bottom="0in" style:contextual-spacing="false" fo:text-indent="0in" style:auto-text-indent="false"/>
    </style:style>
    <style:style style:name="P65" style:family="paragraph" style:parent-style-name="Text_20_body" style:list-style-name="L29">
      <style:paragraph-properties fo:margin-left="0in" fo:margin-right="0in" fo:text-indent="0in" style:auto-text-indent="false"/>
    </style:style>
    <style:style style:name="P66" style:family="paragraph" style:parent-style-name="Text_20_body" style:list-style-name="L30">
      <style:paragraph-properties fo:margin-left="0in" fo:margin-right="0in" fo:margin-top="0in" fo:margin-bottom="0in" style:contextual-spacing="false" fo:text-indent="0in" style:auto-text-indent="false"/>
    </style:style>
    <style:style style:name="P67" style:family="paragraph" style:parent-style-name="Text_20_body" style:list-style-name="L30">
      <style:paragraph-properties fo:margin-left="0in" fo:margin-right="0in" fo:text-indent="0in" style:auto-text-indent="false"/>
    </style:style>
    <style:style style:name="P68" style:family="paragraph" style:parent-style-name="Text_20_body" style:list-style-name="L31">
      <style:paragraph-properties fo:margin-left="0in" fo:margin-right="0in" fo:margin-top="0in" fo:margin-bottom="0in" style:contextual-spacing="false" fo:text-indent="0in" style:auto-text-indent="false"/>
    </style:style>
    <style:style style:name="P69" style:family="paragraph" style:parent-style-name="Text_20_body" style:list-style-name="L31">
      <style:paragraph-properties fo:margin-left="0in" fo:margin-right="0in" fo:text-indent="0in" style:auto-text-indent="false"/>
    </style:style>
    <style:style style:name="P70" style:family="paragraph" style:parent-style-name="Text_20_body" style:list-style-name="L32">
      <style:paragraph-properties fo:margin-left="0in" fo:margin-right="0in" fo:margin-top="0in" fo:margin-bottom="0in" style:contextual-spacing="false" fo:text-indent="0in" style:auto-text-indent="false"/>
    </style:style>
    <style:style style:name="P71" style:family="paragraph" style:parent-style-name="Text_20_body" style:list-style-name="L32">
      <style:paragraph-properties fo:margin-left="0in" fo:margin-right="0in" fo:text-indent="0in" style:auto-text-indent="false"/>
    </style:style>
    <style:style style:name="P72" style:family="paragraph" style:parent-style-name="Text_20_body" style:list-style-name="L33">
      <style:paragraph-properties fo:margin-left="0in" fo:margin-right="0in" fo:margin-top="0in" fo:margin-bottom="0in" style:contextual-spacing="false" fo:text-indent="0in" style:auto-text-indent="false"/>
    </style:style>
    <style:style style:name="P73" style:family="paragraph" style:parent-style-name="Text_20_body" style:list-style-name="L33">
      <style:paragraph-properties fo:margin-left="0in" fo:margin-right="0in" fo:text-indent="0in" style:auto-text-indent="false"/>
    </style:style>
    <style:style style:name="P74" style:family="paragraph" style:parent-style-name="Text_20_body" style:list-style-name="L34">
      <style:paragraph-properties fo:margin-left="0in" fo:margin-right="0in" fo:text-indent="0in" style:auto-text-indent="false"/>
    </style:style>
    <style:style style:name="P75" style:family="paragraph" style:parent-style-name="Text_20_body" style:list-style-name="L35">
      <style:paragraph-properties fo:margin-left="0in" fo:margin-right="0in" fo:margin-top="0in" fo:margin-bottom="0in" style:contextual-spacing="false" fo:text-indent="0in" style:auto-text-indent="false"/>
    </style:style>
    <style:style style:name="P76" style:family="paragraph" style:parent-style-name="Text_20_body" style:list-style-name="L35">
      <style:paragraph-properties fo:margin-left="0in" fo:margin-right="0in" fo:text-indent="0in" style:auto-text-indent="false"/>
    </style:style>
    <style:style style:name="P77" style:family="paragraph" style:parent-style-name="Text_20_body" style:list-style-name="L36">
      <style:paragraph-properties fo:margin-left="0in" fo:margin-right="0in" fo:margin-top="0in" fo:margin-bottom="0in" style:contextual-spacing="false" fo:text-indent="0in" style:auto-text-indent="false"/>
    </style:style>
    <style:style style:name="P78" style:family="paragraph" style:parent-style-name="Text_20_body" style:list-style-name="L36">
      <style:paragraph-properties fo:margin-left="0in" fo:margin-right="0in" fo:text-indent="0in" style:auto-text-indent="false"/>
    </style:style>
    <style:style style:name="P79" style:family="paragraph" style:parent-style-name="Text_20_body" style:list-style-name="L37">
      <style:paragraph-properties fo:margin-left="0in" fo:margin-right="0in" fo:margin-top="0in" fo:margin-bottom="0in" style:contextual-spacing="false" fo:text-indent="0in" style:auto-text-indent="false"/>
    </style:style>
    <style:style style:name="P80" style:family="paragraph" style:parent-style-name="Text_20_body" style:list-style-name="L37">
      <style:paragraph-properties fo:margin-left="0in" fo:margin-right="0in" fo:text-indent="0in" style:auto-text-indent="false"/>
    </style:style>
    <style:style style:name="P81" style:family="paragraph" style:parent-style-name="Text_20_body" style:list-style-name="L38">
      <style:paragraph-properties fo:margin-left="0in" fo:margin-right="0in" fo:margin-top="0in" fo:margin-bottom="0in" style:contextual-spacing="false" fo:text-indent="0in" style:auto-text-indent="false"/>
    </style:style>
    <style:style style:name="P82" style:family="paragraph" style:parent-style-name="Text_20_body" style:list-style-name="L38">
      <style:paragraph-properties fo:margin-left="0in" fo:margin-right="0in" fo:text-indent="0in" style:auto-text-indent="false"/>
    </style:style>
    <style:style style:name="P83" style:family="paragraph" style:parent-style-name="Text_20_body" style:list-style-name="L39">
      <style:paragraph-properties fo:margin-left="0in" fo:margin-right="0in" fo:margin-top="0in" fo:margin-bottom="0in" style:contextual-spacing="false" fo:text-indent="0in" style:auto-text-indent="false"/>
    </style:style>
    <style:style style:name="P84" style:family="paragraph" style:parent-style-name="Text_20_body" style:list-style-name="L39">
      <style:paragraph-properties fo:margin-left="0in" fo:margin-right="0in" fo:text-indent="0in" style:auto-text-indent="false"/>
    </style:style>
    <style:style style:name="P85" style:family="paragraph" style:parent-style-name="Text_20_body" style:list-style-name="L40">
      <style:paragraph-properties fo:margin-left="0in" fo:margin-right="0in" fo:margin-top="0in" fo:margin-bottom="0in" style:contextual-spacing="false" fo:text-indent="0in" style:auto-text-indent="false"/>
    </style:style>
    <style:style style:name="P86" style:family="paragraph" style:parent-style-name="Text_20_body" style:list-style-name="L40">
      <style:paragraph-properties fo:margin-left="0in" fo:margin-right="0in" fo:text-indent="0in" style:auto-text-indent="false"/>
    </style:style>
    <style:style style:name="P87" style:family="paragraph" style:parent-style-name="Text_20_body" style:list-style-name="L41">
      <style:paragraph-properties fo:margin-left="0in" fo:margin-right="0in" fo:text-indent="0in" style:auto-text-indent="false"/>
    </style:style>
    <style:style style:name="P88" style:family="paragraph" style:parent-style-name="Text_20_body" style:list-style-name="L42">
      <style:paragraph-properties fo:margin-left="0in" fo:margin-right="0in" fo:margin-top="0in" fo:margin-bottom="0in" style:contextual-spacing="false" fo:text-indent="0in" style:auto-text-indent="false"/>
    </style:style>
    <style:style style:name="P89" style:family="paragraph" style:parent-style-name="Text_20_body" style:list-style-name="L42">
      <style:paragraph-properties fo:margin-left="0in" fo:margin-right="0in" fo:text-indent="0in" style:auto-text-indent="false"/>
    </style:style>
    <style:style style:name="P90" style:family="paragraph" style:parent-style-name="Text_20_body" style:list-style-name="L43">
      <style:paragraph-properties fo:margin-left="0in" fo:margin-right="0in" fo:text-indent="0in" style:auto-text-indent="false"/>
    </style:style>
    <style:style style:name="P91" style:family="paragraph" style:parent-style-name="Text_20_body" style:list-style-name="L44">
      <style:paragraph-properties fo:margin-left="0in" fo:margin-right="0in" fo:text-indent="0in" style:auto-text-indent="false"/>
    </style:style>
    <style:style style:name="P92" style:family="paragraph" style:parent-style-name="Text_20_body" style:list-style-name="L45">
      <style:paragraph-properties fo:margin-left="0in" fo:margin-right="0in" fo:text-indent="0in" style:auto-text-indent="false"/>
    </style:style>
    <style:style style:name="P93" style:family="paragraph" style:parent-style-name="Text_20_body" style:list-style-name="L46">
      <style:paragraph-properties fo:margin-left="0in" fo:margin-right="0in" fo:margin-top="0in" fo:margin-bottom="0in" style:contextual-spacing="false" fo:text-indent="0in" style:auto-text-indent="false"/>
    </style:style>
    <style:style style:name="P94" style:family="paragraph" style:parent-style-name="Text_20_body" style:list-style-name="L46">
      <style:paragraph-properties fo:margin-left="0in" fo:margin-right="0in" fo:text-indent="0in" style:auto-text-indent="false"/>
    </style:style>
    <style:style style:name="P95" style:family="paragraph" style:parent-style-name="Text_20_body" style:list-style-name="L47">
      <style:paragraph-properties fo:margin-left="0in" fo:margin-right="0in" fo:margin-top="0in" fo:margin-bottom="0in" style:contextual-spacing="false" fo:text-indent="0in" style:auto-text-indent="false"/>
    </style:style>
    <style:style style:name="P96" style:family="paragraph" style:parent-style-name="Text_20_body" style:list-style-name="L47">
      <style:paragraph-properties fo:margin-left="0in" fo:margin-right="0in" fo:text-indent="0in" style:auto-text-indent="false"/>
    </style:style>
    <style:style style:name="P97" style:family="paragraph" style:parent-style-name="Text_20_body" style:list-style-name="L48">
      <style:paragraph-properties fo:margin-left="0in" fo:margin-right="0in" fo:text-indent="0in" style:auto-text-indent="false"/>
    </style:style>
    <style:style style:name="P98" style:family="paragraph" style:parent-style-name="Text_20_body" style:list-style-name="L49">
      <style:paragraph-properties fo:margin-left="0in" fo:margin-right="0in" fo:margin-top="0in" fo:margin-bottom="0in" style:contextual-spacing="false" fo:text-indent="0in" style:auto-text-indent="false"/>
    </style:style>
    <style:style style:name="P99" style:family="paragraph" style:parent-style-name="Text_20_body" style:list-style-name="L49">
      <style:paragraph-properties fo:margin-left="0in" fo:margin-right="0in" fo:text-indent="0in" style:auto-text-indent="false"/>
    </style:style>
    <style:style style:name="P100" style:family="paragraph" style:parent-style-name="Text_20_body" style:list-style-name="L50">
      <style:paragraph-properties fo:margin-left="0in" fo:margin-right="0in" fo:margin-top="0in" fo:margin-bottom="0in" style:contextual-spacing="false" fo:text-indent="0in" style:auto-text-indent="false"/>
    </style:style>
    <style:style style:name="P101" style:family="paragraph" style:parent-style-name="Text_20_body" style:list-style-name="L50">
      <style:paragraph-properties fo:margin-left="0in" fo:margin-right="0in" fo:text-indent="0in" style:auto-text-indent="false"/>
    </style:style>
    <style:style style:name="P102" style:family="paragraph" style:parent-style-name="Text_20_body" style:list-style-name="L51">
      <style:paragraph-properties fo:margin-left="0in" fo:margin-right="0in" fo:margin-top="0in" fo:margin-bottom="0in" style:contextual-spacing="false" fo:text-indent="0in" style:auto-text-indent="false"/>
    </style:style>
    <style:style style:name="P103" style:family="paragraph" style:parent-style-name="Text_20_body" style:list-style-name="L51">
      <style:paragraph-properties fo:margin-left="0in" fo:margin-right="0in" fo:text-indent="0in" style:auto-text-indent="false"/>
    </style:style>
    <style:style style:name="P104" style:family="paragraph" style:parent-style-name="Text_20_body" style:list-style-name="L52">
      <style:paragraph-properties fo:margin-left="0in" fo:margin-right="0in" fo:margin-top="0in" fo:margin-bottom="0in" style:contextual-spacing="false" fo:text-indent="0in" style:auto-text-indent="false"/>
    </style:style>
    <style:style style:name="P105" style:family="paragraph" style:parent-style-name="Text_20_body" style:list-style-name="L52">
      <style:paragraph-properties fo:margin-left="0in" fo:margin-right="0in" fo:text-indent="0in" style:auto-text-indent="false"/>
    </style:style>
    <style:style style:name="P106" style:family="paragraph" style:parent-style-name="Text_20_body" style:list-style-name="L53">
      <style:paragraph-properties fo:margin-left="0in" fo:margin-right="0in" fo:margin-top="0in" fo:margin-bottom="0in" style:contextual-spacing="false" fo:text-indent="0in" style:auto-text-indent="false"/>
    </style:style>
    <style:style style:name="P107" style:family="paragraph" style:parent-style-name="Text_20_body" style:list-style-name="L53">
      <style:paragraph-properties fo:margin-left="0in" fo:margin-right="0in" fo:text-indent="0in" style:auto-text-indent="false"/>
    </style:style>
    <style:style style:name="P108" style:family="paragraph" style:parent-style-name="Text_20_body" style:list-style-name="L54">
      <style:paragraph-properties fo:margin-left="0in" fo:margin-right="0in" fo:margin-top="0in" fo:margin-bottom="0in" style:contextual-spacing="false" fo:text-indent="0in" style:auto-text-indent="false"/>
    </style:style>
    <style:style style:name="P109" style:family="paragraph" style:parent-style-name="Text_20_body" style:list-style-name="L54">
      <style:paragraph-properties fo:margin-left="0in" fo:margin-right="0in" fo:text-indent="0in" style:auto-text-indent="false"/>
    </style:style>
    <style:style style:name="P110" style:family="paragraph" style:parent-style-name="Text_20_body" style:list-style-name="L55">
      <style:paragraph-properties fo:margin-left="0in" fo:margin-right="0in" fo:margin-top="0in" fo:margin-bottom="0in" style:contextual-spacing="false" fo:text-indent="0in" style:auto-text-indent="false"/>
    </style:style>
    <style:style style:name="P111" style:family="paragraph" style:parent-style-name="Text_20_body" style:list-style-name="L55">
      <style:paragraph-properties fo:margin-left="0in" fo:margin-right="0in" fo:text-indent="0in" style:auto-text-indent="false"/>
    </style:style>
    <style:style style:name="P112" style:family="paragraph" style:parent-style-name="Text_20_body" style:list-style-name="L56">
      <style:paragraph-properties fo:margin-left="0in" fo:margin-right="0in" fo:margin-top="0in" fo:margin-bottom="0in" style:contextual-spacing="false" fo:text-indent="0in" style:auto-text-indent="false"/>
    </style:style>
    <style:style style:name="P113" style:family="paragraph" style:parent-style-name="Text_20_body" style:list-style-name="L56">
      <style:paragraph-properties fo:margin-left="0in" fo:margin-right="0in" fo:text-indent="0in" style:auto-text-indent="false"/>
    </style:style>
    <style:style style:name="P114" style:family="paragraph" style:parent-style-name="Text_20_body" style:list-style-name="L57">
      <style:paragraph-properties fo:margin-left="0in" fo:margin-right="0in" fo:margin-top="0in" fo:margin-bottom="0in" style:contextual-spacing="false" fo:text-indent="0in" style:auto-text-indent="false"/>
    </style:style>
    <style:style style:name="P115" style:family="paragraph" style:parent-style-name="Text_20_body" style:list-style-name="L57">
      <style:paragraph-properties fo:margin-left="0in" fo:margin-right="0in" fo:text-indent="0in" style:auto-text-indent="false"/>
    </style:style>
    <style:style style:name="P116" style:family="paragraph" style:parent-style-name="Text_20_body" style:list-style-name="L58">
      <style:paragraph-properties fo:margin-left="0in" fo:margin-right="0in" fo:margin-top="0in" fo:margin-bottom="0in" style:contextual-spacing="false" fo:text-indent="0in" style:auto-text-indent="false"/>
    </style:style>
    <style:style style:name="P117" style:family="paragraph" style:parent-style-name="Text_20_body" style:list-style-name="L58">
      <style:paragraph-properties fo:margin-left="0in" fo:margin-right="0in" fo:text-indent="0in" style:auto-text-indent="false"/>
    </style:style>
    <style:style style:name="P118" style:family="paragraph" style:parent-style-name="Text_20_body" style:list-style-name="L59">
      <style:paragraph-properties fo:margin-left="0in" fo:margin-right="0in" fo:margin-top="0in" fo:margin-bottom="0in" style:contextual-spacing="false" fo:text-indent="0in" style:auto-text-indent="false"/>
    </style:style>
    <style:style style:name="P119" style:family="paragraph" style:parent-style-name="Text_20_body" style:list-style-name="L59">
      <style:paragraph-properties fo:margin-left="0in" fo:margin-right="0in" fo:text-indent="0in" style:auto-text-indent="false"/>
    </style:style>
    <style:style style:name="P120" style:family="paragraph" style:parent-style-name="Text_20_body" style:list-style-name="L60">
      <style:paragraph-properties fo:margin-left="0in" fo:margin-right="0in" fo:margin-top="0in" fo:margin-bottom="0in" style:contextual-spacing="false" fo:text-indent="0in" style:auto-text-indent="false"/>
    </style:style>
    <style:style style:name="P121" style:family="paragraph" style:parent-style-name="Text_20_body" style:list-style-name="L60">
      <style:paragraph-properties fo:margin-left="0in" fo:margin-right="0in" fo:text-indent="0in" style:auto-text-indent="false"/>
    </style:style>
    <style:style style:name="P122" style:family="paragraph" style:parent-style-name="Text_20_body" style:list-style-name="L61">
      <style:paragraph-properties fo:margin-left="0in" fo:margin-right="0in" fo:margin-top="0in" fo:margin-bottom="0in" style:contextual-spacing="false" fo:text-indent="0in" style:auto-text-indent="false"/>
    </style:style>
    <style:style style:name="P123" style:family="paragraph" style:parent-style-name="Text_20_body" style:list-style-name="L61">
      <style:paragraph-properties fo:margin-left="0in" fo:margin-right="0in" fo:text-indent="0in" style:auto-text-indent="false"/>
    </style:style>
    <style:style style:name="P124" style:family="paragraph" style:parent-style-name="Text_20_body" style:list-style-name="L62">
      <style:paragraph-properties fo:margin-left="0in" fo:margin-right="0in" fo:text-indent="0in" style:auto-text-indent="false"/>
    </style:style>
    <style:style style:name="P125" style:family="paragraph" style:parent-style-name="Text_20_body" style:list-style-name="L63">
      <style:paragraph-properties fo:margin-left="0in" fo:margin-right="0in" fo:margin-top="0in" fo:margin-bottom="0in" style:contextual-spacing="false" fo:text-indent="0in" style:auto-text-indent="false"/>
    </style:style>
    <style:style style:name="P126" style:family="paragraph" style:parent-style-name="Text_20_body" style:list-style-name="L63">
      <style:paragraph-properties fo:margin-left="0in" fo:margin-right="0in" fo:text-indent="0in" style:auto-text-indent="false"/>
    </style:style>
    <style:style style:name="P127" style:family="paragraph" style:parent-style-name="Text_20_body" style:list-style-name="L64">
      <style:paragraph-properties fo:margin-left="0in" fo:margin-right="0in" fo:margin-top="0in" fo:margin-bottom="0in" style:contextual-spacing="false" fo:text-indent="0in" style:auto-text-indent="false"/>
    </style:style>
    <style:style style:name="P128" style:family="paragraph" style:parent-style-name="Text_20_body" style:list-style-name="L64">
      <style:paragraph-properties fo:margin-left="0in" fo:margin-right="0in" fo:text-indent="0in" style:auto-text-indent="false"/>
    </style:style>
    <style:style style:name="P129" style:family="paragraph" style:parent-style-name="Text_20_body" style:list-style-name="L65">
      <style:paragraph-properties fo:margin-left="0in" fo:margin-right="0in" fo:margin-top="0in" fo:margin-bottom="0in" style:contextual-spacing="false" fo:text-indent="0in" style:auto-text-indent="false"/>
    </style:style>
    <style:style style:name="P130" style:family="paragraph" style:parent-style-name="Text_20_body" style:list-style-name="L65">
      <style:paragraph-properties fo:margin-left="0in" fo:margin-right="0in" fo:text-indent="0in" style:auto-text-indent="false"/>
    </style:style>
    <style:style style:name="P131" style:family="paragraph" style:parent-style-name="Text_20_body" style:list-style-name="L66">
      <style:paragraph-properties fo:margin-left="0in" fo:margin-right="0in" fo:margin-top="0in" fo:margin-bottom="0in" style:contextual-spacing="false" fo:text-indent="0in" style:auto-text-indent="false"/>
    </style:style>
    <style:style style:name="P132" style:family="paragraph" style:parent-style-name="Text_20_body" style:list-style-name="L66">
      <style:paragraph-properties fo:margin-left="0in" fo:margin-right="0in" fo:text-indent="0in" style:auto-text-indent="false"/>
    </style:style>
    <style:style style:name="P133" style:family="paragraph" style:parent-style-name="Text_20_body" style:list-style-name="L67">
      <style:paragraph-properties fo:margin-left="0in" fo:margin-right="0in" fo:margin-top="0in" fo:margin-bottom="0in" style:contextual-spacing="false" fo:text-indent="0in" style:auto-text-indent="false"/>
    </style:style>
    <style:style style:name="P134" style:family="paragraph" style:parent-style-name="Text_20_body" style:list-style-name="L67">
      <style:paragraph-properties fo:margin-left="0in" fo:margin-right="0in" fo:text-indent="0in" style:auto-text-indent="false"/>
    </style:style>
    <style:style style:name="P135" style:family="paragraph" style:parent-style-name="Text_20_body" style:list-style-name="L68">
      <style:paragraph-properties fo:margin-left="0in" fo:margin-right="0in" fo:margin-top="0in" fo:margin-bottom="0in" style:contextual-spacing="false" fo:text-indent="0in" style:auto-text-indent="false"/>
    </style:style>
    <style:style style:name="P136" style:family="paragraph" style:parent-style-name="Text_20_body" style:list-style-name="L68">
      <style:paragraph-properties fo:margin-left="0in" fo:margin-right="0in" fo:text-indent="0in" style:auto-text-indent="false"/>
    </style:style>
    <style:style style:name="T1" style:family="text">
      <style:text-properties officeooo:rsid="001846cf"/>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ain-content">
        <text:p text:style-name="P4"><text:a xlink:type="simple" xlink:href="https://claude.ai/project/019d46b0-7d05-7550-bef5-972ad19bd2e9" text:style-name="Internet_20_link" text:visited-style-name="Visited_20_Internet_20_Link">ESPOCRM How To Guide</text:a>/</text:p>
        <text:p text:style-name="P5">Claude is responding</text:p>
        <text:h text:style-name="Heading_20_2" text:outline-level="2">I need to understand security in ESPOCRM</text:h>
        <text:p text:style-name="P9"/>
        <text:p text:style-name="P8">Two quick things before I dig in:</text:p>
        <text:list text:style-name="L1">
          <text:list-item>
            <text:p text:style-name="P10"><text:span text:style-name="Strong_20_Emphasis">CLAUDE.md</text:span>: Should I read the one in <text:span text:style-name="Source_20_Text">crmbuilder</text:span>, the one in <text:span text:style-name="Source_20_Text">ClevelandBusinessMentoring</text:span>, both, or neither for this session?</text:p>
          </text:list-item>
          <text:list-item>
            <text:p text:style-name="P10"><text:span text:style-name="Strong_20_Emphasis">Scope</text:span>: Security in EspoCRM is layered. Where do you want to start?</text:p>
            <text:list>
              <text:list-item>
                <text:p text:style-name="P10">The access control model end-to-end (Users → Teams → Roles → record/field permissions), top-down</text:p>
              </text:list-item>
              <text:list-item>
                <text:p text:style-name="P10">Just <text:span text:style-name="Strong_20_Emphasis">Roles</text:span> (the scope/level matrix, action permissions per entity)</text:p>
              </text:list-item>
              <text:list-item>
                <text:p text:style-name="P10">Just <text:span text:style-name="Strong_20_Emphasis">Teams</text:span> (record-level visibility, default teams, team-based assignment)</text:p>
              </text:list-item>
              <text:list-item>
                <text:p text:style-name="P10"><text:span text:style-name="Strong_20_Emphasis">Field-level</text:span> read/edit security</text:p>
              </text:list-item>
              <text:list-item>
                <text:p text:style-name="P10"><text:span text:style-name="Strong_20_Emphasis">Assignment permissions</text:span> (who can assign records to whom)</text:p>
              </text:list-item>
              <text:list-item>
                <text:p text:style-name="P10"><text:span text:style-name="Strong_20_Emphasis">Authentication</text:span> (passwords, 2FA, LDAP/OAuth/SAML, API keys)</text:p>
              </text:list-item>
              <text:list-item>
                <text:p text:style-name="P10"><text:span text:style-name="Strong_20_Emphasis">Portal users</text:span> and external access</text:p>
              </text:list-item>
              <text:list-item>
                <text:p text:style-name="P11">Something else specific (e.g., a CBM scenario you're trying to model)</text:p>
              </text:list-item>
            </text:list>
          </text:list-item>
        </text:list>
        <text:p text:style-name="P8">My instinct, given the CBM How-To Guide context, is to start with the access control model top-down so the pieces fit together, then drill into whichever layer matters most for CBM. But I'll wait for your direction.</text:p>
        <text:h text:style-name="Heading_20_2" text:outline-level="2">I don't know where to start.</text:h>
        <text:p text:style-name="P9">4:27 PM</text:p>
        <text:p text:style-name="P8">Fair enough — let me give you the mental model top-down. Once this clicks, the rest of EspoCRM security is just detail.</text:p>
        <text:h text:style-name="P2" text:outline-level="3">The question being answered</text:h>
        <text:p text:style-name="P8">EspoCRM security answers one question, over and over: <text:span text:style-name="Emphasis">can this user do this action on this record?</text:span> Four inputs determine the answer — who the user is, what teams they belong to, what roles they have, and what's on the record itself.</text:p>
        <text:p text:style-name="P8">One escape hatch worth flagging up front: <text:span text:style-name="Strong_20_Emphasis">System Administrators bypass all of this</text:span>. When you test permissions, never test as admin — you'll see everything regardless of how broken your config is. Create a test user and impersonate them, or test with a real non-admin account.</text:p>
        <text:h text:style-name="P2" text:outline-level="3">The three building blocks</text:h>
        <text:p text:style-name="P8"><text:span text:style-name="Strong_20_Emphasis">Users</text:span> are individuals. Each user has a primary team, optional additional teams, a default assigned user (usually themselves), and one or more roles. Users can also have a <text:span text:style-name="Emphasis">default team set</text:span> — any record they create is automatically stamped with those teams.</text:p>
        <text:p text:style-name="P8"><text:soft-page-break/><text:span text:style-name="Strong_20_Emphasis">Teams</text:span> are groupings. They do two jobs: (1) record-level access keys off them, and (2) roles can be attached to teams, so every team member inherits those roles. A user can belong to many teams, and a record can be assigned to many teams.</text:p>
        <text:p text:style-name="P8"><text:span text:style-name="Strong_20_Emphasis">Roles</text:span> are the permission definitions. A role is essentially a matrix: for each entity (Contact, Account, Meeting, your custom entities), what actions are allowed and at what level.</text:p>
        <text:h text:style-name="P2" text:outline-level="3">The action × level matrix — the core</text:h>
        <text:p text:style-name="P8">For every entity, a role defines five actions: <text:span text:style-name="Strong_20_Emphasis">Create, Read, Edit, Delete, Stream</text:span>. Create is binary yes/no. The other four each take one of four levels:</text:p>
        <text:list text:style-name="L2">
          <text:list-item>
            <text:p text:style-name="P12"><text:span text:style-name="Strong_20_Emphasis">All</text:span> — any record of this entity, regardless of team or ownership.</text:p>
          </text:list-item>
          <text:list-item>
            <text:p text:style-name="P12"><text:span text:style-name="Strong_20_Emphasis">Team</text:span> — only records where the user shares at least one team with the record.</text:p>
          </text:list-item>
          <text:list-item>
            <text:p text:style-name="P12"><text:span text:style-name="Strong_20_Emphasis">Own</text:span> — only records where the user is the <text:span text:style-name="Source_20_Text">assignedUser</text:span>.</text:p>
          </text:list-item>
          <text:list-item>
            <text:p text:style-name="P13"><text:span text:style-name="Strong_20_Emphasis">No</text:span> — never.</text:p>
          </text:list-item>
        </text:list>
        <text:p text:style-name="P8">So <text:span text:style-name="Source_20_Text">Read=Team, Edit=Own</text:span> on Contacts means "I see every Contact in my team's pipeline, but I can only edit ones assigned to me."</text:p>
        <text:p text:style-name="P8">When a user has multiple roles, <text:span text:style-name="Strong_20_Emphasis">EspoCRM takes the most permissive level across them</text:span>. Roles add up; they don't restrict each other. This catches people out — you can't use a second role to <text:span text:style-name="Emphasis">subtract</text:span> permissions, only to grant more.</text:p>
        <text:h text:style-name="P2" text:outline-level="3">Field-level security</text:h>
        <text:p text:style-name="P8">Beneath the entity-level matrix, you can lock down individual fields per role: read and edit, independently. Everyone might read a Contact, but only managers see the <text:span text:style-name="Source_20_Text">salaryExpectation</text:span> field. Field-level rules can only <text:span text:style-name="Emphasis">further restrict</text:span> what the entity-level matrix already permits — they can't grant access the entity-level denies.</text:p>
        <text:h text:style-name="P2" text:outline-level="3">Assignment permissions</text:h>
        <text:p text:style-name="P8">Separate axis from CRUD. Assignment permissions answer: "who can I set as <text:span text:style-name="Source_20_Text">assignedUser</text:span> on a record I'm creating or editing?" Options are All / Team / No. This matters whenever you have a delegation model — e.g. a coordinator can assign mentors to clients, but mentors can only assign records to themselves.</text:p>
        <text:h text:style-name="P2" text:outline-level="3">Portal users — parallel universe</text:h>
        <text:p text:style-name="P8">External users (a mentee logging into a self-service portal, say) live in a completely separate scheme: <text:span text:style-name="Strong_20_Emphasis">Portal Users + Portal Roles</text:span>, scoped to a specific <text:span text:style-name="Strong_20_Emphasis">Portal</text:span>. Structurally the role mechanics are the same, but they're configured in different places and don't share definitions with internal roles. Don't conflate the two.</text:p>
        <text:p text:style-name="Horizontal_20_Line"/>
        <text:p text:style-name="P8">That's the whole skeleton. The CBM-relevant places to drill in next, in the order they usually matter:</text:p>
        <text:list text:style-name="L3">
          <text:list-item>
            <text:p text:style-name="P14"><text:soft-page-break/><text:span text:style-name="Strong_20_Emphasis">Team structure for CBM</text:span> — should teams be per mentor-mentee pairing, per program cohort, per staff function, or some mix? This decision drives most of the rest.</text:p>
          </text:list-item>
          <text:list-item>
            <text:p text:style-name="P14"><text:span text:style-name="Strong_20_Emphasis">Role inventory</text:span> — at minimum you'll need Staff, Mentor, Portal-Mentee, Admin. What does each see and edit?</text:p>
          </text:list-item>
          <text:list-item>
            <text:p text:style-name="P14"><text:span text:style-name="Strong_20_Emphasis">Default Team Set mechanics</text:span> — exactly how records get auto-stamped with teams at creation, and what that means for workflow design.</text:p>
          </text:list-item>
          <text:list-item>
            <text:p text:style-name="P15"><text:span text:style-name="Strong_20_Emphasis">Concrete walk-through</text:span> — pick one entity (e.g. Contact or a CBM-specific entity) and we trace exactly how a Mentor's view differs from a Staff's.</text:p>
          </text:list-item>
        </text:list>
        <text:p text:style-name="P8">My recommendation: start with #4, because abstract permission talk gets slippery fast. Pick the entity that's central to CBM's daily work and we'll walk through who sees what, then back into the team and role structures that produce that result. Which entity? <text:span text:style-name="Emphasis">(Contact? Mentee? Session?)</text:span></text:p>
        <text:h text:style-name="Heading_20_2" text:outline-level="2"><text:span text:style-name="T1">Lets go with option </text:span>4</text:h>
        <text:p text:style-name="P9">4:31 PM</text:p>
        <text:p text:style-name="P8">Pick the entity and I'll build the walk-through around it. Three good candidates given what's central to CBM's daily work:</text:p>
        <text:p text:style-name="P8"><text:span text:style-name="Strong_20_Emphasis">Contact</text:span> — foundational, but it's a mixed bag at CBM (mentors, mentees, prospects, donors all live here). Security gets interesting because different roles need to see different <text:span text:style-name="Emphasis">subsets</text:span> of Contacts.</text:p>
        <text:p text:style-name="P8"><text:span text:style-name="Strong_20_Emphasis">Meeting</text:span> (1:1 sessions and group sessions) — high daily traffic, natural team-based visibility (a mentor sees their own sessions; staff see all sessions in a program), and it ties directly to the Zoom integration work.</text:p>
        <text:p text:style-name="P8"><text:span text:style-name="Strong_20_Emphasis">Notes</text:span> (your custom entity in design) — richest for security because of the sensitivity gradient: some notes are private staff observations about a mentee, some are shared between mentor and staff, some are visible to the mentee. Also actively in design, so the walk-through would directly inform decisions you're about to make.</text:p>
        <text:p text:style-name="P8">My recommendation: <text:span text:style-name="Strong_20_Emphasis">Notes</text:span>. The security model has to handle the broadest range of visibility patterns, so once you can express Notes correctly in EspoCRM's role/team model, everything else is easier. And it answers questions you'll need answered soon anyway.</text:p>
        <text:p text:style-name="P8">Confirm Notes, or pick Contact / Meeting / something else.</text:p>
        <text:h text:style-name="Heading_20_2" text:outline-level="2">notes</text:h>
        <text:p text:style-name="P9">4:36 PM</text:p>
        <text:p text:style-name="P9">Architected concrete Notes security walkthrough with realistic CBM scenarios</text:p>
        <text:p text:style-name="P8">Architected concrete Notes security walkthrough with realistic CBM scenarios</text:p>
        <text:p text:style-name="P8">Good pick. Here's the walk-through. I'll use a working assumption for team structure so the example stays concrete — flagged below so you can revisit it later.</text:p>
        <text:h text:style-name="P2" text:outline-level="3"><text:soft-page-break/>Working assumption: team structure</text:h>
        <text:p text:style-name="P8">For this walk-through, CBM has two kinds of teams:</text:p>
        <text:list text:style-name="L4">
          <text:list-item>
            <text:p text:style-name="P16"><text:span text:style-name="Strong_20_Emphasis">Staff</text:span> — one team, contains every CBM staff member.</text:p>
          </text:list-item>
          <text:list-item>
            <text:p text:style-name="P17"><text:span text:style-name="Strong_20_Emphasis">Pairing teams</text:span> — one team per active mentor-mentee pairing, e.g. "Pairing: Jane Smith ↔ Bob Jones." Members are the mentor, the assigned staff coordinator, and any others involved.</text:p>
          </text:list-item>
        </text:list>
        <text:p text:style-name="P8">This is a clean model but it's a <text:span text:style-name="Emphasis">decision</text:span>, not a given. We'll revisit "is pairing-per-team the right grain" separately.</text:p>
        <text:h text:style-name="P2" text:outline-level="3">The cast</text:h>
        <text:list text:style-name="L5">
          <text:list-item>
            <text:p text:style-name="P18"><text:span text:style-name="Strong_20_Emphasis">Jane Smith</text:span> — volunteer mentor. In team <text:span text:style-name="Source_20_Text">Pairing: Jane ↔ Bob</text:span> only.</text:p>
          </text:list-item>
          <text:list-item>
            <text:p text:style-name="P18"><text:span text:style-name="Strong_20_Emphasis">Carlos Reyes</text:span> — staff coordinator on this pairing. In team <text:span text:style-name="Source_20_Text">Staff</text:span> and team <text:span text:style-name="Source_20_Text">Pairing: Jane ↔ Bob</text:span>.</text:p>
          </text:list-item>
          <text:list-item>
            <text:p text:style-name="P18"><text:span text:style-name="Strong_20_Emphasis">Priya Patel</text:span> — staff coordinator on a <text:span text:style-name="Emphasis">different</text:span> pairing. In team <text:span text:style-name="Source_20_Text">Staff</text:span> and team <text:span text:style-name="Source_20_Text">Pairing: Priya ↔ someone else</text:span>.</text:p>
          </text:list-item>
          <text:list-item>
            <text:p text:style-name="P19"><text:span text:style-name="Strong_20_Emphasis">Bob Jones</text:span> — the mentee, portal user. Set aside for now; covered at the end.</text:p>
          </text:list-item>
        </text:list>
        <text:h text:style-name="P2" text:outline-level="3">The three Notes we want to control</text:h>
        <text:p text:style-name="P8">Each Note has a <text:span text:style-name="Source_20_Text">teams</text:span> field (which teams can see it) and an <text:span text:style-name="Source_20_Text">assignedUser</text:span> (the author/own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Note</text:p>
              </table:table-cell>
              <table:table-cell table:style-name="Table1.A1" office:value-type="string">
                <text:p text:style-name="P7">Author</text:p>
              </table:table-cell>
              <table:table-cell table:style-name="Table1.A1" office:value-type="string">
                <text:p text:style-name="P7">Content</text:p>
              </table:table-cell>
              <table:table-cell table:style-name="Table1.A1" office:value-type="string">
                <text:p text:style-name="P7">Should be visible to</text:p>
              </table:table-cell>
            </table:table-row>
          </table:table-header-rows>
          <table:table-row>
            <table:table-cell table:style-name="Table1.A1" office:value-type="string">
              <text:p text:style-name="P6"><text:span text:style-name="Strong_20_Emphasis">A</text:span></text:p>
            </table:table-cell>
            <table:table-cell table:style-name="Table1.A1" office:value-type="string">
              <text:p text:style-name="P6">Jane (mentor)</text:p>
            </table:table-cell>
            <table:table-cell table:style-name="Table1.A1" office:value-type="string">
              <text:p text:style-name="P6">"Discussed Bob's business plan revisions"</text:p>
            </table:table-cell>
            <table:table-cell table:style-name="Table1.A1" office:value-type="string">
              <text:p text:style-name="P6">Jane, Carlos, other staff if needed</text:p>
            </table:table-cell>
          </table:table-row>
          <table:table-row>
            <table:table-cell table:style-name="Table1.A1" office:value-type="string">
              <text:p text:style-name="P6"><text:span text:style-name="Strong_20_Emphasis">B</text:span></text:p>
            </table:table-cell>
            <table:table-cell table:style-name="Table1.A1" office:value-type="string">
              <text:p text:style-name="P6">Carlos (staff)</text:p>
            </table:table-cell>
            <table:table-cell table:style-name="Table1.A1" office:value-type="string">
              <text:p text:style-name="P6">"Bob disclosed financial hardship — consider pausing intensives"</text:p>
            </table:table-cell>
            <table:table-cell table:style-name="Table1.A1" office:value-type="string">
              <text:p text:style-name="P6">Carlos, other staff. <text:span text:style-name="Strong_20_Emphasis">Not Jane.</text:span></text:p>
            </table:table-cell>
          </table:table-row>
          <table:table-row>
            <table:table-cell table:style-name="Table1.A1" office:value-type="string">
              <text:p text:style-name="P6"><text:span text:style-name="Strong_20_Emphasis">C</text:span></text:p>
            </table:table-cell>
            <table:table-cell table:style-name="Table1.A1" office:value-type="string">
              <text:p text:style-name="P6">Carlos (staff)</text:p>
            </table:table-cell>
            <table:table-cell table:style-name="Table1.A1" office:value-type="string">
              <text:p text:style-name="P6">"Bob hit Q1 milestone — share at next session"</text:p>
            </table:table-cell>
            <table:table-cell table:style-name="Table1.A1" office:value-type="string">
              <text:p text:style-name="Table_20_Contents">Jane, Carlos, all staff, eventually Bob</text:p>
            </table:table-cell>
          </table:table-row>
        </table:table>
        <text:p text:style-name="P8">The interesting one is <text:span text:style-name="Strong_20_Emphasis">B</text:span>. Carlos shares a team with Jane (<text:span text:style-name="Source_20_Text">Pairing: Jane ↔ Bob</text:span>). How do we keep Note B from her?</text:p>
        <text:h text:style-name="P2" text:outline-level="3">The mechanism</text:h>
        <text:p text:style-name="P8">Two levers do all the work:</text:p>
        <text:list text:style-name="L6">
          <text:list-item>
            <text:p text:style-name="P20"><text:span text:style-name="Strong_20_Emphasis">The role's Notes matrix</text:span> — what level of access each role gets generally.</text:p>
          </text:list-item>
          <text:list-item>
            <text:p text:style-name="P21"><text:span text:style-name="Strong_20_Emphasis">The </text:span><text:span text:style-name="Strong_20_Emphasis"><text:span text:style-name="Source_20_Text">teams</text:span></text:span><text:span text:style-name="Strong_20_Emphasis"> field on each Note record</text:span> — which teams' members can apply that access to <text:span text:style-name="Emphasis">this specific</text:span> note.</text:p>
          </text:list-item>
        </text:list>
        <text:p text:style-name="P8">Here's a workable role config:</text:p>
        <text:p text:style-name="P8"><text:span text:style-name="Strong_20_Emphasis">Staff Role</text:span>, Notes entity:</text:p>
        <text:list text:style-name="L7">
          <text:list-item>
            <text:p text:style-name="P22">Create: ✓</text:p>
          </text:list-item>
          <text:list-item>
            <text:p text:style-name="P22">Read: <text:span text:style-name="Strong_20_Emphasis">All</text:span> <text:span text:style-name="Emphasis">(or Team if you want staff to only see notes for pairings they touch — for CBM probably All)</text:span></text:p>
          </text:list-item>
          <text:list-item>
            <text:p text:style-name="P22"><text:soft-page-break/>Edit: <text:span text:style-name="Strong_20_Emphasis">Own</text:span></text:p>
          </text:list-item>
          <text:list-item>
            <text:p text:style-name="P22">Delete: <text:span text:style-name="Strong_20_Emphasis">Own</text:span></text:p>
          </text:list-item>
          <text:list-item>
            <text:p text:style-name="P23">Stream: All</text:p>
          </text:list-item>
        </text:list>
        <text:p text:style-name="P8"><text:span text:style-name="Strong_20_Emphasis">Mentor Role</text:span>, Notes entity:</text:p>
        <text:list text:style-name="L8">
          <text:list-item>
            <text:p text:style-name="P24">Create: ✓</text:p>
          </text:list-item>
          <text:list-item>
            <text:p text:style-name="P24">Read: <text:span text:style-name="Strong_20_Emphasis">Team</text:span></text:p>
          </text:list-item>
          <text:list-item>
            <text:p text:style-name="P24">Edit: <text:span text:style-name="Strong_20_Emphasis">Own</text:span></text:p>
          </text:list-item>
          <text:list-item>
            <text:p text:style-name="P24">Delete: <text:span text:style-name="Strong_20_Emphasis">Own</text:span></text:p>
          </text:list-item>
          <text:list-item>
            <text:p text:style-name="P25">Stream: Team</text:p>
          </text:list-item>
        </text:list>
        <text:p text:style-name="P8">Now watch what happens, given how the records get <text:span text:style-name="Emphasis">stamped</text:span> with teams:</text:p>
        <text:list text:style-name="L9">
          <text:list-item>
            <text:p text:style-name="P26"><text:span text:style-name="Strong_20_Emphasis">Note A</text:span> gets <text:span text:style-name="Source_20_Text">teams = [Pairing: Jane ↔ Bob]</text:span>, <text:span text:style-name="Source_20_Text">assignedUser = Jane</text:span>. Jane sees it (Team match). Carlos sees it (Team match, he's in the pairing team). Priya doesn't see it — she's not in that pairing team and her role is Read=All only because she's <text:span text:style-name="Emphasis">Staff</text:span>... wait, that breaks. Let me re-check.</text:p>
          </text:list-item>
        </text:list>
        <text:p text:style-name="P8">Actually with Staff Role = Read=All, Priya <text:span text:style-name="Emphasis">would</text:span> see Note A. If that's not what you want, Staff = Read=Team is the answer, and staff need to be added to the relevant pairing teams to see those notes. That's a real CBM decision: <text:span text:style-name="Strong_20_Emphasis">do all staff see all notes by default, or only notes for pairings they're attached to?</text:span> Park that — it's a downstream consequence.</text:p>
        <text:p text:style-name="P8">Assuming Staff = Read=All for simplicity:</text:p>
        <text:list text:style-name="L10">
          <text:list-item>
            <text:p text:style-name="P27"><text:span text:style-name="Strong_20_Emphasis">Note A</text:span> (<text:span text:style-name="Source_20_Text">teams = [Pairing: Jane ↔ Bob]</text:span>) — Jane sees it (Team match on the pairing). All staff see it (Read=All).</text:p>
          </text:list-item>
          <text:list-item>
            <text:p text:style-name="P27"><text:span text:style-name="Strong_20_Emphasis">Note B</text:span> (<text:span text:style-name="Source_20_Text">teams = [Staff]</text:span> only — <text:span text:style-name="Emphasis">not</text:span> the pairing team) — Jane does <text:span text:style-name="Emphasis">not</text:span> see it (no team match, and her role is Read=Team only). All staff see it.</text:p>
          </text:list-item>
          <text:list-item>
            <text:p text:style-name="P28"><text:span text:style-name="Strong_20_Emphasis">Note C</text:span> (<text:span text:style-name="Source_20_Text">teams = [Pairing: Jane ↔ Bob, Staff]</text:span>) — Jane sees it. All staff see it. Bob doesn't see it yet (different system — see portal section).</text:p>
          </text:list-item>
        </text:list>
        <text:h text:style-name="P2" text:outline-level="3">The "aha"</text:h>
        <text:p text:style-name="P8"><text:span text:style-name="Strong_20_Emphasis">The </text:span><text:span text:style-name="Strong_20_Emphasis"><text:span text:style-name="Source_20_Text">teams</text:span></text:span><text:span text:style-name="Strong_20_Emphasis"> field on a record is the access control knob.</text:span> Staff using EspoCRM aren't really thinking about "permissions" when they write Note B — they're thinking about <text:span text:style-name="Emphasis">which teams should this note be visible to?</text:span> and choosing accordingly. The role config sets the ceiling; the per-record team assignment decides who actually gets in.</text:p>
        <text:p text:style-name="P8">This means two operational requirements:</text:p>
        <text:list text:style-name="L11">
          <text:list-item>
            <text:p text:style-name="P29"><text:span text:style-name="Strong_20_Emphasis">Staff need training</text:span> on what teams to attach to sensitive notes. Default Team Set on a user only helps for the <text:span text:style-name="Emphasis">common</text:span> case; sensitive notes need conscious choice.</text:p>
          </text:list-item>
          <text:list-item>
            <text:p text:style-name="P30"><text:span text:style-name="Strong_20_Emphasis">You probably want a workflow or validation</text:span> that catches the easy mistake — e.g. a Note flagged as "Confidential" should not have any pairing teams attached, only <text:span text:style-name="Source_20_Text">Staff</text:span>. Worth a downstream decision.</text:p>
          </text:list-item>
        </text:list>
        <text:h text:style-name="P2" text:outline-level="3"><text:soft-page-break/>Where field-level security adds something</text:h>
        <text:p text:style-name="P8">The above handles <text:span text:style-name="Emphasis">whole-record</text:span> visibility. Field-level is for when everyone can see the record but some fields are restricted. Example: a Note has a <text:span text:style-name="Source_20_Text">confidentialFlag</text:span> field, and you want only staff to be able to <text:span text:style-name="Emphasis">set</text:span> that flag (not mentors). Field-level edit permission on <text:span text:style-name="Source_20_Text">confidentialFlag</text:span> for the Mentor Role = No solves it. Field-level doesn't help with Note B — that's whole-record hiding, which is the teams mechanism.</text:p>
        <text:h text:style-name="P2" text:outline-level="3">Bob the mentee — portal side</text:h>
        <text:p text:style-name="P8">Bob isn't an internal user. He logs into a portal. His access is governed by a <text:span text:style-name="Strong_20_Emphasis">Portal Role</text:span>, configured separately. A typical setup:</text:p>
        <text:list text:style-name="L12">
          <text:list-item>
            <text:p text:style-name="P31">Bob is linked to a Contact record (his own).</text:p>
          </text:list-item>
          <text:list-item>
            <text:p text:style-name="P31">Portal Role gives Read=Own (or Team, depending) on Notes.</text:p>
          </text:list-item>
          <text:list-item>
            <text:p text:style-name="P32">Notes you want Bob to see get him added either via the <text:span text:style-name="Source_20_Text">assignedUser</text:span>, a portal-team mechanism, or a direct relationship to his Contact.</text:p>
          </text:list-item>
        </text:list>
        <text:p text:style-name="P8">This is enough complexity that I'll save the portal walk-through for its own pass — but the headline is: <text:span text:style-name="Strong_20_Emphasis">mentee visibility is a parallel system, configured separately, and you should not try to make internal team-based logic reach him.</text:span></text:p>
        <text:p text:style-name="Horizontal_20_Line"/>
        <text:h text:style-name="P2" text:outline-level="3">Summary in one paragraph</text:h>
        <text:p text:style-name="P8">Roles define the ceiling — what <text:span text:style-name="Emphasis">kinds</text:span> of access a user could have to Notes. Teams on each Note record decide who actually gets in. Field-level locks down specific fields within an otherwise-visible record. Portal users live in their own parallel role system.</text:p>
        <text:p text:style-name="Horizontal_20_Line"/>
        <text:p text:style-name="P8"><text:span text:style-name="Strong_20_Emphasis">Next step options:</text:span></text:p>
        <text:list text:style-name="L13">
          <text:list-item>
            <text:p text:style-name="P33"><text:span text:style-name="Strong_20_Emphasis">Capture this in the CBM How-To guide</text:span> under a new "Security model" section, with the three-Notes example as the worked illustration.</text:p>
          </text:list-item>
          <text:list-item>
            <text:p text:style-name="P33"><text:span text:style-name="Strong_20_Emphasis">Decide CBM's team structure</text:span> for real (pairing-per-team vs. cohort vs. hybrid) now that you've seen how teams drive everything.</text:p>
          </text:list-item>
          <text:list-item>
            <text:p text:style-name="P33"><text:span text:style-name="Strong_20_Emphasis">Decide the Staff Read level</text:span> (All vs. Team) — the open question I parked above.</text:p>
          </text:list-item>
          <text:list-item>
            <text:p text:style-name="P34"><text:span text:style-name="Strong_20_Emphasis">Move on to a different entity</text:span> (Meeting, Contact) using the same pattern.</text:p>
          </text:list-item>
        </text:list>
        <text:p text:style-name="P8">My recommendation: <text:span text:style-name="Strong_20_Emphasis">#1 first</text:span> while it's fresh, then <text:span text:style-name="Strong_20_Emphasis">#2</text:span>. Confirm and I'll draft the How-To section.</text:p>
        <text:h text:style-name="Heading_20_2" text:outline-level="2">never mind... Let me give you a scenario and you best explain how to use it.</text:h>
        <text:p text:style-name="P9">4:40 PM</text:p>
        <text:p text:style-name="P8">Go ahead — describe the scenario. Who the users are, what they should and shouldn't see/do, and which entities are involved. I'll work out the role + team configuration to produce that outcome.</text:p>
        <text:h text:style-name="Heading_20_2" text:outline-level="2"><text:soft-page-break/>We have a typical entity: Company. However, we have some types of companies that we need to collect sensitive information, so we create a second entity called company_sensitive. We link the two records with a One-To-One relationship. We want all users to see all company base records. and we want to assign the right to see the sensitive information to a few individuals. Each company with sensitive information may have different users who can see it.</text:h>
        <text:p text:style-name="P9">4:44 PM</text:p>
        <text:p text:style-name="P8">Good scenario — and the architecture decision you've already made (splitting into a separate entity) is the right one. Let me verify EspoCRM's mechanism specifics before I commit to a recommendation.</text:p>
        <text:p text:style-name="P9">Validated architecture and synthesized Collaborators feature solution</text:p>
        <text:p text:style-name="P8">Validated architecture and synthesized Collaborators feature solution</text:p>
        <text:p text:style-name="P8">Confirmed — EspoCRM has exactly the right primitive for this scenario, and I want to give you the concrete answer.</text:p>
        <text:h text:style-name="P2" text:outline-level="3">The architecture decision is correct</text:h>
        <text:p text:style-name="P8">Splitting into a separate <text:span text:style-name="Source_20_Text">CompanySensitive</text:span> entity is the <text:span text:style-name="Emphasis">necessary</text:span> move. EspoCRM's field-level security is per-role, not per-record — you cannot say "User X sees the <text:span text:style-name="Source_20_Text">bankBalance</text:span> field on Acme but not on Beta." Splitting converts an unsolvable field-level-per-record problem into a solvable record-level problem.</text:p>
        <text:h text:style-name="P2" text:outline-level="3">The right mechanism: Collaborators</text:h>
        <text:p text:style-name="P8">EspoCRM 9 introduced a feature called <text:span text:style-name="Strong_20_Emphasis">Collaborators</text:span> that fits your "different users for different records" requirement exactly. Here's how it works:</text:p>
        <text:p text:style-name="P8"><text:span text:style-name="Strong_20_Emphasis">Enabling it</text:span> — In Entity Manager for <text:span text:style-name="Source_20_Text">CompanySensitive</text:span>, enable Collaborators. This automatically creates a link-multiple field called Collaborators and a "Shared" bool filter. The admin then needs to add the Collaborators field to the side panel layout (Administration &gt; Entity Manager &gt; CompanySensitive &gt; Layouts &gt; Side Panel Fields). This last step catches people out — if you skip it, the feature works but nobody can see the field to manage it. <text:a xlink:type="simple" xlink:href="https://github.com/espocrm/espocrm/issues/3190" office:target-frame-name="_blank" xlink:show="new" text:style-name="Internet_20_link" text:visited-style-name="Visited_20_Internet_20_Link">GitHub</text:a></text:p>
        <text:p text:style-name="P8"><text:span text:style-name="Strong_20_Emphasis">What it grants</text:span> — Users added as collaborators get read and stream access to the record, provided their role's access level for that entity is something other than "no". Important nuance: Collaborators grants <text:span text:style-name="Strong_20_Emphasis">read access, not edit access</text:span>. So a collaborator can <text:span text:style-name="Emphasis">see</text:span> a <text:span text:style-name="Source_20_Text">CompanySensitive</text:span> record but not modify it unless they get edit rights another way. <text:a xlink:type="simple" xlink:href="https://github.com/espocrm/espocrm/issues/3190" office:target-frame-name="_blank" xlink:show="new" text:style-name="Internet_20_link" text:visited-style-name="Visited_20_Internet_20_Link">GitHub</text:a></text:p>
        <text:p text:style-name="P8"><text:span text:style-name="Strong_20_Emphasis">Auto-behaviors</text:span> — The creator of a record is auto-added as a collaborator, and the assigned user is automatically added too, so reassigning a record doesn't accidentally cut off the previous owner. <text:a xlink:type="simple" xlink:href="https://github.com/espocrm/documentation/blob/master/docs/administration/roles-management.md" office:target-frame-name="_blank" xlink:show="new" text:style-name="Internet_20_link" text:visited-style-name="Visited_20_Internet_20_Link">GitHub</text:a></text:p>
        <text:p text:style-name="P8"><text:span text:style-name="Strong_20_Emphasis">Constraints</text:span> — Adding a user as a collaborator requires the adder to have Assignment Permission and edit access to the record. Portal users cannot be added as collaborators. <text:a xlink:type="simple" xlink:href="https://github.com/espocrm/documentation/blob/master/docs/administration/roles-management.md" office:target-frame-name="_blank" xlink:show="new" text:style-name="Internet_20_link" text:visited-style-name="Visited_20_Internet_20_Link">GitHub</text:a></text:p>
        <text:h text:style-name="P2" text:outline-level="3"><text:soft-page-break/>Concrete role configuration</text:h>
        <text:p text:style-name="P8"><text:span text:style-name="Strong_20_Emphasis">General User Role</text:span> (everyone):</text:p>
        <text:list text:style-name="L14">
          <text:list-item>
            <text:p text:style-name="P35"><text:span text:style-name="Source_20_Text">Company</text:span>: Read = <text:span text:style-name="Strong_20_Emphasis">All</text:span>, Edit/Create/Delete per your normal rules</text:p>
          </text:list-item>
          <text:list-item>
            <text:p text:style-name="P36"><text:span text:style-name="Source_20_Text">CompanySensitive</text:span>: Read = <text:span text:style-name="Strong_20_Emphasis">Own</text:span>, Edit = No, Create = No, Delete = No</text:p>
          </text:list-item>
        </text:list>
        <text:p text:style-name="P8">That <text:span text:style-name="Source_20_Text">Read = Own</text:span> is the key. Combined with the Collaborators feature, a user gets read access to a <text:span text:style-name="Source_20_Text">CompanySensitive</text:span> record only if they are the assigned user <text:span text:style-name="Emphasis">or</text:span> listed as a collaborator. For every other sensitive record, they see nothing — not even the existence in list views.</text:p>
        <text:p text:style-name="P8"><text:span text:style-name="Strong_20_Emphasis">Sensitive Info Coordinator Role</text:span> (the few people who can manage all sensitive records — set up access, edit data):</text:p>
        <text:list text:style-name="L15">
          <text:list-item>
            <text:p text:style-name="P37"><text:span text:style-name="Source_20_Text">CompanySensitive</text:span>: Read = All, Edit = All, Create = Yes, Delete = All, Stream = All</text:p>
          </text:list-item>
          <text:list-item>
            <text:p text:style-name="P38">Plus Assignment Permission = at least Team (required to add collaborators)</text:p>
          </text:list-item>
        </text:list>
        <text:p text:style-name="P8">Coordinators see every <text:span text:style-name="Source_20_Text">CompanySensitive</text:span> record, can populate the data, and decide who else gets to see it by editing the Collaborators field.</text:p>
        <text:h text:style-name="P2" text:outline-level="3">If authorized users also need to <text:span text:style-name="Emphasis">edit</text:span> sensitive info</text:h>
        <text:p text:style-name="P8">Collaborators alone grants read-only. If a few designated users per company need to actively maintain sensitive data, you have two options:</text:p>
        <text:list text:style-name="L16">
          <text:list-item>
            <text:p text:style-name="P39"><text:span text:style-name="Strong_20_Emphasis">Make them the assigned user</text:span> of that specific <text:span text:style-name="Source_20_Text">CompanySensitive</text:span> record. Their role's Edit = Own then lets them edit it. Limitation: one assigned user per record.</text:p>
          </text:list-item>
          <text:list-item>
            <text:p text:style-name="P40"><text:span text:style-name="Strong_20_Emphasis">Enable the Multiple Assigned Users feature</text:span> on <text:span text:style-name="Source_20_Text">CompanySensitive</text:span> (separate from Collaborators — it's a different Entity Manager toggle). This replaces the single <text:span text:style-name="Source_20_Text">assignedUser</text:span> with an <text:span text:style-name="Source_20_Text">assignedUsers</text:span> link-multiple. All assigned users get Own-level access, including edit if the role allows. Better fit if multiple people need edit rights per record.</text:p>
          </text:list-item>
        </text:list>
        <text:p text:style-name="P8">If you just need different <text:span text:style-name="Emphasis">viewers</text:span> per record — and a small coordinator group does the editing — stick with plain Collaborators.</text:p>
        <text:h text:style-name="P2" text:outline-level="3">Operational considerations</text:h>
        <text:p text:style-name="P8"><text:span text:style-name="Strong_20_Emphasis">Who manages the collaborator list?</text:span> The Coordinator role above, in practice. They open a <text:span text:style-name="Source_20_Text">CompanySensitive</text:span> record and add the right users to the Collaborators field. This is a manual, deliberate act per record, which is appropriate for sensitive-data access decisions.</text:p>
        <text:p text:style-name="P8"><text:span text:style-name="Strong_20_Emphasis">Relationship visibility from Company side.</text:span> When User X views a Company record they don't have sensitive access to, the related-records panel for <text:span text:style-name="Source_20_Text">CompanySensitive</text:span> will show its header but no linked record will appear (or the panel will be empty). The <text:span text:style-name="Emphasis">existence</text:span> of a sensitive record is somewhat leaked through the panel header. If you want to fully hide that, either omit the panel from the side layout for non-Coordinators (via different layouts per role) or live with the small leak. Worth a small test to confirm exactly what non-authorized users see.</text:p>
        <text:p text:style-name="P8"><text:soft-page-break/><text:span text:style-name="Strong_20_Emphasis">Audit trail.</text:span> Stream on <text:span text:style-name="Source_20_Text">CompanySensitive</text:span> will record who was added/removed as a collaborator over time, giving you an audit trail of access grants. Worth keeping Stream enabled for this reason.</text:p>
        <text:p text:style-name="Horizontal_20_Line"/>
        <text:h text:style-name="P2" text:outline-level="3">One thing to confirm</text:h>
        <text:p text:style-name="P8"><text:span text:style-name="Strong_20_Emphasis">Do users granted access to a </text:span><text:span text:style-name="Strong_20_Emphasis"><text:span text:style-name="Source_20_Text">CompanySensitive</text:span></text:span><text:span text:style-name="Strong_20_Emphasis"> record need to </text:span><text:span text:style-name="Strong_20_Emphasis"><text:span text:style-name="Emphasis">edit</text:span></text:span><text:span text:style-name="Strong_20_Emphasis"> it, or only </text:span><text:span text:style-name="Strong_20_Emphasis"><text:span text:style-name="Emphasis">view</text:span></text:span><text:span text:style-name="Strong_20_Emphasis"> it?</text:span></text:p>
        <text:list text:style-name="L17">
          <text:list-item>
            <text:p text:style-name="P41"><text:span text:style-name="Strong_20_Emphasis">View only</text:span> → plain Collaborators. Coordinators handle all editing.</text:p>
          </text:list-item>
          <text:list-item>
            <text:p text:style-name="P42"><text:span text:style-name="Strong_20_Emphasis">Edit too</text:span> → enable Multiple Assigned Users on the entity instead of (or in addition to) Collaborators.</text:p>
          </text:list-item>
        </text:list>
        <text:p text:style-name="P8">Tell me which, and I'll lock in the final role + entity configuration and we can capture this pattern in the How-To guide as "Per-Record Sensitive Data Pattern."</text:p>
        <text:h text:style-name="Heading_20_2" text:outline-level="2">Any user who is allowed to access the sensitive record can edit the information. We would prefer not to leak the fact that there is sensitive information. Please expand on how we can make the panel not appear if the user does not have access to the data?</text:h>
        <text:p text:style-name="P9">5:02 PM</text:p>
        <text:p text:style-name="P8">Good — both questions have distinct answers. Let me handle them in order, then bring them together.</text:p>
        <text:p text:style-name="P8">Let me check what EspoCRM supports for conditional panel visibility before I commit.</text:p>
        <text:p text:style-name="P9">Synthesized role-based field security and access control strategies</text:p>
        <text:p text:style-name="P8">Synthesized role-based field security and access control strategies</text:p>
        <text:p text:style-name="P8">Both questions have clean answers. Putting it all together:</text:p>
        <text:h text:style-name="P2" text:outline-level="3">Edit access for authorized users → Multiple Assigned Users</text:h>
        <text:p text:style-name="P8">Since access-equals-edit, <text:span text:style-name="Strong_20_Emphasis">Collaborators is the wrong tool</text:span> (it grants read-only). The right tool is <text:span text:style-name="Strong_20_Emphasis">Multiple Assigned Users</text:span>, which you enable per-entity in Entity Manager. This replaces the single <text:span text:style-name="Source_20_Text">assignedUser</text:span> field with a multi-user <text:span text:style-name="Source_20_Text">assignedUsers</text:span> field. Every user in that list gets Own-level access to the record — read <text:span text:style-name="Emphasis">and</text:span> edit, governed by the role's Own-level settings.</text:p>
        <text:p text:style-name="P8">So the role for "any user who might be granted access to sensitive records":</text:p>
        <text:list text:style-name="L18">
          <text:list-item>
            <text:p text:style-name="P43"><text:span text:style-name="Source_20_Text">CompanySensitive</text:span>: Read = <text:span text:style-name="Strong_20_Emphasis">Own</text:span>, Edit = <text:span text:style-name="Strong_20_Emphasis">Own</text:span>, Delete = Own (or No), Create = No</text:p>
          </text:list-item>
        </text:list>
        <text:p text:style-name="P8">Granting access to a specific company's sensitive record = adding the user to that record's <text:span text:style-name="Source_20_Text">assignedUsers</text:span>.</text:p>
        <text:h text:style-name="P2" text:outline-level="3">Hiding the panel → field-level security on the link</text:h>
        <text:p text:style-name="P8">This is the central trick. EspoCRM lets you set field-level read access on <text:span text:style-name="Strong_20_Emphasis">link fields</text:span>, not just regular fields. So the relationship between Company and CompanySensitive (the <text:span text:style-name="Source_20_Text">companySensitive</text:span> link field on Company) can itself be hidden per role.</text:p>
        <text:p text:style-name="P8"><text:soft-page-break/>When a role has field-level read = No on that link:</text:p>
        <text:list text:style-name="L19">
          <text:list-item>
            <text:p text:style-name="P44">The relationship panel on the Company detail view does not render at all (no header, no empty state)</text:p>
          </text:list-item>
          <text:list-item>
            <text:p text:style-name="P44">The link field is omitted from the API response</text:p>
          </text:list-item>
          <text:list-item>
            <text:p text:style-name="P44">Filters and search by that field are unavailable</text:p>
          </text:list-item>
          <text:list-item>
            <text:p text:style-name="P45">It's a clean hide, not just visual suppression</text:p>
          </text:list-item>
        </text:list>
        <text:p text:style-name="P8">EspoCRM's role configuration supports hiding both full entities and single fields at the bottom of the role config, and field-level security lets you specify read and edit access independently per field via the Field Level section of a Role record. <text:a xlink:type="simple" xlink:href="https://forum.espocrm.com/forum/general/100997-hiding-fields-on-the-list-layout-using-dynamic-logic" office:target-frame-name="_blank" xlink:show="new" text:style-name="Internet_20_link" text:visited-style-name="Visited_20_Internet_20_Link">Espocrm</text:a><text:a xlink:type="simple" xlink:href="https://docs.espocrm.com/administration/roles-management/" office:target-frame-name="_blank" xlink:show="new" text:style-name="Internet_20_link" text:visited-style-name="Visited_20_Internet_20_Link">Espocrm</text:a></text:p>
        <text:h text:style-name="P2" text:outline-level="3">The role architecture that produces no leak</text:h>
        <text:p text:style-name="P8">The mental model: <text:span text:style-name="Strong_20_Emphasis">two roles, additive</text:span>. Every user has the base role; only authorized people get the second one stacked on top. Roles merge to the most permissive level, so adding the second role <text:span text:style-name="Emphasis">grants</text:span> access without breaking the first.</text:p>
        <text:p text:style-name="P8"><text:span text:style-name="Strong_20_Emphasis">Role 1 — "Standard User"</text:span> (everyone has this):</text:p>
        <table:table table:name="Table2" table:style-name="Table2">
          <table:table-column table:style-name="Table2.A"/>
          <table:table-column table:style-name="Table2.B"/>
          <table:table-header-rows>
            <table:table-row>
              <table:table-cell table:style-name="Table2.A1" office:value-type="string">
                <text:p text:style-name="P7">Scope</text:p>
              </table:table-cell>
              <table:table-cell table:style-name="Table2.A1" office:value-type="string">
                <text:p text:style-name="P7">Setting</text:p>
              </table:table-cell>
            </table:table-row>
          </table:table-header-rows>
          <table:table-row>
            <table:table-cell table:style-name="Table2.A1" office:value-type="string">
              <text:p text:style-name="P6"><text:span text:style-name="Source_20_Text">Company</text:span> entity</text:p>
            </table:table-cell>
            <table:table-cell table:style-name="Table2.A1" office:value-type="string">
              <text:p text:style-name="P6">Read=All, Edit/Create/Delete per normal rules</text:p>
            </table:table-cell>
          </table:table-row>
          <table:table-row>
            <table:table-cell table:style-name="Table2.A1" office:value-type="string">
              <text:p text:style-name="P6"><text:span text:style-name="Source_20_Text">Company</text:span> → field <text:span text:style-name="Source_20_Text">companySensitive</text:span> (the link)</text:p>
            </table:table-cell>
            <table:table-cell table:style-name="Table2.A1" office:value-type="string">
              <text:p text:style-name="P6"><text:span text:style-name="Strong_20_Emphasis">Read = No</text:span></text:p>
            </table:table-cell>
          </table:table-row>
          <table:table-row>
            <table:table-cell table:style-name="Table2.A1" office:value-type="string">
              <text:p text:style-name="P6"><text:span text:style-name="Source_20_Text">CompanySensitive</text:span> entity</text:p>
            </table:table-cell>
            <table:table-cell table:style-name="Table2.A1" office:value-type="string">
              <text:p text:style-name="Table_20_Contents">Read=No, Edit=No, Create=No, Delete=No</text:p>
            </table:table-cell>
          </table:table-row>
        </table:table>
        <text:p text:style-name="P8">Effect: a Standard-only user sees the Company entity normally, has no idea <text:span text:style-name="Source_20_Text">CompanySensitive</text:span> exists. The panel doesn't render. Search, list views, related-records — nothing about sensitive data leaks anywhere.</text:p>
        <text:p text:style-name="P8"><text:span text:style-name="Strong_20_Emphasis">Role 2 — "Sensitive Authorized"</text:span> (added to users who need access to at least one sensitive record):</text:p>
        <table:table table:name="Table3" table:style-name="Table3">
          <table:table-column table:style-name="Table3.A"/>
          <table:table-column table:style-name="Table3.B"/>
          <table:table-header-rows>
            <table:table-row>
              <table:table-cell table:style-name="Table3.A1" office:value-type="string">
                <text:p text:style-name="P7">Scope</text:p>
              </table:table-cell>
              <table:table-cell table:style-name="Table3.A1" office:value-type="string">
                <text:p text:style-name="P7">Setting</text:p>
              </table:table-cell>
            </table:table-row>
          </table:table-header-rows>
          <table:table-row>
            <table:table-cell table:style-name="Table3.A1" office:value-type="string">
              <text:p text:style-name="P6"><text:span text:style-name="Source_20_Text">Company</text:span> → field <text:span text:style-name="Source_20_Text">companySensitive</text:span> (the link)</text:p>
            </table:table-cell>
            <table:table-cell table:style-name="Table3.A1" office:value-type="string">
              <text:p text:style-name="P6"><text:span text:style-name="Strong_20_Emphasis">Read = Yes</text:span></text:p>
            </table:table-cell>
          </table:table-row>
          <table:table-row>
            <table:table-cell table:style-name="Table3.A1" office:value-type="string">
              <text:p text:style-name="P6"><text:span text:style-name="Source_20_Text">CompanySensitive</text:span> entity</text:p>
            </table:table-cell>
            <table:table-cell table:style-name="Table3.A1" office:value-type="string">
              <text:p text:style-name="Table_20_Contents">Read=Own, Edit=Own, Create=No, Delete=No</text:p>
            </table:table-cell>
          </table:table-row>
        </table:table>
        <text:p text:style-name="P8">Effect: the panel renders on Company detail views. But because <text:span text:style-name="Source_20_Text">CompanySensitive</text:span> Read=Own combined with Multiple Assigned Users means "only records where I'm in <text:span text:style-name="Source_20_Text">assignedUsers</text:span>," the panel only shows the records they're authorized for. On Companies where a sensitive record exists but they're not authorized, the panel renders empty — indistinguishable from "no sensitive record exists at all." Among the authorized pool, that's an acceptable level of disclosure: they know sensitive records exist <text:span text:style-name="Emphasis">in the system</text:span>, but cannot tell whether any specific Company has one they can't see.</text:p>
        <text:p text:style-name="P8"><text:span text:style-name="Strong_20_Emphasis">Role 3 — "Sensitive Coordinator"</text:span> (the small group who grants/revokes access):</text:p>
        <table:table table:name="Table4" table:style-name="Table4">
          <table:table-column table:style-name="Table4.A"/>
          <table:table-column table:style-name="Table4.B"/>
          <table:table-header-rows>
            <table:table-row>
              <table:table-cell table:style-name="Table4.A1" office:value-type="string">
                <text:p text:style-name="P7">Scope</text:p>
              </table:table-cell>
              <table:table-cell table:style-name="Table4.A1" office:value-type="string">
                <text:p text:style-name="P7">Setting</text:p>
              </table:table-cell>
            </table:table-row>
          </table:table-header-rows>
          <table:table-row>
            <table:table-cell table:style-name="Table4.A1" office:value-type="string">
              <text:p text:style-name="P6"><text:span text:style-name="Source_20_Text">Company</text:span> → field <text:span text:style-name="Source_20_Text">companySensitive</text:span></text:p>
            </table:table-cell>
            <table:table-cell table:style-name="Table4.A1" office:value-type="string">
              <text:p text:style-name="P6">Read = Yes</text:p>
            </table:table-cell>
          </table:table-row>
          <table:table-row>
            <table:table-cell table:style-name="Table4.A1" office:value-type="string">
              <text:p text:style-name="P6"><text:span text:style-name="Source_20_Text">CompanySensitive</text:span> entity</text:p>
            </table:table-cell>
            <table:table-cell table:style-name="Table4.A1" office:value-type="string">
              <text:p text:style-name="P6">Read=All, Edit=All, Create=Yes, Delete=All</text:p>
            </table:table-cell>
          </table:table-row>
          <table:table-row>
            <table:table-cell table:style-name="Table4.A1" office:value-type="string">
              <text:p text:style-name="P6">Assignment Permission</text:p>
            </table:table-cell>
            <table:table-cell table:style-name="Table4.A1" office:value-type="string">
              <text:p text:style-name="P6">At least Team (required to modify <text:span text:style-name="Source_20_Text">assignedUsers</text:span>)</text:p>
            </table:table-cell>
          </table:table-row>
        </table:table>
        <text:p text:style-name="P8"><text:soft-page-break/>Effect: sees and manages all sensitive records, including the <text:span text:style-name="Source_20_Text">assignedUsers</text:span> field that determines who else has access.</text:p>
        <text:h text:style-name="P2" text:outline-level="3">Operational flow</text:h>
        <text:list text:style-name="L20">
          <text:list-item>
            <text:p text:style-name="P46">Coordinator creates a <text:span text:style-name="Source_20_Text">CompanySensitive</text:span> record, links it to the relevant Company, populates the data.</text:p>
          </text:list-item>
          <text:list-item>
            <text:p text:style-name="P46">Coordinator adds the authorized users to the <text:span text:style-name="Source_20_Text">assignedUsers</text:span> field.</text:p>
          </text:list-item>
          <text:list-item>
            <text:p text:style-name="P46">Coordinator (or admin) ensures each of those users has the Sensitive Authorized role assigned. <text:span text:style-name="Emphasis">This is the small ongoing operational task — granting the role when someone first becomes eligible to see any sensitive data.</text:span></text:p>
          </text:list-item>
          <text:list-item>
            <text:p text:style-name="P46">Authorized user logs in, sees the panel on Companies, sees their authorized records, can edit them.</text:p>
          </text:list-item>
          <text:list-item>
            <text:p text:style-name="P47">Standard users see nothing about sensitive data anywhere.</text:p>
          </text:list-item>
        </text:list>
        <text:h text:style-name="P2" text:outline-level="3">One trap to avoid</text:h>
        <text:p text:style-name="P8">When you test this, <text:span text:style-name="Strong_20_Emphasis">never test as Admin</text:span> — admins bypass all access control and will see everything regardless. Create a <text:span text:style-name="Source_20_Text">test_standard</text:span> user (only Standard role) and a <text:span text:style-name="Source_20_Text">test_authorized</text:span> user (both roles, added to <text:span text:style-name="Source_20_Text">assignedUsers</text:span> of one specific sensitive record) and verify each sees only what they should.</text:p>
        <text:p text:style-name="Horizontal_20_Line"/>
        <text:h text:style-name="P2" text:outline-level="3">Summary configuration</text:h>
        <text:list text:style-name="L21">
          <text:list-item>
            <text:p text:style-name="P48">Entity Manager → CompanySensitive → enable <text:span text:style-name="Strong_20_Emphasis">Multiple Assigned Users</text:span></text:p>
          </text:list-item>
          <text:list-item>
            <text:p text:style-name="P48">Entity Manager → Company → relationship to CompanySensitive (one-to-one, link field <text:span text:style-name="Source_20_Text">companySensitive</text:span>)</text:p>
          </text:list-item>
          <text:list-item>
            <text:p text:style-name="P48">Role: <text:span text:style-name="Strong_20_Emphasis">Standard User</text:span> — Field Level on <text:span text:style-name="Source_20_Text">Company</text:span>: <text:span text:style-name="Source_20_Text">companySensitive</text:span> Read=No, Edit=No. Scope: <text:span text:style-name="Source_20_Text">CompanySensitive</text:span> = No on everything.</text:p>
          </text:list-item>
          <text:list-item>
            <text:p text:style-name="P48">Role: <text:span text:style-name="Strong_20_Emphasis">Sensitive Authorized</text:span> — Field Level on <text:span text:style-name="Source_20_Text">Company</text:span>: <text:span text:style-name="Source_20_Text">companySensitive</text:span> Read=Yes. Scope: <text:span text:style-name="Source_20_Text">CompanySensitive</text:span> Read=Own, Edit=Own.</text:p>
          </text:list-item>
          <text:list-item>
            <text:p text:style-name="P48">Role: <text:span text:style-name="Strong_20_Emphasis">Sensitive Coordinator</text:span> — Field Level on <text:span text:style-name="Source_20_Text">Company</text:span>: <text:span text:style-name="Source_20_Text">companySensitive</text:span> Read=Yes. Scope: <text:span text:style-name="Source_20_Text">CompanySensitive</text:span> Read=All, Edit=All, Create=Yes, Delete=All.</text:p>
          </text:list-item>
          <text:list-item>
            <text:p text:style-name="P49">Users: every user gets Standard. Authorized people additionally get Sensitive Authorized. The few coordinators get Sensitive Coordinator (and Standard for normal Company access).</text:p>
          </text:list-item>
        </text:list>
        <text:p text:style-name="Horizontal_20_Line"/>
        <text:p text:style-name="P8"><text:span text:style-name="Strong_20_Emphasis">Next step:</text:span> I recommend capturing this as a named pattern in the CBM EspoCRM How-To guide — call it the <text:span text:style-name="Strong_20_Emphasis">"Sensitive Sub-Entity Pattern"</text:span> — with the three-role config, the field-level-on-link trick, and the test procedure. It's reusable for any future case where some records need restricted, per-record access lists. Confirm and I'll draft the section.</text:p>
        <text:h text:style-name="Heading_20_2" text:outline-level="2"><text:soft-page-break/>nope. Your explinations are not clear enough. What does "Role: Standard User — Field Level on <text:span text:style-name="Source_20_Text">Company</text:span>: <text:span text:style-name="Source_20_Text">companySensitive</text:span> Read=No, Edit=No. Scope: <text:span text:style-name="Source_20_Text">CompanySensitive</text:span> = No on everything." even mean?</text:h>
        <text:p text:style-name="P9">10:58 PM</text:p>
        <text:p text:style-name="P8">Fair complaint — I compressed three separate EspoCRM concepts into one line. Let me unpack properly. The problem is you can't apply my line without first understanding how the Role configuration screen is <text:span text:style-name="Emphasis">organized</text:span>.</text:p>
        <text:h text:style-name="P2" text:outline-level="3">What the Role edit screen actually looks like</text:h>
        <text:p text:style-name="P8">When you open a Role in EspoCRM (Administration &gt; Roles &gt; click a role), you see a form with three distinct sections, in this order:</text:p>
        <text:h text:style-name="P3" text:outline-level="4">Section 1 — Scope Level Permissions (the big table)</text:h>
        <text:p text:style-name="P8">This is the entity-by-entity matrix. One row per entity in the system (Contact, Account, Meeting, your custom CompanySensitive, etc.). For each row, columns are:</text:p>
        <text:list text:style-name="L22">
          <text:list-item>
            <text:p text:style-name="P50"><text:span text:style-name="Strong_20_Emphasis">Access</text:span>: enabled / disabled / not-set</text:p>
          </text:list-item>
          <text:list-item>
            <text:p text:style-name="P50"><text:span text:style-name="Strong_20_Emphasis">Create</text:span>: yes / no</text:p>
          </text:list-item>
          <text:list-item>
            <text:p text:style-name="P50"><text:span text:style-name="Strong_20_Emphasis">Read</text:span>: All / Team / Own / No</text:p>
          </text:list-item>
          <text:list-item>
            <text:p text:style-name="P50"><text:span text:style-name="Strong_20_Emphasis">Edit</text:span>: All / Team / Own / No</text:p>
          </text:list-item>
          <text:list-item>
            <text:p text:style-name="P50"><text:span text:style-name="Strong_20_Emphasis">Delete</text:span>: All / Team / Own / No</text:p>
          </text:list-item>
          <text:list-item>
            <text:p text:style-name="P51"><text:span text:style-name="Strong_20_Emphasis">Stream</text:span>: All / Team / Own / No</text:p>
          </text:list-item>
        </text:list>
        <text:p text:style-name="P8">This controls whether and how the role can interact with each entity <text:span text:style-name="Emphasis">as a whole</text:span>.</text:p>
        <text:h text:style-name="P3" text:outline-level="4">Section 2 — Field Level Permissions (smaller section below)</text:h>
        <text:p text:style-name="P8">Here you drill <text:span text:style-name="Emphasis">into specific fields within an entity</text:span> and override read/edit access just for those fields. The workflow: click a plus icon next to an entity name, pick a field from the dropdown, then set:</text:p>
        <text:list text:style-name="L23">
          <text:list-item>
            <text:p text:style-name="P52"><text:span text:style-name="Strong_20_Emphasis">Read</text:span>: Yes / No</text:p>
          </text:list-item>
          <text:list-item>
            <text:p text:style-name="P53"><text:span text:style-name="Strong_20_Emphasis">Edit</text:span>: Yes / No</text:p>
          </text:list-item>
        </text:list>
        <text:p text:style-name="P8">Field level can only restrict further — it can never grant access the scope level denies.</text:p>
        <text:h text:style-name="P3" text:outline-level="4">Section 3 — Permissions (system-wide settings)</text:h>
        <text:p text:style-name="P8">Things like Assignment Permission, Export Permission, etc. Not entity-specific. Not relevant to this scenario right now.</text:p>
        <text:h text:style-name="P2" text:outline-level="3">The connecting insight you need</text:h>
        <text:p text:style-name="P8"><text:span text:style-name="Strong_20_Emphasis">In EspoCRM, a relationship between two entities appears as a "field" on each side.</text:span></text:p>
        <text:p text:style-name="P8">When you create the one-to-one relationship between Company and CompanySensitive, EspoCRM automatically creates two link fields:</text:p>
        <text:list text:style-name="L24">
          <text:list-item>
            <text:p text:style-name="P54"><text:soft-page-break/>On the <text:span text:style-name="Strong_20_Emphasis">Company</text:span> entity: a field named <text:span text:style-name="Source_20_Text">companySensitive</text:span> (points to the related CompanySensitive record)</text:p>
          </text:list-item>
          <text:list-item>
            <text:p text:style-name="P55">On the <text:span text:style-name="Strong_20_Emphasis">CompanySensitive</text:span> entity: a field named <text:span text:style-name="Source_20_Text">company</text:span> (points back)</text:p>
          </text:list-item>
        </text:list>
        <text:p text:style-name="P8">These link fields can be controlled by Field Level Permissions exactly like any regular field. <text:span text:style-name="Strong_20_Emphasis">That is the mechanism that hides the relationship panel.</text:span></text:p>
        <text:h text:style-name="P2" text:outline-level="3">Now re-reading the line that confused you</text:h>
        <text:p text:style-name="P8">"Role: Standard User — Field Level on <text:span text:style-name="Source_20_Text">Company</text:span>: <text:span text:style-name="Source_20_Text">companySensitive</text:span> Read=No, Edit=No. Scope: <text:span text:style-name="Source_20_Text">CompanySensitive</text:span> = No on everything."</text:p>
        <text:p text:style-name="P8">That line is shorthand for <text:span text:style-name="Strong_20_Emphasis">two configuration actions</text:span> inside the Standard User role:</text:p>
        <text:h text:style-name="P3" text:outline-level="4">Action 1 — in the Scope Level Permissions table</text:h>
        <text:p text:style-name="P8">Find the <text:span text:style-name="Source_20_Text">CompanySensitive</text:span> row. Set its Access to <text:span text:style-name="Strong_20_Emphasis">disabled</text:span> (or equivalently: Create=No, Read=No, Edit=No, Delete=No, Stream=No — all "No").</text:p>
        <text:p text:style-name="P8"><text:span text:style-name="Strong_20_Emphasis">What this does:</text:span> The Standard User role grants zero access to the CompanySensitive entity. The user cannot see, list, create, or interact with it anywhere. CompanySensitive effectively doesn't exist for this user — no nav menu item, no list view, no search results, nothing.</text:p>
        <text:h text:style-name="P3" text:outline-level="4">Action 2 — in the Field Level Permissions section</text:h>
        <text:p text:style-name="P8">Click the plus icon next to "Company" (to add a field-level override on the Company entity). From the field dropdown, pick <text:span text:style-name="Source_20_Text">companySensitive</text:span>. Set its Read=No and Edit=No.</text:p>
        <text:p text:style-name="P8"><text:span text:style-name="Strong_20_Emphasis">What this does:</text:span> For this role, the <text:span text:style-name="Source_20_Text">companySensitive</text:span> link field on Company records is hidden. The relationship panel doesn't render on the Company detail view. The field doesn't appear in API responses, search, filters, or anywhere else. Looking at a Company record, the Standard user sees no trace that a sensitive record could even be related.</text:p>
        <text:h text:style-name="P2" text:outline-level="3">Why both actions are necessary</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Action</text:p>
              </table:table-cell>
              <table:table-cell table:style-name="Table5.A1" office:value-type="string">
                <text:p text:style-name="P7">Hides</text:p>
              </table:table-cell>
              <table:table-cell table:style-name="Table5.A1" office:value-type="string">
                <text:p text:style-name="P7">Without it</text:p>
              </table:table-cell>
            </table:table-row>
          </table:table-header-rows>
          <table:table-row>
            <table:table-cell table:style-name="Table5.A1" office:value-type="string">
              <text:p text:style-name="P6"><text:span text:style-name="Strong_20_Emphasis">1</text:span> (Scope = No)</text:p>
            </table:table-cell>
            <table:table-cell table:style-name="Table5.A1" office:value-type="string">
              <text:p text:style-name="P6">The CompanySensitive entity itself, everywhere</text:p>
            </table:table-cell>
            <table:table-cell table:style-name="Table5.A1" office:value-type="string">
              <text:p text:style-name="P6">User might find CompanySensitive via nav menus, list views, search</text:p>
            </table:table-cell>
          </table:table-row>
          <table:table-row>
            <table:table-cell table:style-name="Table5.A1" office:value-type="string">
              <text:p text:style-name="P6"><text:span text:style-name="Strong_20_Emphasis">2</text:span> (Field Level on the link)</text:p>
            </table:table-cell>
            <table:table-cell table:style-name="Table5.A1" office:value-type="string">
              <text:p text:style-name="P6">The relationship from Company's side</text:p>
            </table:table-cell>
            <table:table-cell table:style-name="Table5.A1" office:value-type="string">
              <text:p text:style-name="Table_20_Contents">The panel still renders on Company detail views, leaking that sensitive records exist</text:p>
            </table:table-cell>
          </table:table-row>
        </table:table>
        <text:p text:style-name="P8">You need both. Action 1 alone leaves the panel visible on Company. Action 2 alone leaves the entity browsable elsewhere.</text:p>
        <text:p text:style-name="Horizontal_20_Line"/>
        <text:p text:style-name="P8">Does this clear it up? If yes, I'll re-unpack the Sensitive Authorized and Sensitive Coordinator roles the same way — section by section, action by action — so each role is something you can actually click through in the UI, not shorthand.</text:p>
        <text:h text:style-name="Heading_20_2" text:outline-level="2"><text:soft-page-break/>Lets re-write these instructions with real entity names. That will make it clearer. Let use the Company and ClientProfile entities where the ClientProfile is the sensitive data.</text:h>
        <text:p text:style-name="P9">11:31 PM</text:p>
        <text:p text:style-name="P8">Good — concrete names will help. Here it is, rewritten clean, with <text:span text:style-name="Source_20_Text">Company</text:span> (everyone sees all records) and <text:span text:style-name="Source_20_Text">ClientProfile</text:span> (sensitive data, one-to-one with Company).</text:p>
        <text:h text:style-name="P2" text:outline-level="3">One-time setup (do these first, before configuring roles)</text:h>
        <text:h text:style-name="P3" text:outline-level="4">Step 1 — Create the ClientProfile entity</text:h>
        <text:p text:style-name="P8">Administration &gt; Entity Manager &gt; Create Entity. Name it <text:span text:style-name="Source_20_Text">ClientProfile</text:span>. Set the type to Base or whatever fits. Save.</text:p>
        <text:h text:style-name="P3" text:outline-level="4">Step 2 — Create the one-to-one relationship to Company</text:h>
        <text:p text:style-name="P8">Administration &gt; Entity Manager &gt; ClientProfile &gt; Relationships &gt; Create Link.</text:p>
        <text:list text:style-name="L25">
          <text:list-item>
            <text:p text:style-name="P56"><text:span text:style-name="Strong_20_Emphasis">Relationship type:</text:span> One-to-One Right (or whichever direction makes Company the "parent")</text:p>
          </text:list-item>
          <text:list-item>
            <text:p text:style-name="P56"><text:span text:style-name="Strong_20_Emphasis">Foreign Entity:</text:span> Company</text:p>
          </text:list-item>
          <text:list-item>
            <text:p text:style-name="P56"><text:span text:style-name="Strong_20_Emphasis">Link (this side):</text:span> <text:span text:style-name="Source_20_Text">company</text:span> — this creates a field on ClientProfile pointing to the related Company</text:p>
          </text:list-item>
          <text:list-item>
            <text:p text:style-name="P57"><text:span text:style-name="Strong_20_Emphasis">Link Foreign (other side):</text:span> <text:span text:style-name="Source_20_Text">clientProfile</text:span> — this creates a field on Company pointing to the related ClientProfile</text:p>
          </text:list-item>
        </text:list>
        <text:p text:style-name="P8">EspoCRM auto-creates both link fields and auto-adds the related panel to the Company detail layout.</text:p>
        <text:h text:style-name="P3" text:outline-level="4">Step 3 — Enable Multiple Assigned Users on ClientProfile</text:h>
        <text:p text:style-name="P8">Administration &gt; Entity Manager &gt; ClientProfile &gt; Edit. Find the "Multiple Assigned Users" checkbox (sometimes labeled "Assigned Users" with a "multiple" option). Enable it. Save.</text:p>
        <text:p text:style-name="P8">This replaces the single <text:span text:style-name="Source_20_Text">assignedUser</text:span> field with an <text:span text:style-name="Source_20_Text">assignedUsers</text:span> link-multiple field. Every user listed in <text:span text:style-name="Source_20_Text">assignedUsers</text:span> on a ClientProfile record will get Own-level access to it.</text:p>
        <text:p text:style-name="Horizontal_20_Line"/>
        <text:h text:style-name="P2" text:outline-level="3">Role 1: Standard User</text:h>
        <text:p text:style-name="P8"><text:span text:style-name="Strong_20_Emphasis">Who gets this role:</text:span> Everyone. It's the baseline.</text:p>
        <text:p text:style-name="P8"><text:span text:style-name="Strong_20_Emphasis">Purpose:</text:span> Grants normal access to Company. Completely hides ClientProfile and any sign of its existence.</text:p>
        <text:p text:style-name="P8">Administration &gt; Roles &gt; Create. Name it <text:span text:style-name="Source_20_Text">Standard User</text:span>.</text:p>
        <text:h text:style-name="P3" text:outline-level="4">Section 1 — Scope Level Permissions</text:h>
        <text:p text:style-name="P8">Find the rows for <text:span text:style-name="Source_20_Text">Company</text:span> and <text:span text:style-name="Source_20_Text">ClientProfile</text:span>. Set them as follows:</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header-rows>
            <text:soft-page-break/>
            <table:table-row>
              <table:table-cell table:style-name="Table6.A1" office:value-type="string">
                <text:p text:style-name="P7">Entity</text:p>
              </table:table-cell>
              <table:table-cell table:style-name="Table6.A1" office:value-type="string">
                <text:p text:style-name="P7">Access</text:p>
              </table:table-cell>
              <table:table-cell table:style-name="Table6.A1" office:value-type="string">
                <text:p text:style-name="P7">Create</text:p>
              </table:table-cell>
              <table:table-cell table:style-name="Table6.A1" office:value-type="string">
                <text:p text:style-name="P7">Read</text:p>
              </table:table-cell>
              <table:table-cell table:style-name="Table6.A1" office:value-type="string">
                <text:p text:style-name="P7">Edit</text:p>
              </table:table-cell>
              <table:table-cell table:style-name="Table6.A1" office:value-type="string">
                <text:p text:style-name="P7">Delete</text:p>
              </table:table-cell>
              <table:table-cell table:style-name="Table6.A1" office:value-type="string">
                <text:p text:style-name="P7">Stream</text:p>
              </table:table-cell>
            </table:table-row>
          </table:table-header-rows>
          <table:table-row>
            <table:table-cell table:style-name="Table6.A1" office:value-type="string">
              <text:p text:style-name="P6">Company</text:p>
            </table:table-cell>
            <table:table-cell table:style-name="Table6.A1" office:value-type="string">
              <text:p text:style-name="P6">enabled</text:p>
            </table:table-cell>
            <table:table-cell table:style-name="Table6.A1" office:value-type="string">
              <text:p text:style-name="P6">yes</text:p>
            </table:table-cell>
            <table:table-cell table:style-name="Table6.A1" office:value-type="string">
              <text:p text:style-name="P6">All</text:p>
            </table:table-cell>
            <table:table-cell table:style-name="Table6.A1" office:value-type="string">
              <text:p text:style-name="P6">(your normal rule)</text:p>
            </table:table-cell>
            <table:table-cell table:style-name="Table6.A1" office:value-type="string">
              <text:p text:style-name="P6">(your normal rule)</text:p>
            </table:table-cell>
            <table:table-cell table:style-name="Table6.A1" office:value-type="string">
              <text:p text:style-name="P6">All</text:p>
            </table:table-cell>
          </table:table-row>
          <table:table-row>
            <table:table-cell table:style-name="Table6.A1" office:value-type="string">
              <text:p text:style-name="P6"><text:span text:style-name="Strong_20_Emphasis">ClientProfile</text:span></text:p>
            </table:table-cell>
            <table:table-cell table:style-name="Table6.A1" office:value-type="string">
              <text:p text:style-name="P6"><text:span text:style-name="Strong_20_Emphasis">disabled</text:span></text:p>
            </table:table-cell>
            <table:table-cell table:style-name="Table6.A1" office:value-type="string">
              <text:p text:style-name="P6">—</text:p>
            </table:table-cell>
            <table:table-cell table:style-name="Table6.A1" office:value-type="string">
              <text:p text:style-name="P6">—</text:p>
            </table:table-cell>
            <table:table-cell table:style-name="Table6.A1" office:value-type="string">
              <text:p text:style-name="P6">—</text:p>
            </table:table-cell>
            <table:table-cell table:style-name="Table6.A1" office:value-type="string">
              <text:p text:style-name="P6">—</text:p>
            </table:table-cell>
            <table:table-cell table:style-name="Table6.A1" office:value-type="string">
              <text:p text:style-name="Table_20_Contents">—</text:p>
            </table:table-cell>
          </table:table-row>
        </table:table>
        <text:p text:style-name="P8">Setting ClientProfile to <text:span text:style-name="Strong_20_Emphasis">disabled</text:span> means this role has zero access to it: no list view, no nav menu, no search, no API. It's invisible.</text:p>
        <text:h text:style-name="P3" text:outline-level="4">Section 2 — Field Level Permissions</text:h>
        <text:p text:style-name="P8">Click the plus icon next to <text:span text:style-name="Source_20_Text">Company</text:span>. From the field dropdown, select <text:span text:style-name="Source_20_Text">clientProfile</text:span>. 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Field</text:p>
              </table:table-cell>
              <table:table-cell table:style-name="Table7.A1" office:value-type="string">
                <text:p text:style-name="P7">Read</text:p>
              </table:table-cell>
              <table:table-cell table:style-name="Table7.A1" office:value-type="string">
                <text:p text:style-name="P7">Edit</text:p>
              </table:table-cell>
            </table:table-row>
          </table:table-header-rows>
          <table:table-row>
            <table:table-cell table:style-name="Table7.A1" office:value-type="string">
              <text:p text:style-name="P6">Company → clientProfile</text:p>
            </table:table-cell>
            <table:table-cell table:style-name="Table7.A1" office:value-type="string">
              <text:p text:style-name="P6"><text:span text:style-name="Strong_20_Emphasis">No</text:span></text:p>
            </table:table-cell>
            <table:table-cell table:style-name="Table7.A1" office:value-type="string">
              <text:p text:style-name="P6"><text:span text:style-name="Strong_20_Emphasis">No</text:span></text:p>
            </table:table-cell>
          </table:table-row>
        </table:table>
        <text:p text:style-name="P8">This hides the <text:span text:style-name="Source_20_Text">clientProfile</text:span> link field on Company records for this role. The related-record panel doesn't render on the Company detail view. The field doesn't appear in API responses, filters, or search.</text:p>
        <text:h text:style-name="P3" text:outline-level="4">Result</text:h>
        <text:p text:style-name="P8">A user with only this role: sees every Company record as normal, sees no panel for ClientProfile on Company, has no idea ClientProfile exists anywhere in the system.</text:p>
        <text:p text:style-name="Horizontal_20_Line"/>
        <text:h text:style-name="P2" text:outline-level="3">Role 2: Sensitive Authorized</text:h>
        <text:p text:style-name="P8"><text:span text:style-name="Strong_20_Emphasis">Who gets this role:</text:span> Any user who needs access to at least one ClientProfile record. Stacked <text:span text:style-name="Emphasis">on top of</text:span> Standard User — you assign both roles to the user, and EspoCRM merges them to the more permissive setting.</text:p>
        <text:p text:style-name="P8"><text:span text:style-name="Strong_20_Emphasis">Purpose:</text:span> Lets the user see the ClientProfile entity exists, see ClientProfile records they're assigned to (via <text:span text:style-name="Source_20_Text">assignedUsers</text:span>), and edit those records.</text:p>
        <text:p text:style-name="P8">Administration &gt; Roles &gt; Create. Name it <text:span text:style-name="Source_20_Text">Sensitive Authorized</text:span>.</text:p>
        <text:h text:style-name="P3" text:outline-level="4">Section 1 — Scope Level Permissions</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header-rows>
            <table:table-row>
              <table:table-cell table:style-name="Table8.A1" office:value-type="string">
                <text:p text:style-name="P7">Entity</text:p>
              </table:table-cell>
              <table:table-cell table:style-name="Table8.A1" office:value-type="string">
                <text:p text:style-name="P7">Access</text:p>
              </table:table-cell>
              <table:table-cell table:style-name="Table8.A1" office:value-type="string">
                <text:p text:style-name="P7">Create</text:p>
              </table:table-cell>
              <table:table-cell table:style-name="Table8.A1" office:value-type="string">
                <text:p text:style-name="P7">Read</text:p>
              </table:table-cell>
              <table:table-cell table:style-name="Table8.A1" office:value-type="string">
                <text:p text:style-name="P7">Edit</text:p>
              </table:table-cell>
              <table:table-cell table:style-name="Table8.A1" office:value-type="string">
                <text:p text:style-name="P7">Delete</text:p>
              </table:table-cell>
              <table:table-cell table:style-name="Table8.A1" office:value-type="string">
                <text:p text:style-name="P7">Stream</text:p>
              </table:table-cell>
            </table:table-row>
          </table:table-header-rows>
          <table:table-row>
            <table:table-cell table:style-name="Table8.A1" office:value-type="string">
              <text:p text:style-name="P6">ClientProfile</text:p>
            </table:table-cell>
            <table:table-cell table:style-name="Table8.A1" office:value-type="string">
              <text:p text:style-name="P6">enabled</text:p>
            </table:table-cell>
            <table:table-cell table:style-name="Table8.A1" office:value-type="string">
              <text:p text:style-name="P6">no</text:p>
            </table:table-cell>
            <table:table-cell table:style-name="Table8.A1" office:value-type="string">
              <text:p text:style-name="P6"><text:span text:style-name="Strong_20_Emphasis">Own</text:span></text:p>
            </table:table-cell>
            <table:table-cell table:style-name="Table8.A1" office:value-type="string">
              <text:p text:style-name="P6"><text:span text:style-name="Strong_20_Emphasis">Own</text:span></text:p>
            </table:table-cell>
            <table:table-cell table:style-name="Table8.A1" office:value-type="string">
              <text:p text:style-name="P6">no</text:p>
            </table:table-cell>
            <table:table-cell table:style-name="Table8.A1" office:value-type="string">
              <text:p text:style-name="Table_20_Contents">Own</text:p>
            </table:table-cell>
          </table:table-row>
        </table:table>
        <text:p text:style-name="P8"><text:span text:style-name="Source_20_Text">Read = Own</text:span> combined with Multiple Assigned Users means: "I can see ClientProfile records where I'm listed in <text:span text:style-name="Source_20_Text">assignedUsers</text:span>." <text:span text:style-name="Source_20_Text">Edit = Own</text:span> lets those same users edit those records.</text:p>
        <text:p text:style-name="P8">Leave Company alone here (don't override it). The Standard User role already grants Company access.</text:p>
        <text:h text:style-name="P3" text:outline-level="4">Section 2 — Field Level Permissions</text:h>
        <text:p text:style-name="P8"><text:span text:style-name="Strong_20_Emphasis">Add an override</text:span> on <text:span text:style-name="Source_20_Text">Company</text:span> for the <text:span text:style-name="Source_20_Text">clientProfile</text:span> field, setting:</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7">Field</text:p>
              </table:table-cell>
              <table:table-cell table:style-name="Table9.A1" office:value-type="string">
                <text:p text:style-name="P7">Read</text:p>
              </table:table-cell>
              <table:table-cell table:style-name="Table9.A1" office:value-type="string">
                <text:p text:style-name="P7">Edit</text:p>
              </table:table-cell>
            </table:table-row>
          </table:table-header-rows>
          <table:table-row>
            <table:table-cell table:style-name="Table9.A1" office:value-type="string">
              <text:p text:style-name="P6">Company → clientProfile</text:p>
            </table:table-cell>
            <table:table-cell table:style-name="Table9.A1" office:value-type="string">
              <text:p text:style-name="P6"><text:span text:style-name="Strong_20_Emphasis">Yes</text:span></text:p>
            </table:table-cell>
            <table:table-cell table:style-name="Table9.A1" office:value-type="string">
              <text:p text:style-name="Table_20_Contents">No</text:p>
            </table:table-cell>
          </table:table-row>
        </table:table>
        <text:p text:style-name="P8"><text:soft-page-break/>Why this is necessary: the Standard User role hides this field with Read=No. Without an explicit Yes here, role merging would still hide it (No is more restrictive, but the merge rule is <text:span text:style-name="Emphasis">more permissive wins</text:span> — so Yes here overrides the No from Standard).</text:p>
        <text:h text:style-name="P3" text:outline-level="4">Result</text:h>
        <text:p text:style-name="P8">A user with Standard + Sensitive Authorized:</text:p>
        <text:list text:style-name="L26">
          <text:list-item>
            <text:p text:style-name="P58">Sees Company normally.</text:p>
          </text:list-item>
          <text:list-item>
            <text:p text:style-name="P58">Sees the ClientProfile-related panel on Company detail views.</text:p>
          </text:list-item>
          <text:list-item>
            <text:p text:style-name="P58">On Companies where they are in the <text:span text:style-name="Source_20_Text">assignedUsers</text:span> of the related ClientProfile: the record appears, they can open and edit it.</text:p>
          </text:list-item>
          <text:list-item>
            <text:p text:style-name="P58">On Companies where a ClientProfile exists but they aren't authorized: the panel renders empty — indistinguishable from "no ClientProfile exists for this Company."</text:p>
          </text:list-item>
          <text:list-item>
            <text:p text:style-name="P59">Cannot create or delete ClientProfile records; only the Coordinator does that.</text:p>
          </text:list-item>
        </text:list>
        <text:p text:style-name="Horizontal_20_Line"/>
        <text:h text:style-name="P2" text:outline-level="3">Role 3: Sensitive Coordinator</text:h>
        <text:p text:style-name="P8"><text:span text:style-name="Strong_20_Emphasis">Who gets this role:</text:span> The small group of people who create ClientProfile records and decide who else gets access. Stacked on top of Standard User.</text:p>
        <text:p text:style-name="P8"><text:span text:style-name="Strong_20_Emphasis">Purpose:</text:span> Full management of all ClientProfile records, including modifying the <text:span text:style-name="Source_20_Text">assignedUsers</text:span> list to grant/revoke access.</text:p>
        <text:p text:style-name="P8">Administration &gt; Roles &gt; Create. Name it <text:span text:style-name="Source_20_Text">Sensitive Coordinator</text:span>.</text:p>
        <text:h text:style-name="P3" text:outline-level="4">Section 1 — Scope Level Permissions</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7">Entity</text:p>
              </table:table-cell>
              <table:table-cell table:style-name="Table10.A1" office:value-type="string">
                <text:p text:style-name="P7">Access</text:p>
              </table:table-cell>
              <table:table-cell table:style-name="Table10.A1" office:value-type="string">
                <text:p text:style-name="P7">Create</text:p>
              </table:table-cell>
              <table:table-cell table:style-name="Table10.A1" office:value-type="string">
                <text:p text:style-name="P7">Read</text:p>
              </table:table-cell>
              <table:table-cell table:style-name="Table10.A1" office:value-type="string">
                <text:p text:style-name="P7">Edit</text:p>
              </table:table-cell>
              <table:table-cell table:style-name="Table10.A1" office:value-type="string">
                <text:p text:style-name="P7">Delete</text:p>
              </table:table-cell>
              <table:table-cell table:style-name="Table10.A1" office:value-type="string">
                <text:p text:style-name="P7">Stream</text:p>
              </table:table-cell>
            </table:table-row>
          </table:table-header-rows>
          <table:table-row>
            <table:table-cell table:style-name="Table10.A1" office:value-type="string">
              <text:p text:style-name="P6">ClientProfile</text:p>
            </table:table-cell>
            <table:table-cell table:style-name="Table10.A1" office:value-type="string">
              <text:p text:style-name="P6">enabled</text:p>
            </table:table-cell>
            <table:table-cell table:style-name="Table10.A1" office:value-type="string">
              <text:p text:style-name="P6"><text:span text:style-name="Strong_20_Emphasis">yes</text:span></text:p>
            </table:table-cell>
            <table:table-cell table:style-name="Table10.A1" office:value-type="string">
              <text:p text:style-name="P6"><text:span text:style-name="Strong_20_Emphasis">All</text:span></text:p>
            </table:table-cell>
            <table:table-cell table:style-name="Table10.A1" office:value-type="string">
              <text:p text:style-name="P6"><text:span text:style-name="Strong_20_Emphasis">All</text:span></text:p>
            </table:table-cell>
            <table:table-cell table:style-name="Table10.A1" office:value-type="string">
              <text:p text:style-name="P6">All</text:p>
            </table:table-cell>
            <table:table-cell table:style-name="Table10.A1" office:value-type="string">
              <text:p text:style-name="Table_20_Contents">All</text:p>
            </table:table-cell>
          </table:table-row>
        </table:table>
        <text:p text:style-name="P8">This role sees and can manage every ClientProfile record in the system.</text:p>
        <text:h text:style-name="P3" text:outline-level="4">Section 2 — Field Level Permissions</text:h>
        <text:p text:style-name="P8">Same as Sensitive Authorized — add an override on <text:span text:style-name="Source_20_Text">Company</text:span> for <text:span text:style-name="Source_20_Text">clientProfile</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Field</text:p>
              </table:table-cell>
              <table:table-cell table:style-name="Table11.A1" office:value-type="string">
                <text:p text:style-name="P7">Read</text:p>
              </table:table-cell>
              <table:table-cell table:style-name="Table11.A1" office:value-type="string">
                <text:p text:style-name="P7">Edit</text:p>
              </table:table-cell>
            </table:table-row>
          </table:table-header-rows>
          <table:table-row>
            <table:table-cell table:style-name="Table11.A1" office:value-type="string">
              <text:p text:style-name="P6">Company → clientProfile</text:p>
            </table:table-cell>
            <table:table-cell table:style-name="Table11.A1" office:value-type="string">
              <text:p text:style-name="P6"><text:span text:style-name="Strong_20_Emphasis">Yes</text:span></text:p>
            </table:table-cell>
            <table:table-cell table:style-name="Table11.A1" office:value-type="string">
              <text:p text:style-name="Table_20_Contents">Yes</text:p>
            </table:table-cell>
          </table:table-row>
        </table:table>
        <text:h text:style-name="P3" text:outline-level="4">Section 3 — Permissions</text:h>
        <text:p text:style-name="P8">Find <text:span text:style-name="Strong_20_Emphasis">Assignment Permission</text:span> and set it to <text:span text:style-name="Strong_20_Emphasis">All</text:span> (or at minimum Team).</text:p>
        <text:p text:style-name="P8">This is required for the Coordinator to add users to the <text:span text:style-name="Source_20_Text">assignedUsers</text:span> field of a ClientProfile. Without it, even though they can edit the record, they can't modify who else is assigned to it.</text:p>
        <text:h text:style-name="P3" text:outline-level="4">Result</text:h>
        <text:p text:style-name="P8">A Coordinator (Standard + Sensitive Coordinator):</text:p>
        <text:list text:style-name="L27">
          <text:list-item>
            <text:p text:style-name="P60"><text:soft-page-break/>Sees every ClientProfile record.</text:p>
          </text:list-item>
          <text:list-item>
            <text:p text:style-name="P60">Can create new ClientProfile records and link them to a Company.</text:p>
          </text:list-item>
          <text:list-item>
            <text:p text:style-name="P60">Can edit the <text:span text:style-name="Source_20_Text">assignedUsers</text:span> field to grant or revoke access for specific users.</text:p>
          </text:list-item>
          <text:list-item>
            <text:p text:style-name="P61">Can edit the sensitive data itself.</text:p>
          </text:list-item>
        </text:list>
        <text:p text:style-name="Horizontal_20_Line"/>
        <text:h text:style-name="P2" text:outline-level="3">Assigning roles to users</text:h>
        <text:p text:style-name="P8">Administration &gt; Users &gt; [pick a user] &gt; Edit &gt; Roles field.</text:p>
        <text:list text:style-name="L28">
          <text:list-item>
            <text:p text:style-name="P62">Most users: just <text:span text:style-name="Source_20_Text">Standard User</text:span>.</text:p>
          </text:list-item>
          <text:list-item>
            <text:p text:style-name="P62">People granted access to one or more ClientProfile records: <text:span text:style-name="Source_20_Text">Standard User</text:span> + <text:span text:style-name="Source_20_Text">Sensitive Authorized</text:span>. They still need to be added to the <text:span text:style-name="Source_20_Text">assignedUsers</text:span> of the specific ClientProfile records they're authorized for — being in the role alone doesn't grant access to any records, only the <text:span text:style-name="Emphasis">capability</text:span> to be granted access.</text:p>
          </text:list-item>
          <text:list-item>
            <text:p text:style-name="P63">The handful of coordinators: <text:span text:style-name="Source_20_Text">Standard User</text:span> + <text:span text:style-name="Source_20_Text">Sensitive Coordinator</text:span>.</text:p>
          </text:list-item>
        </text:list>
        <text:p text:style-name="Horizontal_20_Line"/>
        <text:h text:style-name="P2" text:outline-level="3">How sensitive access actually happens (the workflow)</text:h>
        <text:list text:style-name="L29">
          <text:list-item>
            <text:p text:style-name="P64">A Coordinator opens or creates a ClientProfile record.</text:p>
          </text:list-item>
          <text:list-item>
            <text:p text:style-name="P64">Coordinator sets the <text:span text:style-name="Source_20_Text">company</text:span> link on the ClientProfile to the relevant Company.</text:p>
          </text:list-item>
          <text:list-item>
            <text:p text:style-name="P64">Coordinator populates the sensitive data fields.</text:p>
          </text:list-item>
          <text:list-item>
            <text:p text:style-name="P64">Coordinator opens the <text:span text:style-name="Source_20_Text">assignedUsers</text:span> field and adds the specific users who should have access. (These users must already have the <text:span text:style-name="Source_20_Text">Sensitive Authorized</text:span> role on their user record. If they don't, an admin adds it first.)</text:p>
          </text:list-item>
          <text:list-item>
            <text:p text:style-name="P65">Those users can now see the ClientProfile panel populated on the Company detail view, open the record, and edit the data. All other users see nothing.</text:p>
          </text:list-item>
        </text:list>
        <text:p text:style-name="Horizontal_20_Line"/>
        <text:h text:style-name="P2" text:outline-level="3">How to test</text:h>
        <text:p text:style-name="P8">Create three test users:</text:p>
        <text:list text:style-name="L30">
          <text:list-item>
            <text:p text:style-name="P66"><text:span text:style-name="Source_20_Text">test_standard</text:span> — only Standard User role.</text:p>
          </text:list-item>
          <text:list-item>
            <text:p text:style-name="P66"><text:span text:style-name="Source_20_Text">test_authorized</text:span> — Standard User + Sensitive Authorized. Add them to <text:span text:style-name="Source_20_Text">assignedUsers</text:span> of exactly one ClientProfile record (linked to, say, "Acme Inc").</text:p>
          </text:list-item>
          <text:list-item>
            <text:p text:style-name="P67"><text:span text:style-name="Source_20_Text">test_coordinator</text:span> — Standard User + Sensitive Coordinator.</text:p>
          </text:list-item>
        </text:list>
        <text:p text:style-name="P8">Log in as each (use an incognito window — never test as admin, who bypasses everything) and verif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7">User</text:p>
              </table:table-cell>
              <table:table-cell table:style-name="Table12.A1" office:value-type="string">
                <text:p text:style-name="P7">Acme Inc detail view</text:p>
              </table:table-cell>
              <table:table-cell table:style-name="Table12.A1" office:value-type="string">
                <text:p text:style-name="P7">Beta Corp detail view (also has ClientProfile, but test_authorized is not on it)</text:p>
              </table:table-cell>
              <table:table-cell table:style-name="Table12.A1" office:value-type="string">
                <text:p text:style-name="P7">ClientProfile in nav/lists</text:p>
              </table:table-cell>
            </table:table-row>
          </table:table-header-rows>
          <table:table-row>
            <table:table-cell table:style-name="Table12.A1" office:value-type="string">
              <text:p text:style-name="P6">test_standard</text:p>
            </table:table-cell>
            <table:table-cell table:style-name="Table12.A1" office:value-type="string">
              <text:p text:style-name="P6">No ClientProfile panel</text:p>
            </table:table-cell>
            <table:table-cell table:style-name="Table12.A1" office:value-type="string">
              <text:p text:style-name="P6">No ClientProfile panel</text:p>
            </table:table-cell>
            <table:table-cell table:style-name="Table12.A1" office:value-type="string">
              <text:p text:style-name="P6">Not visible</text:p>
            </table:table-cell>
          </table:table-row>
          <text:soft-page-break/>
          <table:table-row>
            <table:table-cell table:style-name="Table12.A1" office:value-type="string">
              <text:p text:style-name="P6">test_authorized</text:p>
            </table:table-cell>
            <table:table-cell table:style-name="Table12.A1" office:value-type="string">
              <text:p text:style-name="P6">Panel visible, ClientProfile record visible and editable</text:p>
            </table:table-cell>
            <table:table-cell table:style-name="Table12.A1" office:value-type="string">
              <text:p text:style-name="P6">Panel visible, empty</text:p>
            </table:table-cell>
            <table:table-cell table:style-name="Table12.A1" office:value-type="string">
              <text:p text:style-name="P6">Not visible in nav (Read=Own restricts list views to own records)</text:p>
            </table:table-cell>
          </table:table-row>
          <table:table-row>
            <table:table-cell table:style-name="Table12.A1" office:value-type="string">
              <text:p text:style-name="P6">test_coordinator</text:p>
            </table:table-cell>
            <table:table-cell table:style-name="Table12.A1" office:value-type="string">
              <text:p text:style-name="P6">Panel visible, record visible and editable</text:p>
            </table:table-cell>
            <table:table-cell table:style-name="Table12.A1" office:value-type="string">
              <text:p text:style-name="P6">Panel visible, record visible and editable</text:p>
            </table:table-cell>
            <table:table-cell table:style-name="Table12.A1" office:value-type="string">
              <text:p text:style-name="Table_20_Contents">Visible, full list</text:p>
            </table:table-cell>
          </table:table-row>
        </table:table>
        <text:p text:style-name="P8">If any test case fails, the role config has an error — most commonly a Field Level override missing or set wrong.</text:p>
        <text:p text:style-name="Horizontal_20_Line"/>
        <text:p text:style-name="P8">Read through this and tell me where it's still unclear or wrong. Once you're satisfied, the natural next step is capturing it in the CBM How-To Guide as the <text:span text:style-name="Strong_20_Emphasis">Sensitive Sub-Entity Pattern</text:span> section.</text:p>
        <text:h text:style-name="Heading_20_2" text:outline-level="2">Please explain (Your Normal Rule)?</text:h>
        <text:p text:style-name="P9">11:36 PM</text:p>
        <text:p text:style-name="P8">Good catch — that was a lazy placeholder. Let me explain what I meant and then give you the actual options.</text:p>
        <text:h text:style-name="P2" text:outline-level="3">What "(your normal rule)" was doing</text:h>
        <text:p text:style-name="P8">The original scenario you described constrained two things explicitly:</text:p>
        <text:list text:style-name="L31">
          <text:list-item>
            <text:p text:style-name="P68"><text:span text:style-name="Strong_20_Emphasis">All users see all Company records</text:span> → that's why Read is locked to <text:span text:style-name="Source_20_Text">All</text:span> in my table.</text:p>
          </text:list-item>
          <text:list-item>
            <text:p text:style-name="P69"><text:span text:style-name="Strong_20_Emphasis">Sensitive data lives in ClientProfile, hidden from most users</text:span> → that's what the rest of the pattern handles.</text:p>
          </text:list-item>
        </text:list>
        <text:p text:style-name="P8">But you never said anything about who's allowed to <text:span text:style-name="Strong_20_Emphasis">edit, delete, or create</text:span> Company records. Those decisions are orthogonal to the sensitive-data pattern — they're regular CRM access decisions about how editable your Company directory should be. So I left placeholders rather than make up an answer.</text:p>
        <text:h text:style-name="P2" text:outline-level="3">The actual options for each column</text:h>
        <text:p text:style-name="P8">These are the standard EspoCRM levels for the Company row in the Scope table:</text:p>
        <text:p text:style-name="P8"><text:span text:style-name="Strong_20_Emphasis">Create</text:span> (yes / no):</text:p>
        <text:list text:style-name="L32">
          <text:list-item>
            <text:p text:style-name="P70"><text:span text:style-name="Source_20_Text">yes</text:span> — anyone with this role can add a new Company to the system.</text:p>
          </text:list-item>
          <text:list-item>
            <text:p text:style-name="P71"><text:span text:style-name="Source_20_Text">no</text:span> — only roles that explicitly allow it (e.g., admin, a "Sales" role) can create Companies.</text:p>
          </text:list-item>
        </text:list>
        <text:p text:style-name="P8"><text:span text:style-name="Strong_20_Emphasis">Edit</text:span> (All / Team / Own / No):</text:p>
        <text:list text:style-name="L33">
          <text:list-item>
            <text:p text:style-name="P72"><text:span text:style-name="Source_20_Text">All</text:span> — anyone can edit any Company.</text:p>
          </text:list-item>
          <text:list-item>
            <text:p text:style-name="P72"><text:span text:style-name="Source_20_Text">Team</text:span> — only Companies whose <text:span text:style-name="Source_20_Text">teams</text:span> field includes a team the user belongs to.</text:p>
          </text:list-item>
          <text:list-item>
            <text:p text:style-name="P72"><text:span text:style-name="Source_20_Text">Own</text:span> — only Companies where the user is in <text:span text:style-name="Source_20_Text">assignedUser(s)</text:span>.</text:p>
          </text:list-item>
          <text:list-item>
            <text:p text:style-name="P73"><text:span text:style-name="Source_20_Text">No</text:span> — read-only; cannot edit any Company.</text:p>
          </text:list-item>
        </text:list>
        <text:p text:style-name="P8"><text:soft-page-break/><text:span text:style-name="Strong_20_Emphasis">Delete</text:span> (All / Team / Own / No):</text:p>
        <text:list text:style-name="L34">
          <text:list-item>
            <text:p text:style-name="P74">Same options as Edit. Usually set more restrictively than Edit.</text:p>
          </text:list-item>
        </text:list>
        <text:h text:style-name="P2" text:outline-level="3">Common patterns and which fits CBM</text:h>
        <text:p text:style-name="P8">Three typical patterns for a Company-like entity:</text:p>
        <text:p text:style-name="P8"><text:span text:style-name="Strong_20_Emphasis">Open editing</text:span> (low-control orgs): Create=yes, Edit=All, Delete=No. Anyone can add or edit any Company; nobody but admin can delete. Simple, good for small teams where data quality is enforced socially.</text:p>
        <text:p text:style-name="P8"><text:span text:style-name="Strong_20_Emphasis">Owned editing</text:span> (sales-style): Create=yes, Edit=Own, Delete=Own. You can add a Company, and only the person assigned to it can edit it. Good when each Company "belongs to" a single account manager.</text:p>
        <text:p text:style-name="P8"><text:span text:style-name="Strong_20_Emphasis">Team editing</text:span> (cohort/program-style): Create=yes, Edit=Team, Delete=No. You can edit any Company in your team's portfolio but not others. Good when staff work in distinct portfolios.</text:p>
        <text:p text:style-name="P8"><text:span text:style-name="Strong_20_Emphasis">Read-only directory</text:span> (high-control): Create=No, Edit=No, Delete=No. Only specific roles (e.g., a "Data Steward" role) can modify Companies. Everyone else just reads.</text:p>
        <text:p text:style-name="P8">For CBM specifically, my guess would be <text:span text:style-name="Strong_20_Emphasis">owned editing</text:span> or <text:span text:style-name="Strong_20_Emphasis">team editing</text:span> — staff/coordinators can edit Company records for the mentee businesses they work with, but not casually edit Companies they don't touch. But that's a real decision you should make, not something I should infer.</text:p>
        <text:h text:style-name="P2" text:outline-level="3">Plugging it back into the table</text:h>
        <text:p text:style-name="P8">Once you decide, the Standard User row in Section 1 becomes concrete. For example, if you pick "team editing":</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header-rows>
            <table:table-row>
              <table:table-cell table:style-name="Table13.A1" office:value-type="string">
                <text:p text:style-name="P7">Entity</text:p>
              </table:table-cell>
              <table:table-cell table:style-name="Table13.A1" office:value-type="string">
                <text:p text:style-name="P7">Access</text:p>
              </table:table-cell>
              <table:table-cell table:style-name="Table13.A1" office:value-type="string">
                <text:p text:style-name="P7">Create</text:p>
              </table:table-cell>
              <table:table-cell table:style-name="Table13.A1" office:value-type="string">
                <text:p text:style-name="P7">Read</text:p>
              </table:table-cell>
              <table:table-cell table:style-name="Table13.A1" office:value-type="string">
                <text:p text:style-name="P7">Edit</text:p>
              </table:table-cell>
              <table:table-cell table:style-name="Table13.A1" office:value-type="string">
                <text:p text:style-name="P7">Delete</text:p>
              </table:table-cell>
              <table:table-cell table:style-name="Table13.A1" office:value-type="string">
                <text:p text:style-name="P7">Stream</text:p>
              </table:table-cell>
            </table:table-row>
          </table:table-header-rows>
          <table:table-row>
            <table:table-cell table:style-name="Table13.A1" office:value-type="string">
              <text:p text:style-name="P6">Company</text:p>
            </table:table-cell>
            <table:table-cell table:style-name="Table13.A1" office:value-type="string">
              <text:p text:style-name="P6">enabled</text:p>
            </table:table-cell>
            <table:table-cell table:style-name="Table13.A1" office:value-type="string">
              <text:p text:style-name="P6">yes</text:p>
            </table:table-cell>
            <table:table-cell table:style-name="Table13.A1" office:value-type="string">
              <text:p text:style-name="P6">All</text:p>
            </table:table-cell>
            <table:table-cell table:style-name="Table13.A1" office:value-type="string">
              <text:p text:style-name="P6"><text:span text:style-name="Strong_20_Emphasis">Team</text:span></text:p>
            </table:table-cell>
            <table:table-cell table:style-name="Table13.A1" office:value-type="string">
              <text:p text:style-name="P6">No</text:p>
            </table:table-cell>
            <table:table-cell table:style-name="Table13.A1" office:value-type="string">
              <text:p text:style-name="P6">All</text:p>
            </table:table-cell>
          </table:table-row>
          <table:table-row>
            <table:table-cell table:style-name="Table13.A1" office:value-type="string">
              <text:p text:style-name="P6">ClientProfile</text:p>
            </table:table-cell>
            <table:table-cell table:style-name="Table13.A1" office:value-type="string">
              <text:p text:style-name="P6">disabled</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Table_20_Contents">—</text:p>
            </table:table-cell>
          </table:table-row>
        </table:table>
        <text:p text:style-name="P8">Or if "owned editing":</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P7">Entity</text:p>
              </table:table-cell>
              <table:table-cell table:style-name="Table14.A1" office:value-type="string">
                <text:p text:style-name="P7">Access</text:p>
              </table:table-cell>
              <table:table-cell table:style-name="Table14.A1" office:value-type="string">
                <text:p text:style-name="P7">Create</text:p>
              </table:table-cell>
              <table:table-cell table:style-name="Table14.A1" office:value-type="string">
                <text:p text:style-name="P7">Read</text:p>
              </table:table-cell>
              <table:table-cell table:style-name="Table14.A1" office:value-type="string">
                <text:p text:style-name="P7">Edit</text:p>
              </table:table-cell>
              <table:table-cell table:style-name="Table14.A1" office:value-type="string">
                <text:p text:style-name="P7">Delete</text:p>
              </table:table-cell>
              <table:table-cell table:style-name="Table14.A1" office:value-type="string">
                <text:p text:style-name="P7">Stream</text:p>
              </table:table-cell>
            </table:table-row>
          </table:table-header-rows>
          <table:table-row>
            <table:table-cell table:style-name="Table14.A1" office:value-type="string">
              <text:p text:style-name="P6">Company</text:p>
            </table:table-cell>
            <table:table-cell table:style-name="Table14.A1" office:value-type="string">
              <text:p text:style-name="P6">enabled</text:p>
            </table:table-cell>
            <table:table-cell table:style-name="Table14.A1" office:value-type="string">
              <text:p text:style-name="P6">yes</text:p>
            </table:table-cell>
            <table:table-cell table:style-name="Table14.A1" office:value-type="string">
              <text:p text:style-name="P6">All</text:p>
            </table:table-cell>
            <table:table-cell table:style-name="Table14.A1" office:value-type="string">
              <text:p text:style-name="P6"><text:span text:style-name="Strong_20_Emphasis">Own</text:span></text:p>
            </table:table-cell>
            <table:table-cell table:style-name="Table14.A1" office:value-type="string">
              <text:p text:style-name="P6"><text:span text:style-name="Strong_20_Emphasis">Own</text:span></text:p>
            </table:table-cell>
            <table:table-cell table:style-name="Table14.A1" office:value-type="string">
              <text:p text:style-name="P6">All</text:p>
            </table:table-cell>
          </table:table-row>
          <table:table-row>
            <table:table-cell table:style-name="Table14.A1" office:value-type="string">
              <text:p text:style-name="P6">ClientProfile</text:p>
            </table:table-cell>
            <table:table-cell table:style-name="Table14.A1" office:value-type="string">
              <text:p text:style-name="P6">disabled</text:p>
            </table:table-cell>
            <table:table-cell table:style-name="Table14.A1" office:value-type="string">
              <text:p text:style-name="P6">—</text:p>
            </table:table-cell>
            <table:table-cell table:style-name="Table14.A1" office:value-type="string">
              <text:p text:style-name="P6">—</text:p>
            </table:table-cell>
            <table:table-cell table:style-name="Table14.A1" office:value-type="string">
              <text:p text:style-name="P6">—</text:p>
            </table:table-cell>
            <table:table-cell table:style-name="Table14.A1" office:value-type="string">
              <text:p text:style-name="P6">—</text:p>
            </table:table-cell>
            <table:table-cell table:style-name="Table14.A1" office:value-type="string">
              <text:p text:style-name="Table_20_Contents">—</text:p>
            </table:table-cell>
          </table:table-row>
        </table:table>
        <text:p text:style-name="P8">The ClientProfile row stays the same regardless — it's disabled either way.</text:p>
        <text:p text:style-name="Horizontal_20_Line"/>
        <text:p text:style-name="P8"><text:span text:style-name="Strong_20_Emphasis">Decision:</text:span> Which Company edit pattern do you want — Open, Owned, Team, or Read-only? Once you tell me, I'll rewrite the role tables with the actual values filled in, so the whole spec is concrete.</text:p>
        <text:h text:style-name="Heading_20_2" text:outline-level="2"><text:soft-page-break/>I assume that we could set up a team role in addition to a Standard role? So the standard role would allow a user to edit companies that they were an owner (IE they created), or they could edit companies if they were on the "Data Integrity Team". Otherwise, they would not be able to edit a company even if they saw an error that needed correction.</text:h>
        <text:p text:style-name="P9">11:42 PM</text:p>
        <text:p text:style-name="P8">Yes — that composition works exactly as you've described, and it's the right way to think about it. Let me explain the mechanism and the concrete config.</text:p>
        <text:h text:style-name="P2" text:outline-level="3">The merging rule that makes this work</text:h>
        <text:p text:style-name="P8">When a user has multiple roles in EspoCRM, the roles are merged and <text:span text:style-name="Strong_20_Emphasis">the most permissive level wins</text:span>. So if Standard User says Edit=Own and Data Integrity says Edit=All, a user who has both ends up with Edit=All on Company. A user with only Standard stays at Edit=Own. This is exactly the additive layering you want.</text:p>
        <text:h text:style-name="P2" text:outline-level="3">Two ways to give someone the Data Integrity role</text:h>
        <text:p text:style-name="P8">This is the EspoCRM feature you may not have realized exists: <text:span text:style-name="Strong_20_Emphasis">a role can be attached to a team, and every member of that team automatically inherits the role.</text:span></text:p>
        <text:list text:style-name="L35">
          <text:list-item>
            <text:p text:style-name="P75"><text:span text:style-name="Strong_20_Emphasis">Direct assignment:</text:span> Administration &gt; Users &gt; [user] &gt; Roles field → add Data Integrity role to specific users.</text:p>
          </text:list-item>
          <text:list-item>
            <text:p text:style-name="P76"><text:span text:style-name="Strong_20_Emphasis">Team-based assignment (better for your case):</text:span> Create a <text:span text:style-name="Source_20_Text">Data Integrity Team</text:span>, attach the Data Integrity role to that team's Roles field, then just add or remove users from the team membership. The role follows team membership automatically.</text:p>
          </text:list-item>
        </text:list>
        <text:p text:style-name="P8">The team-based approach is cleaner because membership management lives in one place — you don't have to touch each user record when someone joins or leaves the data integrity group.</text:p>
        <text:h text:style-name="P2" text:outline-level="3">The updated configuration</text:h>
        <text:h text:style-name="P3" text:outline-level="4">Updated Role 1: Standard User (modified)</text:h>
        <text:p text:style-name="P8">Change the Company row in Section 1 (Scope Level Permissi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P7">Entity</text:p>
              </table:table-cell>
              <table:table-cell table:style-name="Table15.A1" office:value-type="string">
                <text:p text:style-name="P7">Access</text:p>
              </table:table-cell>
              <table:table-cell table:style-name="Table15.A1" office:value-type="string">
                <text:p text:style-name="P7">Create</text:p>
              </table:table-cell>
              <table:table-cell table:style-name="Table15.A1" office:value-type="string">
                <text:p text:style-name="P7">Read</text:p>
              </table:table-cell>
              <table:table-cell table:style-name="Table15.A1" office:value-type="string">
                <text:p text:style-name="P7">Edit</text:p>
              </table:table-cell>
              <table:table-cell table:style-name="Table15.A1" office:value-type="string">
                <text:p text:style-name="P7">Delete</text:p>
              </table:table-cell>
              <table:table-cell table:style-name="Table15.A1" office:value-type="string">
                <text:p text:style-name="P7">Stream</text:p>
              </table:table-cell>
            </table:table-row>
          </table:table-header-rows>
          <table:table-row>
            <table:table-cell table:style-name="Table15.A1" office:value-type="string">
              <text:p text:style-name="P6">Company</text:p>
            </table:table-cell>
            <table:table-cell table:style-name="Table15.A1" office:value-type="string">
              <text:p text:style-name="P6">enabled</text:p>
            </table:table-cell>
            <table:table-cell table:style-name="Table15.A1" office:value-type="string">
              <text:p text:style-name="P6">yes</text:p>
            </table:table-cell>
            <table:table-cell table:style-name="Table15.A1" office:value-type="string">
              <text:p text:style-name="P6">All</text:p>
            </table:table-cell>
            <table:table-cell table:style-name="Table15.A1" office:value-type="string">
              <text:p text:style-name="P6"><text:span text:style-name="Strong_20_Emphasis">Own</text:span></text:p>
            </table:table-cell>
            <table:table-cell table:style-name="Table15.A1" office:value-type="string">
              <text:p text:style-name="P6">No</text:p>
            </table:table-cell>
            <table:table-cell table:style-name="Table15.A1" office:value-type="string">
              <text:p text:style-name="P6">All</text:p>
            </table:table-cell>
          </table:table-row>
          <table:table-row>
            <table:table-cell table:style-name="Table15.A1" office:value-type="string">
              <text:p text:style-name="P6">ClientProfile</text:p>
            </table:table-cell>
            <table:table-cell table:style-name="Table15.A1" office:value-type="string">
              <text:p text:style-name="P6">disabled</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Table_20_Contents">—</text:p>
            </table:table-cell>
          </table:table-row>
        </table:table>
        <text:p text:style-name="P8">Section 2 (Field Level on <text:span text:style-name="Source_20_Text">Company.clientProfile</text:span>) unchanged: Read=No, Edit=No.</text:p>
        <text:p text:style-name="P8"><text:span text:style-name="Strong_20_Emphasis">Effect:</text:span> Every user can see every Company but can only edit Companies where they are the <text:span text:style-name="Source_20_Text">assignedUser</text:span> (typically because they created the record — see note below).</text:p>
        <text:h text:style-name="P3" text:outline-level="4">New Role: Data Integrity</text:h>
        <text:p text:style-name="P8">Administration &gt; Roles &gt; Create. Name it <text:span text:style-name="Source_20_Text">Data Integrity</text:span>.</text:p>
        <text:p text:style-name="P8"><text:soft-page-break/><text:span text:style-name="Strong_20_Emphasis">Section 1 — Scope Level Permissions:</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D"/>
          <table:table-column table:style-name="Table16.G"/>
          <table:table-header-rows>
            <table:table-row>
              <table:table-cell table:style-name="Table16.A1" office:value-type="string">
                <text:p text:style-name="P7">Entity</text:p>
              </table:table-cell>
              <table:table-cell table:style-name="Table16.A1" office:value-type="string">
                <text:p text:style-name="P7">Access</text:p>
              </table:table-cell>
              <table:table-cell table:style-name="Table16.A1" office:value-type="string">
                <text:p text:style-name="P7">Create</text:p>
              </table:table-cell>
              <table:table-cell table:style-name="Table16.A1" office:value-type="string">
                <text:p text:style-name="P7">Read</text:p>
              </table:table-cell>
              <table:table-cell table:style-name="Table16.A1" office:value-type="string">
                <text:p text:style-name="P7">Edit</text:p>
              </table:table-cell>
              <table:table-cell table:style-name="Table16.A1" office:value-type="string">
                <text:p text:style-name="P7">Delete</text:p>
              </table:table-cell>
              <table:table-cell table:style-name="Table16.A1" office:value-type="string">
                <text:p text:style-name="P7">Stream</text:p>
              </table:table-cell>
            </table:table-row>
          </table:table-header-rows>
          <table:table-row>
            <table:table-cell table:style-name="Table16.A1" office:value-type="string">
              <text:p text:style-name="P6">Company</text:p>
            </table:table-cell>
            <table:table-cell table:style-name="Table16.A1" office:value-type="string">
              <text:p text:style-name="P6">enabled</text:p>
            </table:table-cell>
            <table:table-cell table:style-name="Table16.A1" office:value-type="string">
              <text:p text:style-name="P6">not-set</text:p>
            </table:table-cell>
            <table:table-cell table:style-name="Table16.A1" office:value-type="string">
              <text:p text:style-name="P6">not-set</text:p>
            </table:table-cell>
            <table:table-cell table:style-name="Table16.A1" office:value-type="string">
              <text:p text:style-name="P6"><text:span text:style-name="Strong_20_Emphasis">All</text:span></text:p>
            </table:table-cell>
            <table:table-cell table:style-name="Table16.A1" office:value-type="string">
              <text:p text:style-name="P6">not-set</text:p>
            </table:table-cell>
            <table:table-cell table:style-name="Table16.A1" office:value-type="string">
              <text:p text:style-name="Table_20_Contents">not-set</text:p>
            </table:table-cell>
          </table:table-row>
        </table:table>
        <text:p text:style-name="P8">Leave everything else as <text:span text:style-name="Source_20_Text">not-set</text:span> — the role only needs to <text:span text:style-name="Emphasis">add</text:span> edit power. The user's other roles (Standard User) handle the rest, and "not-set" means "don't override what other roles say."</text:p>
        <text:p text:style-name="P8"><text:span text:style-name="Strong_20_Emphasis">Section 2 — Field Level Permissions:</text:span> none. This role isn't about sensitive data; ignore ClientProfile entirely.</text:p>
        <text:p text:style-name="P8"><text:span text:style-name="Strong_20_Emphasis">Section 3 — Permissions:</text:span> none specific.</text:p>
        <text:h text:style-name="P3" text:outline-level="4">New Team: Data Integrity Team</text:h>
        <text:list text:style-name="L36">
          <text:list-item>
            <text:p text:style-name="P77">Administration &gt; Teams &gt; Create. Name it <text:span text:style-name="Source_20_Text">Data Integrity Team</text:span>.</text:p>
          </text:list-item>
          <text:list-item>
            <text:p text:style-name="P77">In the team's edit form, find the <text:span text:style-name="Strong_20_Emphasis">Roles</text:span> field. Add <text:span text:style-name="Source_20_Text">Data Integrity</text:span> to it.</text:p>
          </text:list-item>
          <text:list-item>
            <text:p text:style-name="P77">Save.</text:p>
          </text:list-item>
          <text:list-item>
            <text:p text:style-name="P78">Add users to the team via the team's members panel, or via each User &gt; Teams field.</text:p>
          </text:list-item>
        </text:list>
        <text:h text:style-name="P2" text:outline-level="3">What users experience</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7">User profile</text:p>
              </table:table-cell>
              <table:table-cell table:style-name="Table17.A1" office:value-type="string">
                <text:p text:style-name="P7">Roles</text:p>
              </table:table-cell>
              <table:table-cell table:style-name="Table17.A1" office:value-type="string">
                <text:p text:style-name="P7">Effect on Company</text:p>
              </table:table-cell>
            </table:table-row>
          </table:table-header-rows>
          <table:table-row>
            <table:table-cell table:style-name="Table17.A1" office:value-type="string">
              <text:p text:style-name="P6">Regular staff</text:p>
            </table:table-cell>
            <table:table-cell table:style-name="Table17.A1" office:value-type="string">
              <text:p text:style-name="P6">Standard User</text:p>
            </table:table-cell>
            <table:table-cell table:style-name="Table17.A1" office:value-type="string">
              <text:p text:style-name="P6">Reads any Company. Edits only Companies they're the assignedUser of.</text:p>
            </table:table-cell>
          </table:table-row>
          <table:table-row>
            <table:table-cell table:style-name="Table17.A1" office:value-type="string">
              <text:p text:style-name="P6">Data integrity volunteer</text:p>
            </table:table-cell>
            <table:table-cell table:style-name="Table17.A1" office:value-type="string">
              <text:p text:style-name="P6">Standard User + Data Integrity (via team)</text:p>
            </table:table-cell>
            <table:table-cell table:style-name="Table17.A1" office:value-type="string">
              <text:p text:style-name="P6">Reads any Company. Edits any Company.</text:p>
            </table:table-cell>
          </table:table-row>
          <table:table-row>
            <table:table-cell table:style-name="Table17.A1" office:value-type="string">
              <text:p text:style-name="P6">Regular staff who sees an error on a Company they don't own</text:p>
            </table:table-cell>
            <table:table-cell table:style-name="Table17.A1" office:value-type="string">
              <text:p text:style-name="P6">Standard User</text:p>
            </table:table-cell>
            <table:table-cell table:style-name="Table17.A1" office:value-type="string">
              <text:p text:style-name="Table_20_Contents">Cannot edit. Has to flag it to someone on the Data Integrity Team.</text:p>
            </table:table-cell>
          </table:table-row>
        </table:table>
        <text:h text:style-name="P2" text:outline-level="3">One important nuance: "owner" = <text:span text:style-name="Source_20_Text">assignedUser</text:span>, not <text:span text:style-name="Source_20_Text">createdBy</text:span></text:h>
        <text:p text:style-name="P8">You said "companies that they were an owner (IE they created)." EspoCRM's <text:span text:style-name="Source_20_Text">Edit=Own</text:span> checks the <text:span text:style-name="Source_20_Text">assignedUser</text:span> field, <text:span text:style-name="Strong_20_Emphasis">not the </text:span><text:span text:style-name="Strong_20_Emphasis"><text:span text:style-name="Source_20_Text">createdBy</text:span></text:span><text:span text:style-name="Strong_20_Emphasis"> field</text:span>. These are usually the same for fresh records — by default, when you create a Company, you become its assignedUser automatically. But if a Company is later reassigned to someone else, Edit=Own access transfers with the assignment. The original creator loses edit access.</text:p>
        <text:p text:style-name="P8">Two implications:</text:p>
        <text:list text:style-name="L37">
          <text:list-item>
            <text:p text:style-name="P79">If you want "the creator can always edit, even after reassignment," that's a different model and requires either keeping the creator in a Collaborators or <text:span text:style-name="Source_20_Text">assignedUsers</text:span> field (which means enabling Multiple Assigned Users on Company), or a more custom approach.</text:p>
          </text:list-item>
          <text:list-item>
            <text:p text:style-name="P80">If you want assignment-based editing (the default Edit=Own behavior), then "owner" means "currently assigned," which may or may not match your intent.</text:p>
          </text:list-item>
        </text:list>
        <text:p text:style-name="P8">For most CRMs the assignment-based model is what people actually want — it tracks who currently has responsibility, not who originally entered the data. If that fits, no change needed.</text:p>
        <text:h text:style-name="P2" text:outline-level="3"><text:soft-page-break/>Composition recap</text:h>
        <text:p text:style-name="P8">Three additive roles, applied to users in this pattern:</text:p>
        <text:list text:style-name="L38">
          <text:list-item>
            <text:p text:style-name="P81"><text:span text:style-name="Strong_20_Emphasis">Standard User</text:span> — every user has this. Read all Companies. Edit own. ClientProfile completely hidden.</text:p>
          </text:list-item>
          <text:list-item>
            <text:p text:style-name="P81"><text:span text:style-name="Strong_20_Emphasis">Sensitive Authorized</text:span> — added to users who can see at least one ClientProfile. Unlocks the ClientProfile panel and lets them see/edit ClientProfile records they're assigned to.</text:p>
          </text:list-item>
          <text:list-item>
            <text:p text:style-name="P81"><text:span text:style-name="Strong_20_Emphasis">Data Integrity</text:span> — attached to the Data Integrity Team. Added to a user's effective permissions by adding them to that team. Unlocks Edit=All on Company.</text:p>
          </text:list-item>
          <text:list-item>
            <text:p text:style-name="P82"><text:span text:style-name="Strong_20_Emphasis">Sensitive Coordinator</text:span> — added to the small group who manages ClientProfile records and <text:span text:style-name="Source_20_Text">assignedUsers</text:span>.</text:p>
          </text:list-item>
        </text:list>
        <text:p text:style-name="P8">A single user can have any combination. Effects merge to the most permissive setting.</text:p>
        <text:p text:style-name="Horizontal_20_Line"/>
        <text:p text:style-name="P8"><text:span text:style-name="Strong_20_Emphasis">One question before we proceed:</text:span> for the "owner" semantic — do you want <text:span text:style-name="Strong_20_Emphasis">assignment-based</text:span> (default Edit=Own behavior, transfers with reassignment) or <text:span text:style-name="Strong_20_Emphasis">creator-based</text:span> (whoever first entered the record always retains edit)? The first is essentially free; the second needs a different mechanism. Tell me which, and I'll lock the final spec.</text:p>
        <text:h text:style-name="Heading_20_2" text:outline-level="2">We will use assignment based owner semantic.</text:h>
        <text:p text:style-name="P9">11:50 PM</text:p>
        <text:p text:style-name="P8">Locked. EspoCRM's default <text:span text:style-name="Source_20_Text">Edit=Own</text:span> checks <text:span text:style-name="Source_20_Text">assignedUser</text:span>, which transfers cleanly with any reassignment — exactly the semantic you want. No extra configuration needed beyond what's already in the spec.</text:p>
        <text:h text:style-name="P2" text:outline-level="3">The spec is complete</text:h>
        <text:p text:style-name="P8">Quick recap of everything we built for the <text:span text:style-name="Strong_20_Emphasis">Sensitive Sub-Entity Pattern</text:span>:</text:p>
        <text:p text:style-name="P8"><text:span text:style-name="Strong_20_Emphasis">Entity setup</text:span></text:p>
        <text:list text:style-name="L39">
          <text:list-item>
            <text:p text:style-name="P83">ClientProfile entity created</text:p>
          </text:list-item>
          <text:list-item>
            <text:p text:style-name="P83">One-to-one relationship to Company (creates <text:span text:style-name="Source_20_Text">clientProfile</text:span> link field on Company, <text:span text:style-name="Source_20_Text">company</text:span> link field on ClientProfile)</text:p>
          </text:list-item>
          <text:list-item>
            <text:p text:style-name="P84">Multiple Assigned Users enabled on ClientProfile</text:p>
          </text:list-item>
        </text:list>
        <text:p text:style-name="P8"><text:span text:style-name="Strong_20_Emphasis">Four roles</text:span></text:p>
        <text:list text:style-name="L40">
          <text:list-item>
            <text:p text:style-name="P85"><text:span text:style-name="Strong_20_Emphasis">Standard User</text:span> — Company: Read=All, Edit=Own, Create=yes, Delete=No / ClientProfile: disabled / Field Level on Company.clientProfile = Read=No, Edit=No</text:p>
          </text:list-item>
          <text:list-item>
            <text:p text:style-name="P85"><text:span text:style-name="Strong_20_Emphasis">Sensitive Authorized</text:span> — ClientProfile: Read=Own, Edit=Own / Field Level on Company.clientProfile = Read=Yes (rest not-set)</text:p>
          </text:list-item>
          <text:list-item>
            <text:p text:style-name="P85"><text:span text:style-name="Strong_20_Emphasis">Sensitive Coordinator</text:span> — ClientProfile: Read=All, Edit=All, Create=yes, Delete=All, Stream=All / Field Level on Company.clientProfile = Read=Yes / Assignment Permission = All</text:p>
          </text:list-item>
          <text:list-item>
            <text:p text:style-name="P86"><text:span text:style-name="Strong_20_Emphasis">Data Integrity</text:span> — Company: Edit=All (everything else not-set)</text:p>
          </text:list-item>
        </text:list>
        <text:p text:style-name="P8"><text:soft-page-break/><text:span text:style-name="Strong_20_Emphasis">One team</text:span></text:p>
        <text:list text:style-name="L41">
          <text:list-item>
            <text:p text:style-name="P87">Data Integrity Team, with the Data Integrity role attached to its Roles field</text:p>
          </text:list-item>
        </text:list>
        <text:p text:style-name="P8"><text:span text:style-name="Strong_20_Emphasis">User assignment pattern</text:span></text:p>
        <text:list text:style-name="L42">
          <text:list-item>
            <text:p text:style-name="P88">Everyone: Standard User</text:p>
          </text:list-item>
          <text:list-item>
            <text:p text:style-name="P88">Layer Sensitive Authorized on anyone who can ever be granted access to any ClientProfile</text:p>
          </text:list-item>
          <text:list-item>
            <text:p text:style-name="P88">Add to Data Integrity Team to grant elevated Company edit rights</text:p>
          </text:list-item>
          <text:list-item>
            <text:p text:style-name="P89">Sensitive Coordinator goes to the small group who manages ClientProfile access</text:p>
          </text:list-item>
        </text:list>
        <text:p text:style-name="P8"><text:span text:style-name="Strong_20_Emphasis">Test plan</text:span></text:p>
        <text:list text:style-name="L43">
          <text:list-item>
            <text:p text:style-name="P90">Three test users (test_standard, test_authorized, test_coordinator), tested in incognito windows — never tested as admin</text:p>
          </text:list-item>
        </text:list>
        <text:h text:style-name="P2" text:outline-level="3">Next step</text:h>
        <text:p text:style-name="P8">Capture this in the CBM EspoCRM How-To Guide as a new <text:span text:style-name="Strong_20_Emphasis">Security &gt; Sensitive Sub-Entity Pattern</text:span> section.</text:p>
        <text:p text:style-name="P8">Please upload the current <text:span text:style-name="Source_20_Text">CBM-EspoCRM-HowTo.docx</text:span>. I'll draft the addition as a surgical insert — preserving existing content, applying the output standards (revision control table, change log entry, "Last Updated" timestamp in MM-DD-YY HH:MM format), and showing you the proposed text before committing. After your review, I'll regenerate the .docx and you can commit/push at session end as usual.</text:p>
        <text:h text:style-name="Heading_20_2" text:outline-level="2">Whoa... Not just yet.</text:h>
        <text:p text:style-name="P9">11:51 PM</text:p>
        <text:p text:style-name="P8">Understood — stepping back. What would you like to do next?</text:p>
        <text:h text:style-name="Heading_20_2" text:outline-level="2">Lets expand our scope a little. We have standard users that can view all companies, and never see sensitive information. And we have users on the data integrity team that can view edit all companies and sensitive information. But we also have mentors that need to be able to access the sensitive information only for the companies that they are owners. They cannot see or edit sensitive information for non-owned companies.</text:h>
        <text:p text:style-name="P9">11:55 PM</text:p>
        <text:p text:style-name="P8">This is a clean expansion, but it introduces a new mechanism that's worth thinking through before we touch any configuration. Let me lay out the conceptual model first, then surface the one decision it forces.</text:p>
        <text:h text:style-name="P2" text:outline-level="3"><text:soft-page-break/>The key insight: this is not a new role</text:h>
        <text:p text:style-name="P8">Mentors need exactly the permissions that the <text:span text:style-name="Strong_20_Emphasis">Sensitive Authorized</text:span> role already provides — Read=Own, Edit=Own on ClientProfile, with the <text:span text:style-name="Source_20_Text">Company.clientProfile</text:span> link field unhidden. What's different is <text:span text:style-name="Emphasis">how their access list gets populated</text:span>.</text:p>
        <text:p text:style-name="P8">For the Coordinator-managed case we already designed:</text:p>
        <text:list text:style-name="L44">
          <text:list-item>
            <text:p text:style-name="P91">Coordinator manually picks users and adds them to <text:span text:style-name="Source_20_Text">ClientProfile.assignedUsers</text:span>.</text:p>
          </text:list-item>
        </text:list>
        <text:p text:style-name="P8">For the mentor case you just described:</text:p>
        <text:list text:style-name="L45">
          <text:list-item>
            <text:p text:style-name="P92">The current owner of the Company (the Company's <text:span text:style-name="Source_20_Text">assignedUser</text:span>) should automatically be in the related <text:span text:style-name="Source_20_Text">ClientProfile.assignedUsers</text:span>.</text:p>
          </text:list-item>
        </text:list>
        <text:p text:style-name="P8">Both mechanisms write to the same field. The role doesn't care how a user got into the list — it just sees who's there. So mentors get the <text:span text:style-name="Strong_20_Emphasis">Sensitive Authorized</text:span> role assigned to their user record, and the automation does the rest.</text:p>
        <text:p text:style-name="P8">This means:</text:p>
        <text:list text:style-name="L46">
          <text:list-item>
            <text:p text:style-name="P93"><text:span text:style-name="Strong_20_Emphasis">No new role definition</text:span> is needed for mentors.</text:p>
          </text:list-item>
          <text:list-item>
            <text:p text:style-name="P93"><text:span text:style-name="Strong_20_Emphasis">A workflow rule</text:span> is needed to keep <text:span text:style-name="Source_20_Text">ClientProfile.assignedUsers</text:span> in sync with the related <text:span text:style-name="Source_20_Text">Company.assignedUser</text:span>.</text:p>
          </text:list-item>
          <text:list-item>
            <text:p text:style-name="P94"><text:span text:style-name="Strong_20_Emphasis">Manual Coordinator grants still work</text:span> alongside the automation — the two mechanisms coexist on the same field.</text:p>
          </text:list-item>
        </text:list>
        <text:h text:style-name="P2" text:outline-level="3">The decision this forces</text:h>
        <text:p text:style-name="P8">Here's the question that has to be answered before the workflow can be specified:</text:p>
        <text:h text:style-name="P3" text:outline-level="4">Plain-language question</text:h>
        <text:p text:style-name="P8">When a Company is reassigned from one mentor to another, what should automatically happen to the previous mentor's access to that Company's sensitive data?</text:p>
        <text:h text:style-name="P3" text:outline-level="4">Concrete example</text:h>
        <text:p text:style-name="P8">Carlos has been mentoring Acme Inc. for six months. The workflow has him in <text:span text:style-name="Source_20_Text">Acme's ClientProfile.assignedUsers</text:span>, so he can see and edit Acme's sensitive data. In Q2, the staff reassigns Acme to Priya — <text:span text:style-name="Source_20_Text">Acme.assignedUser</text:span> changes from Carlos to Priya. The workflow adds Priya to <text:span text:style-name="Source_20_Text">ClientProfile.assignedUsers</text:span>. The question is: what happens to Carlos's entry?</text:p>
        <text:h text:style-name="P3" text:outline-level="4">The two options</text:h>
        <text:p text:style-name="P8"><text:span text:style-name="Strong_20_Emphasis">Option A — Additive only.</text:span> The workflow only ever <text:span text:style-name="Emphasis">adds</text:span> users; never removes. Carlos remains in <text:span text:style-name="Source_20_Text">assignedUsers</text:span> until a Coordinator manually removes him. Behavior the user notices: Carlos can still open Acme's ClientProfile and edit it after the reassignment, until cleanup happens.</text:p>
        <text:p text:style-name="P8"><text:soft-page-break/><text:span text:style-name="Strong_20_Emphasis">Option B — Auto-revoke previous owner.</text:span> The workflow detects that Carlos was Acme's previous <text:span text:style-name="Source_20_Text">assignedUser</text:span> and removes him from <text:span text:style-name="Source_20_Text">ClientProfile.assignedUsers</text:span> in the same step that adds Priya. Behavior the user notices: Carlos loses access to Acme the moment the reassignment is saved.</text:p>
        <text:h text:style-name="P3" text:outline-level="4">Why this matters</text:h>
        <text:p text:style-name="P8">Sensitive data shouldn't linger with people whose role has changed — that's the privacy principle. But auto-revocation can be over-aggressive: if a Coordinator had explicitly added Carlos for some other reason (e.g., "Carlos is a domain expert we want to keep on this case even after reassignment"), Option B would silently remove him. The Coordinator wouldn't necessarily know to re-add.</text:p>
        <text:p text:style-name="P8">There's also an audit-trail consideration: Option B makes access turnover automatic and silent; Option A makes every revocation an explicit, attributable action by a person.</text:p>
        <text:h text:style-name="P3" text:outline-level="4">Cost of the recommended option</text:h>
        <text:p text:style-name="P8">Option A's cost is operational: stale access can linger if Coordinators don't clean it up. Mitigation is a Coordinator dashboard showing "ClientProfiles where <text:span text:style-name="Source_20_Text">assignedUsers</text:span> includes someone who isn't the current Company owner" — making stale access visible and easy to clean up.</text:p>
        <text:h text:style-name="P3" text:outline-level="4">Recommendation</text:h>
        <text:p text:style-name="P8"><text:span text:style-name="Strong_20_Emphasis">Option A.</text:span> Explicit revocation is safer than implicit. Privacy is preserved through a visible cleanup workflow rather than silent automation that can over-remove.</text:p>
        <text:h text:style-name="P3" text:outline-level="4">Follow-on detail (not part of the core decision)</text:h>
        <text:p text:style-name="P8">If you go with Option A, the additional pieces are:</text:p>
        <text:list text:style-name="L47">
          <text:list-item>
            <text:p text:style-name="P95">A list view or dashlet for Coordinators titled "Sensitive Records with Stale Access" filtering ClientProfile records where any <text:span text:style-name="Source_20_Text">assignedUsers</text:span> entry doesn't match the related <text:span text:style-name="Source_20_Text">Company.assignedUser</text:span>.</text:p>
          </text:list-item>
          <text:list-item>
            <text:p text:style-name="P96">A documented cleanup expectation — e.g., "Coordinator reviews stale access weekly."</text:p>
          </text:list-item>
        </text:list>
        <text:p text:style-name="P8">If you go with Option B, the additional pieces are:</text:p>
        <text:list text:style-name="L48">
          <text:list-item>
            <text:p text:style-name="P97">A way to tag a user as "permanently authorized regardless of ownership" (probably a separate <text:span text:style-name="Source_20_Text">permanentlyAuthorized</text:span> link-multiple on ClientProfile) so the workflow knows not to remove them.</text:p>
          </text:list-item>
        </text:list>
        <text:h text:style-name="P3" text:outline-level="4">Decision request</text:h>
        <text:p text:style-name="P8">Approve <text:span text:style-name="Strong_20_Emphasis">Option A (additive only, manual cleanup)</text:span>, or argue for <text:span text:style-name="Strong_20_Emphasis">Option B (auto-revoke previous owner)</text:span>?</text:p>
        <text:p text:style-name="Horizontal_20_Line"/>
        <text:p text:style-name="P8">Once you decide, the workflow specification follows directly — it's a short EspoCRM workflow rule. We can also revisit whether mentors should be assigned the Sensitive Authorized role directly on their <text:soft-page-break/>user record, or via a "Mentors Team" with the role attached (same team-as-role-vehicle pattern we used for Data Integrity).</text:p>
        <text:h text:style-name="Heading_20_2" text:outline-level="2">Hold on... Sens<text:span text:style-name="T1">i</text:span>tive Authorized provides View All, and Edit All. Now View Own, Edit Own right?</text:h>
        <text:p text:style-name="P9">11:59 PM</text:p>
        <text:p text:style-name="P8">No — Sensitive Authorized has been Read=<text:span text:style-name="Strong_20_Emphasis">Own</text:span>, Edit=<text:span text:style-name="Strong_20_Emphasis">Own</text:span> throughout. You may be thinking of <text:span text:style-name="Strong_20_Emphasis">Sensitive Coordinator</text:span>, which is the All/All role.</text:p>
        <text:p text:style-name="P8">Quick reference on just the ClientProfile access levels across all four role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7">Role</text:p>
              </table:table-cell>
              <table:table-cell table:style-name="Table18.A1" office:value-type="string">
                <text:p text:style-name="P7">ClientProfile Read</text:p>
              </table:table-cell>
              <table:table-cell table:style-name="Table18.A1" office:value-type="string">
                <text:p text:style-name="P7">ClientProfile Edit</text:p>
              </table:table-cell>
            </table:table-row>
          </table:table-header-rows>
          <table:table-row>
            <table:table-cell table:style-name="Table18.A1" office:value-type="string">
              <text:p text:style-name="P6">Standard User</text:p>
            </table:table-cell>
            <table:table-cell table:style-name="Table18.A1" office:value-type="string">
              <text:p text:style-name="P6">(entity disabled — no access at all)</text:p>
            </table:table-cell>
            <table:table-cell table:style-name="Table18.A1" office:value-type="string">
              <text:p text:style-name="P6">—</text:p>
            </table:table-cell>
          </table:table-row>
          <table:table-row>
            <table:table-cell table:style-name="Table18.A1" office:value-type="string">
              <text:p text:style-name="P6">Sensitive Authorized</text:p>
            </table:table-cell>
            <table:table-cell table:style-name="Table18.A1" office:value-type="string">
              <text:p text:style-name="P6"><text:span text:style-name="Strong_20_Emphasis">Own</text:span></text:p>
            </table:table-cell>
            <table:table-cell table:style-name="Table18.A1" office:value-type="string">
              <text:p text:style-name="P6"><text:span text:style-name="Strong_20_Emphasis">Own</text:span></text:p>
            </table:table-cell>
          </table:table-row>
          <table:table-row>
            <table:table-cell table:style-name="Table18.A1" office:value-type="string">
              <text:p text:style-name="P6">Sensitive Coordinator</text:p>
            </table:table-cell>
            <table:table-cell table:style-name="Table18.A1" office:value-type="string">
              <text:p text:style-name="P6">All</text:p>
            </table:table-cell>
            <table:table-cell table:style-name="Table18.A1" office:value-type="string">
              <text:p text:style-name="P6">All</text:p>
            </table:table-cell>
          </table:table-row>
          <table:table-row>
            <table:table-cell table:style-name="Table18.A1" office:value-type="string">
              <text:p text:style-name="P6">Data Integrity</text:p>
            </table:table-cell>
            <table:table-cell table:style-name="Table18.A1" office:value-type="string">
              <text:p text:style-name="P6">(not-set — doesn't grant ClientProfile access on its own)</text:p>
            </table:table-cell>
            <table:table-cell table:style-name="Table18.A1" office:value-type="string">
              <text:p text:style-name="Table_20_Contents">—</text:p>
            </table:table-cell>
          </table:table-row>
        </table:table>
        <text:p text:style-name="P8">So mentors getting the Sensitive Authorized role means Read=Own and Edit=Own on ClientProfile — they see and edit only ClientProfile records where they're in <text:span text:style-name="Source_20_Text">assignedUsers</text:span>. The workflow we were just discussing populates <text:span text:style-name="Source_20_Text">assignedUsers</text:span> based on Company ownership, which is exactly what produces the "mentor sees only their owned Companies' sensitive data" behavior.</text:p>
        <text:p text:style-name="P8">A side note worth flagging: Data Integrity, as we defined it, only grants Company Edit=All — it does <text:span text:style-name="Strong_20_Emphasis">not</text:span> grant ClientProfile access. So Data Integrity Team members can edit any Company, but if they need to also access sensitive data on all Companies, they'd additionally need the Sensitive Coordinator role. Worth deciding whether Data Integrity should also imply sensitive access, but that's a separate question from the mentor one.</text:p>
        <text:p text:style-name="P8">Back to where we were: are we still going with <text:span text:style-name="Strong_20_Emphasis">Option A (additive only, manual cleanup)</text:span> for the reassignment behavior, or do you want Option B?</text:p>
        <text:h text:style-name="Heading_20_2" text:outline-level="2">I am leaning toward option A, but a few questions. If a mentor is already the owner of a company and clientprofile, they could add a new mentor and remove themselves?</text:h>
        <text:p text:style-name="P9">12:07 AM</text:p>
        <text:p text:style-name="P8">Good question — and the answer is <text:span text:style-name="Strong_20_Emphasis">no, by default they can't</text:span>, because of a setting we haven't talked about yet but which is exactly designed to prevent this: <text:span text:style-name="Strong_20_Emphasis">Assignment Permission</text:span>.</text:p>
        <text:h text:style-name="P2" text:outline-level="3">What Assignment Permission does</text:h>
        <text:p text:style-name="P8">Assignment Permission is a system-level permission in Section 3 of the Role config (the "Permissions" section I mentioned but didn't dwell on). It has three levels:</text:p>
        <text:list text:style-name="L49">
          <text:list-item>
            <text:p text:style-name="P98"><text:span text:style-name="Strong_20_Emphasis">No</text:span> — the user cannot modify any field that controls record ownership or access (the <text:span text:style-name="Source_20_Text">assignedUser</text:span>, <text:span text:style-name="Source_20_Text">assignedUsers</text:span>, <text:span text:style-name="Source_20_Text">teams</text:span>, or <text:span text:style-name="Source_20_Text">collaborators</text:span> fields on any record they touch).</text:p>
          </text:list-item>
          <text:list-item>
            <text:p text:style-name="P98"><text:soft-page-break/><text:span text:style-name="Strong_20_Emphasis">Team</text:span> — they can only assign to users who share at least one team with them.</text:p>
          </text:list-item>
          <text:list-item>
            <text:p text:style-name="P99"><text:span text:style-name="Strong_20_Emphasis">All</text:span> — they can freely modify ownership/access fields, assigning to any user.</text:p>
          </text:list-item>
        </text:list>
        <text:p text:style-name="P8">This is enforced separately from regular Edit access. A user can have Edit=Own on a record — meaning they can change the data fields — without being able to touch the <text:span text:style-name="Source_20_Text">assignedUsers</text:span> field. The field will render read-only for them.</text:p>
        <text:h text:style-name="P2" text:outline-level="3">What this means for your mentor scenario</text:h>
        <text:p text:style-name="P8">In our spec so far, we only set Assignment Permission explicitly on <text:span text:style-name="Strong_20_Emphasis">Sensitive Coordinator</text:span> (= All). For the other roles, we didn't address it — which means the system default (typically "no") applies.</text:p>
        <text:p text:style-name="P8">For a mentor (Standard User + Sensitive Authorized):</text:p>
        <text:list text:style-name="L50">
          <text:list-item>
            <text:p text:style-name="P100">They can open the ClientProfile they own and <text:span text:style-name="Strong_20_Emphasis">edit the sensitive data fields</text:span> (notes, financials, whatever's on the record).</text:p>
          </text:list-item>
          <text:list-item>
            <text:p text:style-name="P100">They <text:span text:style-name="Strong_20_Emphasis">cannot modify </text:span><text:span text:style-name="Strong_20_Emphasis"><text:span text:style-name="Source_20_Text">assignedUsers</text:span></text:span> — the field appears but is read-only for them. They cannot add a new mentor, and they cannot remove themselves.</text:p>
          </text:list-item>
          <text:list-item>
            <text:p text:style-name="P101">They <text:span text:style-name="Strong_20_Emphasis">cannot change </text:span><text:span text:style-name="Strong_20_Emphasis"><text:span text:style-name="Source_20_Text">Company.assignedUser</text:span></text:span> either — the same restriction applies to the Company side. They can't quietly reassign Acme to someone else.</text:p>
          </text:list-item>
        </text:list>
        <text:p text:style-name="P8">So a mentor is "locked into" the access list as defined by the workflow and the Coordinator. Only Sensitive Coordinator can modify the access list on a ClientProfile, and only someone with appropriate Assignment Permission can reassign a Company.</text:p>
        <text:h text:style-name="P2" text:outline-level="3">Make this explicit in the spec</text:h>
        <text:p text:style-name="P8">To leave nothing to defaults, set Assignment Permission explicitly per role:</text:p>
        <table:table table:name="Table19" table:style-name="Table19">
          <table:table-column table:style-name="Table19.A"/>
          <table:table-column table:style-name="Table19.B"/>
          <table:table-header-rows>
            <table:table-row>
              <table:table-cell table:style-name="Table19.A1" office:value-type="string">
                <text:p text:style-name="P7">Role</text:p>
              </table:table-cell>
              <table:table-cell table:style-name="Table19.A1" office:value-type="string">
                <text:p text:style-name="P7">Assignment Permission</text:p>
              </table:table-cell>
            </table:table-row>
          </table:table-header-rows>
          <table:table-row>
            <table:table-cell table:style-name="Table19.A1" office:value-type="string">
              <text:p text:style-name="P6">Standard User</text:p>
            </table:table-cell>
            <table:table-cell table:style-name="Table19.A1" office:value-type="string">
              <text:p text:style-name="P6"><text:span text:style-name="Strong_20_Emphasis">No</text:span></text:p>
            </table:table-cell>
          </table:table-row>
          <table:table-row>
            <table:table-cell table:style-name="Table19.A1" office:value-type="string">
              <text:p text:style-name="P6">Sensitive Authorized</text:p>
            </table:table-cell>
            <table:table-cell table:style-name="Table19.A1" office:value-type="string">
              <text:p text:style-name="P6"><text:span text:style-name="Strong_20_Emphasis">No</text:span></text:p>
            </table:table-cell>
          </table:table-row>
          <table:table-row>
            <table:table-cell table:style-name="Table19.A1" office:value-type="string">
              <text:p text:style-name="P6">Sensitive Coordinator</text:p>
            </table:table-cell>
            <table:table-cell table:style-name="Table19.A1" office:value-type="string">
              <text:p text:style-name="P6">All</text:p>
            </table:table-cell>
          </table:table-row>
          <table:table-row>
            <table:table-cell table:style-name="Table19.A1" office:value-type="string">
              <text:p text:style-name="P6">Data Integrity</text:p>
            </table:table-cell>
            <table:table-cell table:style-name="Table19.A1" office:value-type="string">
              <text:p text:style-name="Table_20_Contents">(see note below)</text:p>
            </table:table-cell>
          </table:table-row>
        </table:table>
        <text:p text:style-name="P8"><text:span text:style-name="Strong_20_Emphasis">Note on Data Integrity:</text:span> This role grants Edit=All on Company. If we leave Assignment Permission off (= No), then Data Integrity Team members can fix data errors but can NOT reassign Company ownership. If we set it to All, they can also handle ownership changes. My recommendation is <text:span text:style-name="Strong_20_Emphasis">No</text:span> — keep their job scoped to data quality, with ownership changes requiring a separate authority (admin or a designated reassignment role). But that's a separate decision you should make explicitly.</text:p>
        <text:h text:style-name="P2" text:outline-level="3">Related consideration: should mentors even see the <text:span text:style-name="Source_20_Text">assignedUsers</text:span> field?</text:h>
        <text:p text:style-name="P8">Even read-only, a mentor logged into a ClientProfile will see "this list contains Carlos and Priya and the Coordinator." That tells them who else has access to "their" client's sensitive data. Two views on this:</text:p>
        <text:list text:style-name="L51">
          <text:list-item>
            <text:p text:style-name="P102"><text:soft-page-break/><text:span text:style-name="Strong_20_Emphasis">Show it</text:span> — transparency. The mentor knows who else can see this info, which can be reassuring or relevant.</text:p>
          </text:list-item>
          <text:list-item>
            <text:p text:style-name="P103"><text:span text:style-name="Strong_20_Emphasis">Hide it</text:span> — minimize information leakage. Use Field Level Security on <text:span text:style-name="Source_20_Text">ClientProfile.assignedUsers</text:span> with Read=No for the Sensitive Authorized role. Coordinator's view is unaffected.</text:p>
          </text:list-item>
        </text:list>
        <text:p text:style-name="P8">Defaulting to "show it" is probably right (transparency is generally good), but worth a conscious choice.</text:p>
        <text:p text:style-name="Horizontal_20_Line"/>
        <text:p text:style-name="P8">So to summarize the answer to your question: <text:span text:style-name="Strong_20_Emphasis">No, a mentor cannot add a new mentor and remove themselves</text:span>, as long as Assignment Permission is set to <text:span text:style-name="Source_20_Text">No</text:span> (or left at default) on the Sensitive Authorized role. This protects the integrity of the access list against unilateral mentor action — only Coordinators can manage who has sensitive access.</text:p>
        <text:p text:style-name="P8">Want to lock in Assignment Permission = No on Standard User, Sensitive Authorized, and Data Integrity now, and keep the <text:span text:style-name="Source_20_Text">assignedUsers</text:span> field visible? Or any of those calls different?</text:p>
        <text:h text:style-name="Heading_20_2" text:outline-level="2">Not yet. So lets assume that we create a team called "Mentors", and we set the Assignment Permission to "Team". This would allow a mentor to add additional mentors, or transfer mentorship by removing themselves? We would trust our mentors to be able to assign other Mentors to a ClientRecord.</text:h>
        <text:p text:style-name="P9">12:12 AM</text:p>
        <text:p text:style-name="P8">Yes, this approach works exactly as you're describing, and it's actually a cleaner model for an environment where mentors are trusted peers. Let me walk through what it enables and where the edges are.</text:p>
        <text:h text:style-name="P2" text:outline-level="3">What becomes possible with Assignment Permission = Team + a Mentors team</text:h>
        <text:p text:style-name="P8">For a mentor with <text:span text:style-name="Source_20_Text">Sensitive Authorized</text:span> + Assignment Permission = Team, and membership in the <text:span text:style-name="Source_20_Text">Mentors</text:span> team:</text:p>
        <text:list text:style-name="L52">
          <text:list-item>
            <text:p text:style-name="P104"><text:span text:style-name="Strong_20_Emphasis">Add a fellow mentor as a co-mentor</text:span> on a ClientProfile they own — <text:span text:style-name="Source_20_Text">assignedUsers</text:span> field becomes editable, and they can add any user who's also in the Mentors team.</text:p>
          </text:list-item>
          <text:list-item>
            <text:p text:style-name="P104"><text:span text:style-name="Strong_20_Emphasis">Remove themselves</text:span> from <text:span text:style-name="Source_20_Text">assignedUsers</text:span> to step away from a client.</text:p>
          </text:list-item>
          <text:list-item>
            <text:p text:style-name="P104"><text:span text:style-name="Strong_20_Emphasis">Transfer mentorship</text:span> by adding the new mentor and then removing themselves — effectively a self-managed handoff.</text:p>
          </text:list-item>
          <text:list-item>
            <text:p text:style-name="P105"><text:span text:style-name="Strong_20_Emphasis">Reassign the Company itself</text:span> (set <text:span text:style-name="Source_20_Text">Company.assignedUser</text:span> to a different mentor) — same Team-level Assignment Permission applies to Company too, so they can reassign within the Mentors pool.</text:p>
          </text:list-item>
        </text:list>
        <text:h text:style-name="P2" text:outline-level="3"><text:soft-page-break/>What's still restricted</text:h>
        <text:p text:style-name="P8">The Team scope on Assignment Permission means mentors can only assign to <text:span text:style-name="Emphasis">users in their own team</text:span>. So:</text:p>
        <text:list text:style-name="L53">
          <text:list-item>
            <text:p text:style-name="P106">A mentor <text:span text:style-name="Strong_20_Emphasis">cannot add a non-mentor user</text:span> (a staff person, a Coordinator, a Data Integrity volunteer) to <text:span text:style-name="Source_20_Text">assignedUsers</text:span>. The target user must be in the Mentors team. This is actually a safety feature — it keeps mentors from accidentally or maliciously granting access to people outside the trusted pool.</text:p>
          </text:list-item>
          <text:list-item>
            <text:p text:style-name="P107">A mentor <text:span text:style-name="Strong_20_Emphasis">cannot remove a user who isn't in their teams</text:span>, or at least EspoCRM's behavior here is more conservative. If a Coordinator has specifically added an outside expert to a ClientProfile's <text:span text:style-name="Source_20_Text">assignedUsers</text:span>, the mentor likely can't yank that person out. (Worth empirically verifying when you build the test environment — EspoCRM's exact behavior on cross-team removal isn't documented as clearly as the add behavior.)</text:p>
          </text:list-item>
        </text:list>
        <text:h text:style-name="P2" text:outline-level="3">How the setup looks</text:h>
        <text:list text:style-name="L54">
          <text:list-item>
            <text:p text:style-name="P108"><text:span text:style-name="Strong_20_Emphasis">Create the Mentors team.</text:span> Administration &gt; Teams &gt; Create. Name: <text:span text:style-name="Source_20_Text">Mentors</text:span>.</text:p>
          </text:list-item>
          <text:list-item>
            <text:p text:style-name="P108"><text:span text:style-name="Strong_20_Emphasis">Attach the Sensitive Authorized role to the team.</text:span> In the team's Roles field, add <text:span text:style-name="Source_20_Text">Sensitive Authorized</text:span>. (Now adding a user to the team automatically gives them the role — single membership action, all permissions follow.)</text:p>
          </text:list-item>
          <text:list-item>
            <text:p text:style-name="P108"><text:span text:style-name="Strong_20_Emphasis">Update the Sensitive Authorized role</text:span> to set Assignment Permission = Team.</text:p>
          </text:list-item>
          <text:list-item>
            <text:p text:style-name="P109"><text:span text:style-name="Strong_20_Emphasis">Add all mentor users to the Mentors team.</text:span></text:p>
          </text:list-item>
        </text:list>
        <text:p text:style-name="P8">A user becoming a mentor = "add to Mentors team" — one step, role and assignment scope both come with it.</text:p>
        <text:h text:style-name="P2" text:outline-level="3">Interaction with the workflow (Option A)</text:h>
        <text:p text:style-name="P8">This is the wrinkle worth thinking about. Under Option A (workflow only adds, never removes), here's what happens when Mentor A transfers Acme to Mentor B by self-managed handoff:</text:p>
        <text:p text:style-name="P8"><text:span text:style-name="Strong_20_Emphasis">Step 1:</text:span> A opens Acme's ClientProfile, adds B to <text:span text:style-name="Source_20_Text">assignedUsers</text:span>. Now both A and B are listed. <text:span text:style-name="Emphasis">Workflow doesn't fire — the trigger is Company changes, not ClientProfile edits.</text:span></text:p>
        <text:p text:style-name="P8"><text:span text:style-name="Strong_20_Emphasis">Step 2:</text:span> A opens Acme's Company record and changes <text:span text:style-name="Source_20_Text">Company.assignedUser</text:span> from A to B. <text:span text:style-name="Emphasis">Workflow fires, adds B to </text:span><text:span text:style-name="Emphasis"><text:span text:style-name="Source_20_Text">ClientProfile.assignedUsers</text:span></text:span> — but B is already there, so no change.</text:p>
        <text:p text:style-name="P8"><text:span text:style-name="Strong_20_Emphasis">Step 3:</text:span> A still has Edit=Own on ClientProfile (still in <text:span text:style-name="Source_20_Text">assignedUsers</text:span>). A removes themselves from <text:span text:style-name="Source_20_Text">ClientProfile.assignedUsers</text:span>. Now only B remains.</text:p>
        <text:p text:style-name="P8"><text:span text:style-name="Strong_20_Emphasis">Result:</text:span> Clean transfer. Three actions by A. No Coordinator involvement needed.</text:p>
        <text:p text:style-name="P8">If A skips Step 3, A stays in <text:span text:style-name="Source_20_Text">assignedUsers</text:span> as a "co-mentor still on the case" — which might be desirable or not. The Coordinator's "stale access" dashboard would surface this (A in <text:span text:style-name="Source_20_Text">assignedUsers</text:span> but not the Company owner), and the Coordinator could prompt cleanup.</text:p>
        <text:h text:style-name="P2" text:outline-level="3"><text:soft-page-break/>One subtle caveat: the workflow can never fully self-correct</text:h>
        <text:p text:style-name="P8">Under Option A, here's a scenario the workflow doesn't handle:</text:p>
        <text:list text:style-name="L55">
          <text:list-item>
            <text:p text:style-name="P110">A is the Company owner. A removes themselves from <text:span text:style-name="Source_20_Text">ClientProfile.assignedUsers</text:span> (Step 3 above) but <text:span text:style-name="Strong_20_Emphasis">doesn't</text:span> reassign the Company. So Company.assignedUser still = A, but A is no longer in ClientProfile.assignedUsers.</text:p>
          </text:list-item>
          <text:list-item>
            <text:p text:style-name="P110">A no longer has access to the ClientProfile.</text:p>
          </text:list-item>
          <text:list-item>
            <text:p text:style-name="P111">The workflow doesn't fire (no Company.assignedUser change) and won't re-add A.</text:p>
          </text:list-item>
        </text:list>
        <text:p text:style-name="P8">This is "an owner can lock themselves out of the sensitive data without giving up ownership." Probably fine — it's an explicit user action with no harm done. But worth noting because it's a state the system permits.</text:p>
        <text:h text:style-name="P2" text:outline-level="3">My read</text:h>
        <text:p text:style-name="P8">This configuration (Mentors team + Assignment Permission = Team) is a real upgrade for the mentor scenario. It treats mentors as trusted operators within a defined pool, which seems to match CBM's actual operating model. The Coordinator role retains the broader authority (cross-team assignments, including non-mentors); mentors handle peer-to-peer handoffs themselves without Coordinator bottleneck.</text:p>
        <text:p text:style-name="P8"><text:span text:style-name="Strong_20_Emphasis">Recommendation:</text:span> Adopt this. Use <text:span text:style-name="Source_20_Text">Mentors</text:span> team as the vehicle for both the Sensitive Authorized role <text:span text:style-name="Emphasis">and</text:span> the assignment scope, and set Assignment Permission = Team on Sensitive Authorized.</text:p>
        <text:p text:style-name="P8">Want to lock this in along with the Option A workflow approach, or any more wrinkles to explore?</text:p>
        <text:h text:style-name="Heading_20_2" text:outline-level="2">Nice work. But now I need to add the FINAL wrinkle....</text:h>
        <text:p text:style-name="P9">12:18 AM</text:p>
        <text:p text:style-name="P8">Bring it on. What's the wrinkle?</text:p>
        <text:h text:style-name="Heading_20_2" text:outline-level="2">We have three types of sensitive information linked to three teams of users. We have Mentors, Sponsor Coordinators, and Partner Managers. There are three different entities that manage the sensitive information for each role, and the desired functionality is exactly the same as mentors, just for different types of information. And a user could be both a mentor and a partner manager.</text:h>
        <text:p text:style-name="P9">12:20 AM</text:p>
        <text:p text:style-name="P9">Validated pattern scalability and identified critical data model question</text:p>
        <text:p text:style-name="P8">Validated pattern scalability and identified critical data model question</text:p>
        <text:p text:style-name="P8">This is actually a clean generalization — the Sensitive Sub-Entity Pattern multiplies cleanly across as many sensitive types as you want, and EspoCRM's role-merging handles users in multiple teams without any special accommodation. A user in both Mentors and Partner Managers gets the Mentor <text:soft-page-break/>role's access to ClientProfile <text:span text:style-name="Emphasis">and</text:span> the Partner Manager role's access to PartnerProfile, independently. The two grants don't interact because each role targets a different entity.</text:p>
        <text:p text:style-name="P8">Before I sketch the full multi-instance configuration, I need to know how your data model is actually shaped. The setup differs noticeably between two possibilities.</text:p>
        <text:p text:style-name="P8"><text:span text:style-name="Strong_20_Emphasis">One question:</text:span> Are the three sensitive sub-entities all linked to the <text:span text:style-name="Strong_20_Emphasis">same parent entity</text:span> (Company), or to <text:span text:style-name="Strong_20_Emphasis">three different parent entities</text:span>?</text:p>
        <text:list text:style-name="L56">
          <text:list-item>
            <text:p text:style-name="P112"><text:span text:style-name="Strong_20_Emphasis">Same parent (one Company entity).</text:span> A single Company might have a ClientProfile <text:span text:style-name="Emphasis">and/or</text:span> a SponsorProfile <text:span text:style-name="Emphasis">and/or</text:span> a PartnerProfile — three optional one-to-one relationships hanging off the same Company. Any Company can have any combination of the three.</text:p>
          </text:list-item>
          <text:list-item>
            <text:p text:style-name="P113"><text:span text:style-name="Strong_20_Emphasis">Three different parents.</text:span> Client, Sponsor, and Partner are separate entities. Each has its own dedicated sensitive sub-entity (Client → ClientProfile, Sponsor → SponsorProfile, Partner → PartnerProfile). An organization is <text:span text:style-name="Emphasis">one of</text:span> a Client, Sponsor, or Partner — not several.</text:p>
          </text:list-item>
        </text:list>
        <text:p text:style-name="P8">The pattern works either way, but the role configurations and field-level-hiding details look different. Which matches your actual model?</text:p>
        <text:h text:style-name="Heading_20_2" text:outline-level="2">Same Parent - Company</text:h>
        <text:p text:style-name="P9">12:22 AM</text:p>
        <text:p text:style-name="P8">Good — same Company parent keeps this very clean. The Sensitive Sub-Entity Pattern applies three times in parallel, with no interaction between the three instances. Here's the structure.</text:p>
        <text:h text:style-name="P2" text:outline-level="3">The pattern, parametrically</text:h>
        <text:p text:style-name="P8">For each sensitive type, you set up:</text:p>
        <text:list text:style-name="L57">
          <text:list-item>
            <text:p text:style-name="P114"><text:span text:style-name="Strong_20_Emphasis">A sensitive sub-entity</text:span> (one-to-one with Company, Multiple Assigned Users enabled)</text:p>
          </text:list-item>
          <text:list-item>
            <text:p text:style-name="P114"><text:span text:style-name="Strong_20_Emphasis">A team</text:span> containing the users allowed to access that sensitive type</text:p>
          </text:list-item>
          <text:list-item>
            <text:p text:style-name="P114"><text:span text:style-name="Strong_20_Emphasis">A role</text:span> attached to the team granting: Read=Own + Edit=Own on the sensitive entity, Field Level Read=Yes on the corresponding link field on Company, and Assignment Permission=Team</text:p>
          </text:list-item>
          <text:list-item>
            <text:p text:style-name="P115"><text:span text:style-name="Strong_20_Emphasis">A workflow rule</text:span> that syncs Company.assignedUser → SensitiveEntity.assignedUsers when ownership changes</text:p>
          </text:list-item>
        </text:list>
        <text:h text:style-name="P2" text:outline-level="3">The three instances</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7">Sensitive Entity</text:p>
              </table:table-cell>
              <table:table-cell table:style-name="Table20.A1" office:value-type="string">
                <text:p text:style-name="P7">Link Field on Company</text:p>
              </table:table-cell>
              <table:table-cell table:style-name="Table20.A1" office:value-type="string">
                <text:p text:style-name="P7">Team</text:p>
              </table:table-cell>
              <table:table-cell table:style-name="Table20.A1" office:value-type="string">
                <text:p text:style-name="P7">Role Attached to Team</text:p>
              </table:table-cell>
            </table:table-row>
          </table:table-header-rows>
          <table:table-row>
            <table:table-cell table:style-name="Table20.A1" office:value-type="string">
              <text:p text:style-name="P6">ClientProfile</text:p>
            </table:table-cell>
            <table:table-cell table:style-name="Table20.A1" office:value-type="string">
              <text:p text:style-name="P6"><text:span text:style-name="Source_20_Text">clientProfile</text:span></text:p>
            </table:table-cell>
            <table:table-cell table:style-name="Table20.A1" office:value-type="string">
              <text:p text:style-name="P6">Mentors</text:p>
            </table:table-cell>
            <table:table-cell table:style-name="Table20.A1" office:value-type="string">
              <text:p text:style-name="P6">Client Sensitive Authorized</text:p>
            </table:table-cell>
          </table:table-row>
          <table:table-row>
            <table:table-cell table:style-name="Table20.A1" office:value-type="string">
              <text:p text:style-name="P6">SponsorProfile</text:p>
            </table:table-cell>
            <table:table-cell table:style-name="Table20.A1" office:value-type="string">
              <text:p text:style-name="P6"><text:span text:style-name="Source_20_Text">sponsorProfile</text:span></text:p>
            </table:table-cell>
            <table:table-cell table:style-name="Table20.A1" office:value-type="string">
              <text:p text:style-name="P6">Sponsor Coordinators</text:p>
            </table:table-cell>
            <table:table-cell table:style-name="Table20.A1" office:value-type="string">
              <text:p text:style-name="P6">Sponsor Sensitive Authorized</text:p>
            </table:table-cell>
          </table:table-row>
          <table:table-row>
            <table:table-cell table:style-name="Table20.A1" office:value-type="string">
              <text:p text:style-name="P6">PartnerProfile</text:p>
            </table:table-cell>
            <table:table-cell table:style-name="Table20.A1" office:value-type="string">
              <text:p text:style-name="P6"><text:span text:style-name="Source_20_Text">partnerProfile</text:span></text:p>
            </table:table-cell>
            <table:table-cell table:style-name="Table20.A1" office:value-type="string">
              <text:p text:style-name="P6">Partner Managers</text:p>
            </table:table-cell>
            <table:table-cell table:style-name="Table20.A1" office:value-type="string">
              <text:p text:style-name="Table_20_Contents">Partner Sensitive Authorized</text:p>
            </table:table-cell>
          </table:table-row>
        </table:table>
        <text:p text:style-name="P8">Each instance is fully independent. The three workflows are independent. The three roles are independent.</text:p>
        <text:h text:style-name="P2" text:outline-level="3"><text:soft-page-break/>The updated Standard User role</text:h>
        <text:p text:style-name="P8">Standard User now hides <text:span text:style-name="Strong_20_Emphasis">three</text:span> link fields on Company and disables <text:span text:style-name="Strong_20_Emphasis">three</text:span> sensitive entities.</text:p>
        <text:p text:style-name="P8"><text:span text:style-name="Strong_20_Emphasis">Scope Level Permissions changes:</text:span></text:p>
        <table:table table:name="Table21" table:style-name="Table21">
          <table:table-column table:style-name="Table21.A"/>
          <table:table-column table:style-name="Table21.B"/>
          <table:table-header-rows>
            <table:table-row>
              <table:table-cell table:style-name="Table21.A1" office:value-type="string">
                <text:p text:style-name="P7">Entity</text:p>
              </table:table-cell>
              <table:table-cell table:style-name="Table21.A1" office:value-type="string">
                <text:p text:style-name="P7">Access</text:p>
              </table:table-cell>
            </table:table-row>
          </table:table-header-rows>
          <table:table-row>
            <table:table-cell table:style-name="Table21.A1" office:value-type="string">
              <text:p text:style-name="P6">ClientProfile</text:p>
            </table:table-cell>
            <table:table-cell table:style-name="Table21.A1" office:value-type="string">
              <text:p text:style-name="P6">disabled</text:p>
            </table:table-cell>
          </table:table-row>
          <table:table-row>
            <table:table-cell table:style-name="Table21.A1" office:value-type="string">
              <text:p text:style-name="P6">SponsorProfile</text:p>
            </table:table-cell>
            <table:table-cell table:style-name="Table21.A1" office:value-type="string">
              <text:p text:style-name="P6">disabled</text:p>
            </table:table-cell>
          </table:table-row>
          <table:table-row>
            <table:table-cell table:style-name="Table21.A1" office:value-type="string">
              <text:p text:style-name="P6">PartnerProfile</text:p>
            </table:table-cell>
            <table:table-cell table:style-name="Table21.A1" office:value-type="string">
              <text:p text:style-name="Table_20_Contents">disabled</text:p>
            </table:table-cell>
          </table:table-row>
        </table:table>
        <text:p text:style-name="P8"><text:span text:style-name="Strong_20_Emphasis">Field Level Permissions on Company:</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7">Field</text:p>
              </table:table-cell>
              <table:table-cell table:style-name="Table22.A1" office:value-type="string">
                <text:p text:style-name="P7">Read</text:p>
              </table:table-cell>
              <table:table-cell table:style-name="Table22.A1" office:value-type="string">
                <text:p text:style-name="P7">Edit</text:p>
              </table:table-cell>
            </table:table-row>
          </table:table-header-rows>
          <table:table-row>
            <table:table-cell table:style-name="Table22.A1" office:value-type="string">
              <text:p text:style-name="P6">Company → clientProfile</text:p>
            </table:table-cell>
            <table:table-cell table:style-name="Table22.A1" office:value-type="string">
              <text:p text:style-name="P6">No</text:p>
            </table:table-cell>
            <table:table-cell table:style-name="Table22.A1" office:value-type="string">
              <text:p text:style-name="P6">No</text:p>
            </table:table-cell>
          </table:table-row>
          <table:table-row>
            <table:table-cell table:style-name="Table22.A1" office:value-type="string">
              <text:p text:style-name="P6">Company → sponsorProfile</text:p>
            </table:table-cell>
            <table:table-cell table:style-name="Table22.A1" office:value-type="string">
              <text:p text:style-name="P6">No</text:p>
            </table:table-cell>
            <table:table-cell table:style-name="Table22.A1" office:value-type="string">
              <text:p text:style-name="P6">No</text:p>
            </table:table-cell>
          </table:table-row>
          <table:table-row>
            <table:table-cell table:style-name="Table22.A1" office:value-type="string">
              <text:p text:style-name="P6">Company → partnerProfile</text:p>
            </table:table-cell>
            <table:table-cell table:style-name="Table22.A1" office:value-type="string">
              <text:p text:style-name="P6">No</text:p>
            </table:table-cell>
            <table:table-cell table:style-name="Table22.A1" office:value-type="string">
              <text:p text:style-name="Table_20_Contents">No</text:p>
            </table:table-cell>
          </table:table-row>
        </table:table>
        <text:h text:style-name="P2" text:outline-level="3">What users experience</text:h>
        <text:p text:style-name="P8">The behavior emerges naturally from role merging — no special coordination needed:</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User</text:p>
              </table:table-cell>
              <table:table-cell table:style-name="Table23.A1" office:value-type="string">
                <text:p text:style-name="P7">Teams</text:p>
              </table:table-cell>
              <table:table-cell table:style-name="Table23.A1" office:value-type="string">
                <text:p text:style-name="P7">What's visible on a Company detail view</text:p>
              </table:table-cell>
            </table:table-row>
          </table:table-header-rows>
          <table:table-row>
            <table:table-cell table:style-name="Table23.A1" office:value-type="string">
              <text:p text:style-name="P6">Standard staff</text:p>
            </table:table-cell>
            <table:table-cell table:style-name="Table23.A1" office:value-type="string">
              <text:p text:style-name="P6">(none of the three)</text:p>
            </table:table-cell>
            <table:table-cell table:style-name="Table23.A1" office:value-type="string">
              <text:p text:style-name="P6">Company data. No sensitive panels at all.</text:p>
            </table:table-cell>
          </table:table-row>
          <table:table-row>
            <table:table-cell table:style-name="Table23.A1" office:value-type="string">
              <text:p text:style-name="P6">Mentor only</text:p>
            </table:table-cell>
            <table:table-cell table:style-name="Table23.A1" office:value-type="string">
              <text:p text:style-name="P6">Mentors</text:p>
            </table:table-cell>
            <table:table-cell table:style-name="Table23.A1" office:value-type="string">
              <text:p text:style-name="P6">Company + ClientProfile panel (if owner). No Sponsor/Partner panels.</text:p>
            </table:table-cell>
          </table:table-row>
          <table:table-row>
            <table:table-cell table:style-name="Table23.A1" office:value-type="string">
              <text:p text:style-name="P6">Partner Manager only</text:p>
            </table:table-cell>
            <table:table-cell table:style-name="Table23.A1" office:value-type="string">
              <text:p text:style-name="P6">Partner Managers</text:p>
            </table:table-cell>
            <table:table-cell table:style-name="Table23.A1" office:value-type="string">
              <text:p text:style-name="P6">Company + PartnerProfile panel (if owner). No Client/Sponsor panels.</text:p>
            </table:table-cell>
          </table:table-row>
          <table:table-row>
            <table:table-cell table:style-name="Table23.A1" office:value-type="string">
              <text:p text:style-name="P6">Mentor <text:span text:style-name="Emphasis">and</text:span> Partner Manager</text:p>
            </table:table-cell>
            <table:table-cell table:style-name="Table23.A1" office:value-type="string">
              <text:p text:style-name="P6">Both</text:p>
            </table:table-cell>
            <table:table-cell table:style-name="Table23.A1" office:value-type="string">
              <text:p text:style-name="Table_20_Contents">Company + ClientProfile panel + PartnerProfile panel (each conditional on ownership). No Sponsor panel.</text:p>
            </table:table-cell>
          </table:table-row>
        </table:table>
        <text:p text:style-name="P8">The mechanism: each role independently unhides <text:span text:style-name="Emphasis">exactly one</text:span> link field. A user in only Mentors has Read=Yes on <text:span text:style-name="Source_20_Text">clientProfile</text:span> (from the Mentor role) but Read=No on the other two (from Standard User, never overridden). Role merging produces precisely the right per-user view without explicit coordination.</text:p>
        <text:h text:style-name="P2" text:outline-level="3">The decision this surfaces: Coordinator structure</text:h>
        <text:p text:style-name="P8">We previously had a single "Sensitive Coordinator" role. With three sensitive types, this needs a call.</text:p>
        <text:h text:style-name="P3" text:outline-level="4">Plain-language question</text:h>
        <text:p text:style-name="P8">Should sensitive-data administration be one unified role across all three types, or split into three per-type coordinator roles?</text:p>
        <text:h text:style-name="P3" text:outline-level="4">The two options</text:h>
        <text:p text:style-name="P8"><text:span text:style-name="Strong_20_Emphasis">Option 1 — Three per-type coordinator roles</text:span></text:p>
        <text:list text:style-name="L58">
          <text:list-item>
            <text:p text:style-name="P116">"Client Sensitive Coordinator" — Read=All, Edit=All on ClientProfile only</text:p>
          </text:list-item>
          <text:list-item>
            <text:p text:style-name="P116"><text:soft-page-break/>"Sponsor Sensitive Coordinator" — same for SponsorProfile only</text:p>
          </text:list-item>
          <text:list-item>
            <text:p text:style-name="P116">"Partner Sensitive Coordinator" — same for PartnerProfile only</text:p>
          </text:list-item>
          <text:list-item>
            <text:p text:style-name="P117">A user who administers all three holds all three roles. Someone who only oversees sponsor data holds only the sponsor coordinator role.</text:p>
          </text:list-item>
        </text:list>
        <text:p text:style-name="P8"><text:span text:style-name="Strong_20_Emphasis">Option 2 — One unified "Sensitive Master Coordinator" role</text:span></text:p>
        <text:list text:style-name="L59">
          <text:list-item>
            <text:p text:style-name="P118">Single role granting Read=All, Edit=All, Create=Yes on all three sensitive entities</text:p>
          </text:list-item>
          <text:list-item>
            <text:p text:style-name="P119">Simpler administration, but no granularity — anyone with this role sees everything sensitive in the system</text:p>
          </text:list-item>
        </text:list>
        <text:h text:style-name="P3" text:outline-level="4">Why this matters</text:h>
        <text:p text:style-name="P8">If responsibilities for client, sponsor, and partner sensitive data fall to different people at CBM (e.g., a Sponsorship Director should see sponsor data but not client data), only Option 1 supports that. Option 2 treats all sensitive data as a single trust tier — which works only if administration is genuinely centralized in one small group.</text:p>
        <text:h text:style-name="P3" text:outline-level="4">Cost of the recommended option</text:h>
        <text:p text:style-name="P8">Option 1 is more roles to maintain (three instead of one). But since they're parallel and structurally identical, the maintenance burden is mostly conceptual, not practical.</text:p>
        <text:h text:style-name="P3" text:outline-level="4">Recommendation</text:h>
        <text:p text:style-name="P8"><text:span text:style-name="Strong_20_Emphasis">Option 1.</text:span> It mirrors the structural split you've already accepted (three teams, three entities) and follows least-privilege. A "Master Coordinator" is just a user who happens to hold all three of the granular roles — same effect, more flexibility.</text:p>
        <text:h text:style-name="P3" text:outline-level="4">Decision request</text:h>
        <text:p text:style-name="P8">Approve <text:span text:style-name="Strong_20_Emphasis">Option 1 (three coordinator roles)</text:span>, or argue for <text:span text:style-name="Strong_20_Emphasis">Option 2 (one unified)</text:span>?</text:p>
        <text:h text:style-name="P2" text:outline-level="3">Implementation notes</text:h>
        <text:list text:style-name="L60">
          <text:list-item>
            <text:p text:style-name="P120">Three workflow rules — one per sensitive type. Each triggered on Company.assignedUser change, each updating the relevant SensitiveEntity.assignedUsers field. Independent of each other.</text:p>
          </text:list-item>
          <text:list-item>
            <text:p text:style-name="P121">The Data Integrity role and team stay as-is. They affect Company-level data only and don't intersect with sensitive entities.</text:p>
          </text:list-item>
        </text:list>
        <text:h text:style-name="P2" text:outline-level="3">After this decision, the model is complete</text:h>
        <text:p text:style-name="P8">Once you settle the coordinator question, you have a fully-specified security architecture covering:</text:p>
        <text:list text:style-name="L61">
          <text:list-item>
            <text:p text:style-name="P122">One Company entity, viewable by all</text:p>
          </text:list-item>
          <text:list-item>
            <text:p text:style-name="P122">Three sensitive sub-entities, each hidden from non-authorized users via field-level link hiding</text:p>
          </text:list-item>
          <text:list-item>
            <text:p text:style-name="P122">Three "Authorized" roles (team-attached) for granular per-team ownership-derived access</text:p>
          </text:list-item>
          <text:list-item>
            <text:p text:style-name="P122">Three (or one) "Coordinator" roles for administration</text:p>
          </text:list-item>
          <text:list-item>
            <text:p text:style-name="P122"><text:soft-page-break/>One Data Integrity role for company-data quality</text:p>
          </text:list-item>
          <text:list-item>
            <text:p text:style-name="P122">Three workflow rules for ownership-derived auto-sync</text:p>
          </text:list-item>
          <text:list-item>
            <text:p text:style-name="P123">One Standard User role as the universal baseline</text:p>
          </text:list-item>
        </text:list>
        <text:p text:style-name="P8">That's the entire security model for this scope. Tell me Option 1 or 2 and I'll do a final consolidated spec.</text:p>
        <text:h text:style-name="Heading_20_2" text:outline-level="2">Option 1. We already have a single role for users who need access to everything - Admin :)</text:h>
        <text:p text:style-name="P9">12:26 AM</text:p>
        <text:p text:style-name="P8">Good point — Admin is exactly the "see everything sensitive plus everything else" role, so a Master Coordinator would just be a less-privileged duplicate of Admin. Per-type Coordinators are right, and Admin covers the rest.</text:p>
        <text:p text:style-name="P8">Here's the final consolidated spec for the entire security model.</text:p>
        <text:p text:style-name="Horizontal_20_Line"/>
        <text:h text:style-name="P1" text:outline-level="2">CBM EspoCRM Security Architecture — Consolidated Spec</text:h>
        <text:h text:style-name="P2" text:outline-level="3">Summary</text:h>
        <text:p text:style-name="P8">One Company entity is universally visible. Three sensitive sub-entities (ClientProfile, SponsorProfile, PartnerProfile) hold restricted data, hidden by default and only visible to users in the corresponding access team. Per-team users get automatic ownership-derived access to records for Companies they own, and can transfer access among their peers via a Team-scoped Assignment Permission. Per-type Coordinators manage their respective sensitive entities. A Data Integrity team handles Company-level data quality. Admin retains universal access.</text:p>
        <text:h text:style-name="P2" text:outline-level="3">Entity Setup</text:h>
        <text:h text:style-name="P3" text:outline-level="4">Existing entity</text:h>
        <text:list text:style-name="L62">
          <text:list-item>
            <text:p text:style-name="P124"><text:span text:style-name="Strong_20_Emphasis">Company</text:span> — base entity, universally visible.</text:p>
          </text:list-item>
        </text:list>
        <text:h text:style-name="P3" text:outline-level="4">New sensitive sub-entities (each created the same way)</text:h>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7">Entity</text:p>
              </table:table-cell>
              <table:table-cell table:style-name="Table24.A1" office:value-type="string">
                <text:p text:style-name="P7">Relationship to Company</text:p>
              </table:table-cell>
              <table:table-cell table:style-name="Table24.A1" office:value-type="string">
                <text:p text:style-name="P7">Link Field on Company</text:p>
              </table:table-cell>
              <table:table-cell table:style-name="Table24.A1" office:value-type="string">
                <text:p text:style-name="P7">Link Field Back</text:p>
              </table:table-cell>
              <table:table-cell table:style-name="Table24.A1" office:value-type="string">
                <text:p text:style-name="P7">Multiple Assigned Users</text:p>
              </table:table-cell>
            </table:table-row>
          </table:table-header-rows>
          <table:table-row>
            <table:table-cell table:style-name="Table24.A1" office:value-type="string">
              <text:p text:style-name="P6">ClientProfile</text:p>
            </table:table-cell>
            <table:table-cell table:style-name="Table24.A1" office:value-type="string">
              <text:p text:style-name="P6">one-to-one</text:p>
            </table:table-cell>
            <table:table-cell table:style-name="Table24.A1" office:value-type="string">
              <text:p text:style-name="P6"><text:span text:style-name="Source_20_Text">clientProfile</text:span></text:p>
            </table:table-cell>
            <table:table-cell table:style-name="Table24.A1" office:value-type="string">
              <text:p text:style-name="P6"><text:span text:style-name="Source_20_Text">company</text:span></text:p>
            </table:table-cell>
            <table:table-cell table:style-name="Table24.A1" office:value-type="string">
              <text:p text:style-name="P6">enabled</text:p>
            </table:table-cell>
          </table:table-row>
          <table:table-row>
            <table:table-cell table:style-name="Table24.A1" office:value-type="string">
              <text:p text:style-name="P6">SponsorProfile</text:p>
            </table:table-cell>
            <table:table-cell table:style-name="Table24.A1" office:value-type="string">
              <text:p text:style-name="P6">one-to-one</text:p>
            </table:table-cell>
            <table:table-cell table:style-name="Table24.A1" office:value-type="string">
              <text:p text:style-name="P6"><text:span text:style-name="Source_20_Text">sponsorProfile</text:span></text:p>
            </table:table-cell>
            <table:table-cell table:style-name="Table24.A1" office:value-type="string">
              <text:p text:style-name="P6"><text:span text:style-name="Source_20_Text">company</text:span></text:p>
            </table:table-cell>
            <table:table-cell table:style-name="Table24.A1" office:value-type="string">
              <text:p text:style-name="P6">enabled</text:p>
            </table:table-cell>
          </table:table-row>
          <table:table-row>
            <table:table-cell table:style-name="Table24.A1" office:value-type="string">
              <text:p text:style-name="P6">PartnerProfile</text:p>
            </table:table-cell>
            <table:table-cell table:style-name="Table24.A1" office:value-type="string">
              <text:p text:style-name="P6">one-to-one</text:p>
            </table:table-cell>
            <table:table-cell table:style-name="Table24.A1" office:value-type="string">
              <text:p text:style-name="P6"><text:span text:style-name="Source_20_Text">partnerProfile</text:span></text:p>
            </table:table-cell>
            <table:table-cell table:style-name="Table24.A1" office:value-type="string">
              <text:p text:style-name="P6"><text:span text:style-name="Source_20_Text">company</text:span></text:p>
            </table:table-cell>
            <table:table-cell table:style-name="Table24.A1" office:value-type="string">
              <text:p text:style-name="Table_20_Contents">enabled</text:p>
            </table:table-cell>
          </table:table-row>
        </table:table>
        <text:h text:style-name="P2" text:outline-level="3">Teams</text:h>
        <table:table table:name="Table25" table:style-name="Table25">
          <table:table-column table:style-name="Table25.A"/>
          <table:table-column table:style-name="Table25.B"/>
          <table:table-header-rows>
            <table:table-row>
              <table:table-cell table:style-name="Table25.A1" office:value-type="string">
                <text:p text:style-name="P7">Team</text:p>
              </table:table-cell>
              <table:table-cell table:style-name="Table25.A1" office:value-type="string">
                <text:p text:style-name="P7">Roles attached to team</text:p>
              </table:table-cell>
            </table:table-row>
          </table:table-header-rows>
          <table:table-row>
            <table:table-cell table:style-name="Table25.A1" office:value-type="string">
              <text:p text:style-name="P6">Mentors</text:p>
            </table:table-cell>
            <table:table-cell table:style-name="Table25.A1" office:value-type="string">
              <text:p text:style-name="P6">Client Sensitive Authorized</text:p>
            </table:table-cell>
          </table:table-row>
          <text:soft-page-break/>
          <table:table-row>
            <table:table-cell table:style-name="Table25.A1" office:value-type="string">
              <text:p text:style-name="P6">Sponsor Coordinators</text:p>
            </table:table-cell>
            <table:table-cell table:style-name="Table25.A1" office:value-type="string">
              <text:p text:style-name="P6">Sponsor Sensitive Authorized</text:p>
            </table:table-cell>
          </table:table-row>
          <table:table-row>
            <table:table-cell table:style-name="Table25.A1" office:value-type="string">
              <text:p text:style-name="P6">Partner Managers</text:p>
            </table:table-cell>
            <table:table-cell table:style-name="Table25.A1" office:value-type="string">
              <text:p text:style-name="P6">Partner Sensitive Authorized</text:p>
            </table:table-cell>
          </table:table-row>
          <table:table-row>
            <table:table-cell table:style-name="Table25.A1" office:value-type="string">
              <text:p text:style-name="P6">Data Integrity Team</text:p>
            </table:table-cell>
            <table:table-cell table:style-name="Table25.A1" office:value-type="string">
              <text:p text:style-name="Table_20_Contents">Data Integrity</text:p>
            </table:table-cell>
          </table:table-row>
        </table:table>
        <text:h text:style-name="P2" text:outline-level="3">Roles</text:h>
        <text:h text:style-name="P3" text:outline-level="4">1. Standard User (universal baseline — every user has this)</text:h>
        <text:p text:style-name="P8"><text:span text:style-name="Strong_20_Emphasis">Scope Level Permissions:</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header-rows>
            <table:table-row>
              <table:table-cell table:style-name="Table26.A1" office:value-type="string">
                <text:p text:style-name="P7">Entity</text:p>
              </table:table-cell>
              <table:table-cell table:style-name="Table26.A1" office:value-type="string">
                <text:p text:style-name="P7">Access</text:p>
              </table:table-cell>
              <table:table-cell table:style-name="Table26.A1" office:value-type="string">
                <text:p text:style-name="P7">Create</text:p>
              </table:table-cell>
              <table:table-cell table:style-name="Table26.A1" office:value-type="string">
                <text:p text:style-name="P7">Read</text:p>
              </table:table-cell>
              <table:table-cell table:style-name="Table26.A1" office:value-type="string">
                <text:p text:style-name="P7">Edit</text:p>
              </table:table-cell>
              <table:table-cell table:style-name="Table26.A1" office:value-type="string">
                <text:p text:style-name="P7">Delete</text:p>
              </table:table-cell>
              <table:table-cell table:style-name="Table26.A1" office:value-type="string">
                <text:p text:style-name="P7">Stream</text:p>
              </table:table-cell>
            </table:table-row>
          </table:table-header-rows>
          <table:table-row>
            <table:table-cell table:style-name="Table26.A1" office:value-type="string">
              <text:p text:style-name="P6">Company</text:p>
            </table:table-cell>
            <table:table-cell table:style-name="Table26.A1" office:value-type="string">
              <text:p text:style-name="P6">enabled</text:p>
            </table:table-cell>
            <table:table-cell table:style-name="Table26.A1" office:value-type="string">
              <text:p text:style-name="P6">yes</text:p>
            </table:table-cell>
            <table:table-cell table:style-name="Table26.A1" office:value-type="string">
              <text:p text:style-name="P6">All</text:p>
            </table:table-cell>
            <table:table-cell table:style-name="Table26.A1" office:value-type="string">
              <text:p text:style-name="P6">Own</text:p>
            </table:table-cell>
            <table:table-cell table:style-name="Table26.A1" office:value-type="string">
              <text:p text:style-name="P6">No</text:p>
            </table:table-cell>
            <table:table-cell table:style-name="Table26.A1" office:value-type="string">
              <text:p text:style-name="P6">All</text:p>
            </table:table-cell>
          </table:table-row>
          <table:table-row>
            <table:table-cell table:style-name="Table26.A1" office:value-type="string">
              <text:p text:style-name="P6">ClientProfile</text:p>
            </table:table-cell>
            <table:table-cell table:style-name="Table26.A1" office:value-type="string">
              <text:p text:style-name="P6">disabled</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row>
          <table:table-row>
            <table:table-cell table:style-name="Table26.A1" office:value-type="string">
              <text:p text:style-name="P6">SponsorProfile</text:p>
            </table:table-cell>
            <table:table-cell table:style-name="Table26.A1" office:value-type="string">
              <text:p text:style-name="P6">disabled</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row>
          <table:table-row>
            <table:table-cell table:style-name="Table26.A1" office:value-type="string">
              <text:p text:style-name="P6">PartnerProfile</text:p>
            </table:table-cell>
            <table:table-cell table:style-name="Table26.A1" office:value-type="string">
              <text:p text:style-name="P6">disabled</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P6">—</text:p>
            </table:table-cell>
            <table:table-cell table:style-name="Table26.A1" office:value-type="string">
              <text:p text:style-name="Table_20_Contents">—</text:p>
            </table:table-cell>
          </table:table-row>
        </table:table>
        <text:p text:style-name="P8"><text:span text:style-name="Strong_20_Emphasis">Field Level Permissions on Company:</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7">Field</text:p>
              </table:table-cell>
              <table:table-cell table:style-name="Table27.A1" office:value-type="string">
                <text:p text:style-name="P7">Read</text:p>
              </table:table-cell>
              <table:table-cell table:style-name="Table27.A1" office:value-type="string">
                <text:p text:style-name="P7">Edit</text:p>
              </table:table-cell>
            </table:table-row>
          </table:table-header-rows>
          <table:table-row>
            <table:table-cell table:style-name="Table27.A1" office:value-type="string">
              <text:p text:style-name="P6">clientProfile</text:p>
            </table:table-cell>
            <table:table-cell table:style-name="Table27.A1" office:value-type="string">
              <text:p text:style-name="P6">No</text:p>
            </table:table-cell>
            <table:table-cell table:style-name="Table27.A1" office:value-type="string">
              <text:p text:style-name="P6">No</text:p>
            </table:table-cell>
          </table:table-row>
          <table:table-row>
            <table:table-cell table:style-name="Table27.A1" office:value-type="string">
              <text:p text:style-name="P6">sponsorProfile</text:p>
            </table:table-cell>
            <table:table-cell table:style-name="Table27.A1" office:value-type="string">
              <text:p text:style-name="P6">No</text:p>
            </table:table-cell>
            <table:table-cell table:style-name="Table27.A1" office:value-type="string">
              <text:p text:style-name="P6">No</text:p>
            </table:table-cell>
          </table:table-row>
          <table:table-row>
            <table:table-cell table:style-name="Table27.A1" office:value-type="string">
              <text:p text:style-name="P6">partnerProfile</text:p>
            </table:table-cell>
            <table:table-cell table:style-name="Table27.A1" office:value-type="string">
              <text:p text:style-name="P6">No</text:p>
            </table:table-cell>
            <table:table-cell table:style-name="Table27.A1" office:value-type="string">
              <text:p text:style-name="Table_20_Contents">No</text:p>
            </table:table-cell>
          </table:table-row>
        </table:table>
        <text:p text:style-name="P8"><text:span text:style-name="Strong_20_Emphasis">Permissions:</text:span> Assignment Permission = No</text:p>
        <text:p text:style-name="Horizontal_20_Line"/>
        <text:h text:style-name="P3" text:outline-level="4">2. Client Sensitive Authorized (attached to Mentors team)</text:h>
        <text:p text:style-name="P8"><text:span text:style-name="Strong_20_Emphasis">Scope Level Permissions:</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28.A1" office:value-type="string">
                <text:p text:style-name="P7">Entity</text:p>
              </table:table-cell>
              <table:table-cell table:style-name="Table28.A1" office:value-type="string">
                <text:p text:style-name="P7">Access</text:p>
              </table:table-cell>
              <table:table-cell table:style-name="Table28.A1" office:value-type="string">
                <text:p text:style-name="P7">Create</text:p>
              </table:table-cell>
              <table:table-cell table:style-name="Table28.A1" office:value-type="string">
                <text:p text:style-name="P7">Read</text:p>
              </table:table-cell>
              <table:table-cell table:style-name="Table28.A1" office:value-type="string">
                <text:p text:style-name="P7">Edit</text:p>
              </table:table-cell>
              <table:table-cell table:style-name="Table28.A1" office:value-type="string">
                <text:p text:style-name="P7">Delete</text:p>
              </table:table-cell>
              <table:table-cell table:style-name="Table28.A1" office:value-type="string">
                <text:p text:style-name="P7">Stream</text:p>
              </table:table-cell>
            </table:table-row>
          </table:table-header-rows>
          <table:table-row>
            <table:table-cell table:style-name="Table28.A1" office:value-type="string">
              <text:p text:style-name="P6">ClientProfile</text:p>
            </table:table-cell>
            <table:table-cell table:style-name="Table28.A1" office:value-type="string">
              <text:p text:style-name="P6">enabled</text:p>
            </table:table-cell>
            <table:table-cell table:style-name="Table28.A1" office:value-type="string">
              <text:p text:style-name="P6">no</text:p>
            </table:table-cell>
            <table:table-cell table:style-name="Table28.A1" office:value-type="string">
              <text:p text:style-name="P6">Own</text:p>
            </table:table-cell>
            <table:table-cell table:style-name="Table28.A1" office:value-type="string">
              <text:p text:style-name="P6">Own</text:p>
            </table:table-cell>
            <table:table-cell table:style-name="Table28.A1" office:value-type="string">
              <text:p text:style-name="P6">no</text:p>
            </table:table-cell>
            <table:table-cell table:style-name="Table28.A1" office:value-type="string">
              <text:p text:style-name="Table_20_Contents">Own</text:p>
            </table:table-cell>
          </table:table-row>
        </table:table>
        <text:p text:style-name="P8"><text:span text:style-name="Strong_20_Emphasis">Field Level Permissions on Company:</text:span></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7">Field</text:p>
              </table:table-cell>
              <table:table-cell table:style-name="Table29.A1" office:value-type="string">
                <text:p text:style-name="P7">Read</text:p>
              </table:table-cell>
              <table:table-cell table:style-name="Table29.A1" office:value-type="string">
                <text:p text:style-name="P7">Edit</text:p>
              </table:table-cell>
            </table:table-row>
          </table:table-header-rows>
          <table:table-row>
            <table:table-cell table:style-name="Table29.A1" office:value-type="string">
              <text:p text:style-name="P6">clientProfile</text:p>
            </table:table-cell>
            <table:table-cell table:style-name="Table29.A1" office:value-type="string">
              <text:p text:style-name="P6">Yes</text:p>
            </table:table-cell>
            <table:table-cell table:style-name="Table29.A1" office:value-type="string">
              <text:p text:style-name="Table_20_Contents">—</text:p>
            </table:table-cell>
          </table:table-row>
        </table:table>
        <text:p text:style-name="P8"><text:span text:style-name="Strong_20_Emphasis">Permissions:</text:span> Assignment Permission = Team</text:p>
        <text:p text:style-name="Horizontal_20_Line"/>
        <text:h text:style-name="P3" text:outline-level="4">3. Sponsor Sensitive Authorized (attached to Sponsor Coordinators team)</text:h>
        <text:p text:style-name="P8"><text:span text:style-name="Strong_20_Emphasis">Scope Level Permissions:</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header-rows>
            <table:table-row>
              <table:table-cell table:style-name="Table30.A1" office:value-type="string">
                <text:p text:style-name="P7">Entity</text:p>
              </table:table-cell>
              <table:table-cell table:style-name="Table30.A1" office:value-type="string">
                <text:p text:style-name="P7">Access</text:p>
              </table:table-cell>
              <table:table-cell table:style-name="Table30.A1" office:value-type="string">
                <text:p text:style-name="P7">Create</text:p>
              </table:table-cell>
              <table:table-cell table:style-name="Table30.A1" office:value-type="string">
                <text:p text:style-name="P7">Read</text:p>
              </table:table-cell>
              <table:table-cell table:style-name="Table30.A1" office:value-type="string">
                <text:p text:style-name="P7">Edit</text:p>
              </table:table-cell>
              <table:table-cell table:style-name="Table30.A1" office:value-type="string">
                <text:p text:style-name="P7">Delete</text:p>
              </table:table-cell>
              <table:table-cell table:style-name="Table30.A1" office:value-type="string">
                <text:p text:style-name="P7">Stream</text:p>
              </table:table-cell>
            </table:table-row>
          </table:table-header-rows>
          <table:table-row>
            <table:table-cell table:style-name="Table30.A1" office:value-type="string">
              <text:p text:style-name="P6">SponsorProfile</text:p>
            </table:table-cell>
            <table:table-cell table:style-name="Table30.A1" office:value-type="string">
              <text:p text:style-name="P6">enabled</text:p>
            </table:table-cell>
            <table:table-cell table:style-name="Table30.A1" office:value-type="string">
              <text:p text:style-name="P6">no</text:p>
            </table:table-cell>
            <table:table-cell table:style-name="Table30.A1" office:value-type="string">
              <text:p text:style-name="P6">Own</text:p>
            </table:table-cell>
            <table:table-cell table:style-name="Table30.A1" office:value-type="string">
              <text:p text:style-name="P6">Own</text:p>
            </table:table-cell>
            <table:table-cell table:style-name="Table30.A1" office:value-type="string">
              <text:p text:style-name="P6">no</text:p>
            </table:table-cell>
            <table:table-cell table:style-name="Table30.A1" office:value-type="string">
              <text:p text:style-name="Table_20_Contents">Own</text:p>
            </table:table-cell>
          </table:table-row>
        </table:table>
        <text:p text:style-name="P8"><text:span text:style-name="Strong_20_Emphasis">Field Level Permissions on Company:</text:span></text:p>
        <table:table table:name="Table31" table:style-name="Table31">
          <table:table-column table:style-name="Table31.A"/>
          <table:table-column table:style-name="Table31.B"/>
          <table:table-column table:style-name="Table31.C"/>
          <table:table-header-rows>
            <text:soft-page-break/>
            <table:table-row>
              <table:table-cell table:style-name="Table31.A1" office:value-type="string">
                <text:p text:style-name="P7">Field</text:p>
              </table:table-cell>
              <table:table-cell table:style-name="Table31.A1" office:value-type="string">
                <text:p text:style-name="P7">Read</text:p>
              </table:table-cell>
              <table:table-cell table:style-name="Table31.A1" office:value-type="string">
                <text:p text:style-name="P7">Edit</text:p>
              </table:table-cell>
            </table:table-row>
          </table:table-header-rows>
          <table:table-row>
            <table:table-cell table:style-name="Table31.A1" office:value-type="string">
              <text:p text:style-name="P6">sponsorProfile</text:p>
            </table:table-cell>
            <table:table-cell table:style-name="Table31.A1" office:value-type="string">
              <text:p text:style-name="P6">Yes</text:p>
            </table:table-cell>
            <table:table-cell table:style-name="Table31.A1" office:value-type="string">
              <text:p text:style-name="Table_20_Contents">—</text:p>
            </table:table-cell>
          </table:table-row>
        </table:table>
        <text:p text:style-name="P8"><text:span text:style-name="Strong_20_Emphasis">Permissions:</text:span> Assignment Permission = Team</text:p>
        <text:p text:style-name="Horizontal_20_Line"/>
        <text:h text:style-name="P3" text:outline-level="4">4. Partner Sensitive Authorized (attached to Partner Managers team)</text:h>
        <text:p text:style-name="P8"><text:span text:style-name="Strong_20_Emphasis">Scope Level Permissions:</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table-cell table:style-name="Table32.A1" office:value-type="string">
                <text:p text:style-name="P7">Entity</text:p>
              </table:table-cell>
              <table:table-cell table:style-name="Table32.A1" office:value-type="string">
                <text:p text:style-name="P7">Access</text:p>
              </table:table-cell>
              <table:table-cell table:style-name="Table32.A1" office:value-type="string">
                <text:p text:style-name="P7">Create</text:p>
              </table:table-cell>
              <table:table-cell table:style-name="Table32.A1" office:value-type="string">
                <text:p text:style-name="P7">Read</text:p>
              </table:table-cell>
              <table:table-cell table:style-name="Table32.A1" office:value-type="string">
                <text:p text:style-name="P7">Edit</text:p>
              </table:table-cell>
              <table:table-cell table:style-name="Table32.A1" office:value-type="string">
                <text:p text:style-name="P7">Delete</text:p>
              </table:table-cell>
              <table:table-cell table:style-name="Table32.A1" office:value-type="string">
                <text:p text:style-name="P7">Stream</text:p>
              </table:table-cell>
            </table:table-row>
          </table:table-header-rows>
          <table:table-row>
            <table:table-cell table:style-name="Table32.A1" office:value-type="string">
              <text:p text:style-name="P6">PartnerProfile</text:p>
            </table:table-cell>
            <table:table-cell table:style-name="Table32.A1" office:value-type="string">
              <text:p text:style-name="P6">enabled</text:p>
            </table:table-cell>
            <table:table-cell table:style-name="Table32.A1" office:value-type="string">
              <text:p text:style-name="P6">no</text:p>
            </table:table-cell>
            <table:table-cell table:style-name="Table32.A1" office:value-type="string">
              <text:p text:style-name="P6">Own</text:p>
            </table:table-cell>
            <table:table-cell table:style-name="Table32.A1" office:value-type="string">
              <text:p text:style-name="P6">Own</text:p>
            </table:table-cell>
            <table:table-cell table:style-name="Table32.A1" office:value-type="string">
              <text:p text:style-name="P6">no</text:p>
            </table:table-cell>
            <table:table-cell table:style-name="Table32.A1" office:value-type="string">
              <text:p text:style-name="Table_20_Contents">Own</text:p>
            </table:table-cell>
          </table:table-row>
        </table:table>
        <text:p text:style-name="P8"><text:span text:style-name="Strong_20_Emphasis">Field Level Permissions on Company:</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7">Field</text:p>
              </table:table-cell>
              <table:table-cell table:style-name="Table33.A1" office:value-type="string">
                <text:p text:style-name="P7">Read</text:p>
              </table:table-cell>
              <table:table-cell table:style-name="Table33.A1" office:value-type="string">
                <text:p text:style-name="P7">Edit</text:p>
              </table:table-cell>
            </table:table-row>
          </table:table-header-rows>
          <table:table-row>
            <table:table-cell table:style-name="Table33.A1" office:value-type="string">
              <text:p text:style-name="P6">partnerProfile</text:p>
            </table:table-cell>
            <table:table-cell table:style-name="Table33.A1" office:value-type="string">
              <text:p text:style-name="P6">Yes</text:p>
            </table:table-cell>
            <table:table-cell table:style-name="Table33.A1" office:value-type="string">
              <text:p text:style-name="Table_20_Contents">—</text:p>
            </table:table-cell>
          </table:table-row>
        </table:table>
        <text:p text:style-name="P8"><text:span text:style-name="Strong_20_Emphasis">Permissions:</text:span> Assignment Permission = Team</text:p>
        <text:p text:style-name="Horizontal_20_Line"/>
        <text:h text:style-name="P3" text:outline-level="4">5. Client Sensitive Coordinator (assigned directly to user record)</text:h>
        <text:p text:style-name="P8"><text:span text:style-name="Strong_20_Emphasis">Scope Level Permissions:</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header-rows>
            <table:table-row>
              <table:table-cell table:style-name="Table34.A1" office:value-type="string">
                <text:p text:style-name="P7">Entity</text:p>
              </table:table-cell>
              <table:table-cell table:style-name="Table34.A1" office:value-type="string">
                <text:p text:style-name="P7">Access</text:p>
              </table:table-cell>
              <table:table-cell table:style-name="Table34.A1" office:value-type="string">
                <text:p text:style-name="P7">Create</text:p>
              </table:table-cell>
              <table:table-cell table:style-name="Table34.A1" office:value-type="string">
                <text:p text:style-name="P7">Read</text:p>
              </table:table-cell>
              <table:table-cell table:style-name="Table34.A1" office:value-type="string">
                <text:p text:style-name="P7">Edit</text:p>
              </table:table-cell>
              <table:table-cell table:style-name="Table34.A1" office:value-type="string">
                <text:p text:style-name="P7">Delete</text:p>
              </table:table-cell>
              <table:table-cell table:style-name="Table34.A1" office:value-type="string">
                <text:p text:style-name="P7">Stream</text:p>
              </table:table-cell>
            </table:table-row>
          </table:table-header-rows>
          <table:table-row>
            <table:table-cell table:style-name="Table34.A1" office:value-type="string">
              <text:p text:style-name="P6">ClientProfile</text:p>
            </table:table-cell>
            <table:table-cell table:style-name="Table34.A1" office:value-type="string">
              <text:p text:style-name="P6">enabled</text:p>
            </table:table-cell>
            <table:table-cell table:style-name="Table34.A1" office:value-type="string">
              <text:p text:style-name="P6">yes</text:p>
            </table:table-cell>
            <table:table-cell table:style-name="Table34.A1" office:value-type="string">
              <text:p text:style-name="P6">All</text:p>
            </table:table-cell>
            <table:table-cell table:style-name="Table34.A1" office:value-type="string">
              <text:p text:style-name="P6">All</text:p>
            </table:table-cell>
            <table:table-cell table:style-name="Table34.A1" office:value-type="string">
              <text:p text:style-name="P6">All</text:p>
            </table:table-cell>
            <table:table-cell table:style-name="Table34.A1" office:value-type="string">
              <text:p text:style-name="Table_20_Contents">All</text:p>
            </table:table-cell>
          </table:table-row>
        </table:table>
        <text:p text:style-name="P8"><text:span text:style-name="Strong_20_Emphasis">Field Level Permissions on Company:</text:span></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7">Field</text:p>
              </table:table-cell>
              <table:table-cell table:style-name="Table35.A1" office:value-type="string">
                <text:p text:style-name="P7">Read</text:p>
              </table:table-cell>
              <table:table-cell table:style-name="Table35.A1" office:value-type="string">
                <text:p text:style-name="P7">Edit</text:p>
              </table:table-cell>
            </table:table-row>
          </table:table-header-rows>
          <table:table-row>
            <table:table-cell table:style-name="Table35.A1" office:value-type="string">
              <text:p text:style-name="P6">clientProfile</text:p>
            </table:table-cell>
            <table:table-cell table:style-name="Table35.A1" office:value-type="string">
              <text:p text:style-name="P6">Yes</text:p>
            </table:table-cell>
            <table:table-cell table:style-name="Table35.A1" office:value-type="string">
              <text:p text:style-name="Table_20_Contents">Yes</text:p>
            </table:table-cell>
          </table:table-row>
        </table:table>
        <text:p text:style-name="P8"><text:span text:style-name="Strong_20_Emphasis">Permissions:</text:span> Assignment Permission = All</text:p>
        <text:p text:style-name="Horizontal_20_Line"/>
        <text:h text:style-name="P3" text:outline-level="4">6. Sponsor Sensitive Coordinator (assigned directly to user record)</text:h>
        <text:p text:style-name="P8">Same structure as Client Sensitive Coordinator, scoped to <text:span text:style-name="Strong_20_Emphasis">SponsorProfile</text:span> and the <text:span text:style-name="Source_20_Text">sponsorProfile</text:span> link field.</text:p>
        <text:p text:style-name="Horizontal_20_Line"/>
        <text:h text:style-name="P3" text:outline-level="4">7. Partner Sensitive Coordinator (assigned directly to user record)</text:h>
        <text:p text:style-name="P8">Same structure as Client Sensitive Coordinator, scoped to <text:span text:style-name="Strong_20_Emphasis">PartnerProfile</text:span> and the <text:span text:style-name="Source_20_Text">partnerProfile</text:span> link field.</text:p>
        <text:p text:style-name="Horizontal_20_Line"/>
        <text:h text:style-name="P3" text:outline-level="4">8. Data Integrity (attached to Data Integrity Team)</text:h>
        <text:p text:style-name="P8"><text:span text:style-name="Strong_20_Emphasis">Scope Level Permissions:</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D"/>
          <table:table-column table:style-name="Table36.G"/>
          <table:table-header-rows>
            <text:soft-page-break/>
            <table:table-row>
              <table:table-cell table:style-name="Table36.A1" office:value-type="string">
                <text:p text:style-name="P7">Entity</text:p>
              </table:table-cell>
              <table:table-cell table:style-name="Table36.A1" office:value-type="string">
                <text:p text:style-name="P7">Access</text:p>
              </table:table-cell>
              <table:table-cell table:style-name="Table36.A1" office:value-type="string">
                <text:p text:style-name="P7">Create</text:p>
              </table:table-cell>
              <table:table-cell table:style-name="Table36.A1" office:value-type="string">
                <text:p text:style-name="P7">Read</text:p>
              </table:table-cell>
              <table:table-cell table:style-name="Table36.A1" office:value-type="string">
                <text:p text:style-name="P7">Edit</text:p>
              </table:table-cell>
              <table:table-cell table:style-name="Table36.A1" office:value-type="string">
                <text:p text:style-name="P7">Delete</text:p>
              </table:table-cell>
              <table:table-cell table:style-name="Table36.A1" office:value-type="string">
                <text:p text:style-name="P7">Stream</text:p>
              </table:table-cell>
            </table:table-row>
          </table:table-header-rows>
          <table:table-row>
            <table:table-cell table:style-name="Table36.A1" office:value-type="string">
              <text:p text:style-name="P6">Company</text:p>
            </table:table-cell>
            <table:table-cell table:style-name="Table36.A1" office:value-type="string">
              <text:p text:style-name="P6">enabled</text:p>
            </table:table-cell>
            <table:table-cell table:style-name="Table36.A1" office:value-type="string">
              <text:p text:style-name="P6">not-set</text:p>
            </table:table-cell>
            <table:table-cell table:style-name="Table36.A1" office:value-type="string">
              <text:p text:style-name="P6">not-set</text:p>
            </table:table-cell>
            <table:table-cell table:style-name="Table36.A1" office:value-type="string">
              <text:p text:style-name="P6">All</text:p>
            </table:table-cell>
            <table:table-cell table:style-name="Table36.A1" office:value-type="string">
              <text:p text:style-name="P6">not-set</text:p>
            </table:table-cell>
            <table:table-cell table:style-name="Table36.A1" office:value-type="string">
              <text:p text:style-name="Table_20_Contents">not-set</text:p>
            </table:table-cell>
          </table:table-row>
        </table:table>
        <text:p text:style-name="P8"><text:span text:style-name="Strong_20_Emphasis">Field Level Permissions:</text:span> none.</text:p>
        <text:p text:style-name="P8"><text:span text:style-name="Strong_20_Emphasis">Permissions:</text:span> Assignment Permission = No (job is data quality, not ownership management).</text:p>
        <text:p text:style-name="Horizontal_20_Line"/>
        <text:h text:style-name="P2" text:outline-level="3">User Assignment Pattern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7">User type</text:p>
              </table:table-cell>
              <table:table-cell table:style-name="Table37.A1" office:value-type="string">
                <text:p text:style-name="P7">Direct role assignments</text:p>
              </table:table-cell>
              <table:table-cell table:style-name="Table37.A1" office:value-type="string">
                <text:p text:style-name="P7">Team memberships</text:p>
              </table:table-cell>
            </table:table-row>
          </table:table-header-rows>
          <table:table-row>
            <table:table-cell table:style-name="Table37.A1" office:value-type="string">
              <text:p text:style-name="P6">Standard staff</text:p>
            </table:table-cell>
            <table:table-cell table:style-name="Table37.A1" office:value-type="string">
              <text:p text:style-name="P6">Standard User</text:p>
            </table:table-cell>
            <table:table-cell table:style-name="Table37.A1" office:value-type="string">
              <text:p text:style-name="P6">(none)</text:p>
            </table:table-cell>
          </table:table-row>
          <table:table-row>
            <table:table-cell table:style-name="Table37.A1" office:value-type="string">
              <text:p text:style-name="P6">Mentor</text:p>
            </table:table-cell>
            <table:table-cell table:style-name="Table37.A1" office:value-type="string">
              <text:p text:style-name="P6">Standard User</text:p>
            </table:table-cell>
            <table:table-cell table:style-name="Table37.A1" office:value-type="string">
              <text:p text:style-name="P6">Mentors</text:p>
            </table:table-cell>
          </table:table-row>
          <table:table-row>
            <table:table-cell table:style-name="Table37.A1" office:value-type="string">
              <text:p text:style-name="P6">Sponsor Coordinator</text:p>
            </table:table-cell>
            <table:table-cell table:style-name="Table37.A1" office:value-type="string">
              <text:p text:style-name="P6">Standard User</text:p>
            </table:table-cell>
            <table:table-cell table:style-name="Table37.A1" office:value-type="string">
              <text:p text:style-name="P6">Sponsor Coordinators</text:p>
            </table:table-cell>
          </table:table-row>
          <table:table-row>
            <table:table-cell table:style-name="Table37.A1" office:value-type="string">
              <text:p text:style-name="P6">Partner Manager</text:p>
            </table:table-cell>
            <table:table-cell table:style-name="Table37.A1" office:value-type="string">
              <text:p text:style-name="P6">Standard User</text:p>
            </table:table-cell>
            <table:table-cell table:style-name="Table37.A1" office:value-type="string">
              <text:p text:style-name="P6">Partner Managers</text:p>
            </table:table-cell>
          </table:table-row>
          <table:table-row>
            <table:table-cell table:style-name="Table37.A1" office:value-type="string">
              <text:p text:style-name="P6">Data Integrity volunteer</text:p>
            </table:table-cell>
            <table:table-cell table:style-name="Table37.A1" office:value-type="string">
              <text:p text:style-name="P6">Standard User</text:p>
            </table:table-cell>
            <table:table-cell table:style-name="Table37.A1" office:value-type="string">
              <text:p text:style-name="P6">Data Integrity Team</text:p>
            </table:table-cell>
          </table:table-row>
          <table:table-row>
            <table:table-cell table:style-name="Table37.A1" office:value-type="string">
              <text:p text:style-name="P6">Per-type Coordinator</text:p>
            </table:table-cell>
            <table:table-cell table:style-name="Table37.A1" office:value-type="string">
              <text:p text:style-name="P6">Standard User + the relevant Coordinator role</text:p>
            </table:table-cell>
            <table:table-cell table:style-name="Table37.A1" office:value-type="string">
              <text:p text:style-name="P6">(the corresponding "Authorized" team optional, since Coordinator already grants superset access)</text:p>
            </table:table-cell>
          </table:table-row>
          <table:table-row>
            <table:table-cell table:style-name="Table37.A1" office:value-type="string">
              <text:p text:style-name="P6">Multi-role user (e.g. Mentor + Partner Manager)</text:p>
            </table:table-cell>
            <table:table-cell table:style-name="Table37.A1" office:value-type="string">
              <text:p text:style-name="P6">Standard User</text:p>
            </table:table-cell>
            <table:table-cell table:style-name="Table37.A1" office:value-type="string">
              <text:p text:style-name="P6">Both relevant teams</text:p>
            </table:table-cell>
          </table:table-row>
          <table:table-row>
            <table:table-cell table:style-name="Table37.A1" office:value-type="string">
              <text:p text:style-name="P6">Admin</text:p>
            </table:table-cell>
            <table:table-cell table:style-name="Table37.A1" office:value-type="string">
              <text:p text:style-name="P6">Admin</text:p>
            </table:table-cell>
            <table:table-cell table:style-name="Table37.A1" office:value-type="string">
              <text:p text:style-name="Table_20_Contents">(n/a — bypasses ACL)</text:p>
            </table:table-cell>
          </table:table-row>
        </table:table>
        <text:h text:style-name="P2" text:outline-level="3">Workflow Rules</text:h>
        <text:p text:style-name="P8">Three independent workflow rules, one per sensitive type. Each rule:</text:p>
        <text:list text:style-name="L63">
          <text:list-item>
            <text:p text:style-name="P125"><text:span text:style-name="Strong_20_Emphasis">Triggered on:</text:span> Company.assignedUser change (and on creation of a new SensitiveEntity-to-Company link)</text:p>
          </text:list-item>
          <text:list-item>
            <text:p text:style-name="P125"><text:span text:style-name="Strong_20_Emphasis">Action:</text:span> Look up the related SensitiveEntity (if exists). Add the current Company.assignedUser to the SensitiveEntity.assignedUsers field.</text:p>
          </text:list-item>
          <text:list-item>
            <text:p text:style-name="P126"><text:span text:style-name="Strong_20_Emphasis">Behavior:</text:span> Additive only — never removes a user. This is Option A: previous owners stay until a Coordinator (or the user themselves, within their team-scoped Assignment Permission) removes them manually.</text:p>
          </text:list-item>
        </text:list>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7">Workflow rule</text:p>
              </table:table-cell>
              <table:table-cell table:style-name="Table38.A1" office:value-type="string">
                <text:p text:style-name="P7">Triggered by</text:p>
              </table:table-cell>
              <table:table-cell table:style-name="Table38.A1" office:value-type="string">
                <text:p text:style-name="P7">Updates</text:p>
              </table:table-cell>
            </table:table-row>
          </table:table-header-rows>
          <table:table-row>
            <table:table-cell table:style-name="Table38.A1" office:value-type="string">
              <text:p text:style-name="P6">Sync Mentor to ClientProfile</text:p>
            </table:table-cell>
            <table:table-cell table:style-name="Table38.A1" office:value-type="string">
              <text:p text:style-name="P6">Company.assignedUser change</text:p>
            </table:table-cell>
            <table:table-cell table:style-name="Table38.A1" office:value-type="string">
              <text:p text:style-name="P6">ClientProfile.assignedUsers (add)</text:p>
            </table:table-cell>
          </table:table-row>
          <table:table-row>
            <table:table-cell table:style-name="Table38.A1" office:value-type="string">
              <text:p text:style-name="P6">Sync Sponsor Coordinator to SponsorProfile</text:p>
            </table:table-cell>
            <table:table-cell table:style-name="Table38.A1" office:value-type="string">
              <text:p text:style-name="P6">Company.assignedUser change</text:p>
            </table:table-cell>
            <table:table-cell table:style-name="Table38.A1" office:value-type="string">
              <text:p text:style-name="P6">SponsorProfile.assignedUsers (add)</text:p>
            </table:table-cell>
          </table:table-row>
          <table:table-row>
            <table:table-cell table:style-name="Table38.A1" office:value-type="string">
              <text:p text:style-name="P6">Sync Partner Manager to PartnerProfile</text:p>
            </table:table-cell>
            <table:table-cell table:style-name="Table38.A1" office:value-type="string">
              <text:p text:style-name="P6">Company.assignedUser change</text:p>
            </table:table-cell>
            <table:table-cell table:style-name="Table38.A1" office:value-type="string">
              <text:p text:style-name="Table_20_Contents">PartnerProfile.assignedUsers (add)</text:p>
            </table:table-cell>
          </table:table-row>
        </table:table>
        <text:h text:style-name="P2" text:outline-level="3"><text:soft-page-break/>Coordinator Stale-Access Dashlets</text:h>
        <text:p text:style-name="P8">Each Coordinator role has a corresponding list view / dashlet showing SensitiveEntity records where <text:span text:style-name="Source_20_Text">assignedUsers</text:span> contains a user who is no longer the related Company.assignedUser. Used for periodic manual cleanup of access lists.</text:p>
        <text:h text:style-name="P2" text:outline-level="3">Test Plan</text:h>
        <text:p text:style-name="P8">Test users (none with admin):</text:p>
        <text:list text:style-name="L64">
          <text:list-item>
            <text:p text:style-name="P127"><text:span text:style-name="Source_20_Text">test_standard</text:span> — Standard User only.</text:p>
          </text:list-item>
          <text:list-item>
            <text:p text:style-name="P127"><text:span text:style-name="Source_20_Text">test_mentor</text:span> — Standard User + Mentors team. Set as Company.assignedUser on at least one Company that has a ClientProfile, and not on a different one that also has a ClientProfile.</text:p>
          </text:list-item>
          <text:list-item>
            <text:p text:style-name="P127"><text:span text:style-name="Source_20_Text">test_dual_mentor_partner</text:span> — Standard User + Mentors team + Partner Managers team.</text:p>
          </text:list-item>
          <text:list-item>
            <text:p text:style-name="P127"><text:span text:style-name="Source_20_Text">test_client_coord</text:span> — Standard User + Client Sensitive Coordinator role.</text:p>
          </text:list-item>
          <text:list-item>
            <text:p text:style-name="P128"><text:span text:style-name="Source_20_Text">test_data_integrity</text:span> — Standard User + Data Integrity Team.</text:p>
          </text:list-item>
        </text:list>
        <text:p text:style-name="P8">For each, log in via incognito window and verify:</text:p>
        <text:list text:style-name="L65">
          <text:list-item>
            <text:p text:style-name="P129">The correct sensitive panels appear (or don't) on Company detail views.</text:p>
          </text:list-item>
          <text:list-item>
            <text:p text:style-name="P129">The correct records appear in those panels.</text:p>
          </text:list-item>
          <text:list-item>
            <text:p text:style-name="P129">Editing of data fields is permitted where expected.</text:p>
          </text:list-item>
          <text:list-item>
            <text:p text:style-name="P129"><text:span text:style-name="Source_20_Text">assignedUsers</text:span> editability matches the role's Assignment Permission.</text:p>
          </text:list-item>
          <text:list-item>
            <text:p text:style-name="P130">Stale-access dashlets show appropriate records for Coordinator users.</text:p>
          </text:list-item>
        </text:list>
        <text:p text:style-name="Horizontal_20_Line"/>
        <text:h text:style-name="P2" text:outline-level="3">Status</text:h>
        <text:p text:style-name="P8">The security model is fully specified. Nothing is left ambiguous.</text:p>
        <text:p text:style-name="P8"><text:span text:style-name="Strong_20_Emphasis">Possible next steps, in priority order:</text:span></text:p>
        <text:list text:style-name="L66">
          <text:list-item>
            <text:p text:style-name="P131"><text:span text:style-name="Strong_20_Emphasis">Capture in the CBM How-To Guide</text:span> as a complete "Security Architecture" section with three sub-sections (Standard Roles, Sensitive Sub-Entity Pattern, Workflow Rules) and the test plan as an appendix.</text:p>
          </text:list-item>
          <text:list-item>
            <text:p text:style-name="P131"><text:span text:style-name="Strong_20_Emphasis">Draft the YAML representation</text:span> for CRM Builder — this entire spec is concrete enough to encode declaratively.</text:p>
          </text:list-item>
          <text:list-item>
            <text:p text:style-name="P132"><text:span text:style-name="Strong_20_Emphasis">Build the test environment</text:span> in EspoCRM and run the test plan to verify behavior matches the spec.</text:p>
          </text:list-item>
        </text:list>
        <text:p text:style-name="P8">You pulled the brakes on #1 earlier, so I'm holding. Tell me which (if any) you want to proceed with.</text:p>
        <text:p text:style-name="P8">I would like to capture the detailed explanation of espo security in the ESPO How To Guide. But then we need a section on the CBM specific implementation of security. That way a new user can learn what we learned together here today. Does the YAML representation support security setup?</text:p>
        <text:p text:style-name="P9">12:32 AM</text:p>
        <text:p text:style-name="P9"><text:soft-page-break/>Architected two-section How-To structure and identified repository verification needs</text:p>
        <text:p text:style-name="P8">Architected two-section How-To structure and identified repository verification needs</text:p>
        <text:p text:style-name="P8">Good plan — two sections with two distinct audiences and purposes. Section A teaches the conceptual model so any reader can understand EspoCRM security; Section B shows how CBM specifically applies it. A new admin landing on the How-To learns the framework first, then sees the implementation.</text:p>
        <text:h text:style-name="P2" text:outline-level="3">Proposed structure</text:h>
        <text:p text:style-name="P8"><text:span text:style-name="Strong_20_Emphasis">Section A — EspoCRM Security: How It Works</text:span></text:p>
        <text:p text:style-name="P8">Generic content, transferable to any EspoCRM deployment. Reads as a primer for someone new to the system.</text:p>
        <text:list text:style-name="L67">
          <text:list-item>
            <text:p text:style-name="P133">The access control question and the Admin bypass</text:p>
          </text:list-item>
          <text:list-item>
            <text:p text:style-name="P133">The three building blocks: Users, Teams, Roles</text:p>
          </text:list-item>
          <text:list-item>
            <text:p text:style-name="P133">The action × level matrix (Create / Read / Edit / Delete / Stream × All / Team / Own / No)</text:p>
          </text:list-item>
          <text:list-item>
            <text:p text:style-name="P133">Field Level Security — what it can and can't do (role-based, never per-record)</text:p>
          </text:list-item>
          <text:list-item>
            <text:p text:style-name="P133">Assignment Permission — the often-overlooked third axis</text:p>
          </text:list-item>
          <text:list-item>
            <text:p text:style-name="P133">Multiple Assigned Users vs Collaborators — when each fits</text:p>
          </text:list-item>
          <text:list-item>
            <text:p text:style-name="P133">Role merging — the additive, most-permissive-wins rule</text:p>
          </text:list-item>
          <text:list-item>
            <text:p text:style-name="P133">Roles via team attachment vs direct user assignment</text:p>
          </text:list-item>
          <text:list-item>
            <text:p text:style-name="P133">Hiding relationship panels via field-level access on link fields</text:p>
          </text:list-item>
          <text:list-item>
            <text:p text:style-name="P134">The Sensitive Sub-Entity Pattern — pulling it all together as a reusable design pattern</text:p>
          </text:list-item>
        </text:list>
        <text:p text:style-name="P8"><text:span text:style-name="Strong_20_Emphasis">Section B — CBM Security Implementation</text:span></text:p>
        <text:p text:style-name="P8">CBM-specific. Reads as the applied form of Section A's concepts. References back to Section A throughout.</text:p>
        <text:list text:style-name="L68">
          <text:list-item>
            <text:p text:style-name="P135">Architecture summary</text:p>
          </text:list-item>
          <text:list-item>
            <text:p text:style-name="P135">Entities and relationships (Company, ClientProfile, SponsorProfile, PartnerProfile)</text:p>
          </text:list-item>
          <text:list-item>
            <text:p text:style-name="P135">Teams (Mentors, Sponsor Coordinators, Partner Managers, Data Integrity Team)</text:p>
          </text:list-item>
          <text:list-item>
            <text:p text:style-name="P135">Roles — all eight, with full configuration tables</text:p>
          </text:list-item>
          <text:list-item>
            <text:p text:style-name="P135">User assignment patterns</text:p>
          </text:list-item>
          <text:list-item>
            <text:p text:style-name="P135">Workflow rules</text:p>
          </text:list-item>
          <text:list-item>
            <text:p text:style-name="P135">Coordinator stale-access dashlets</text:p>
          </text:list-item>
          <text:list-item>
            <text:p text:style-name="P136">Test plan</text:p>
          </text:list-item>
        </text:list>
        <text:p text:style-name="P8">Please upload <text:span text:style-name="Source_20_Text">CBM-EspoCRM-HowTo.docx</text:span> and I'll do a surgical insert: add both sections in the right place in the existing structure, add a change-log entry, and update the "Last Updated" timestamp. I'll show you the proposed text before I regenerate the .docx so you can review before commit.</text:p>
        <text:h text:style-name="P2" text:outline-level="3">On the YAML question</text:h>
        <text:p text:style-name="P8">Honestly: I don't know off the top of my head whether the CRM Builder YAML schema currently supports security configuration (roles, teams, field-level permissions, Assignment Permission, <text:soft-page-break/>workflow rules). It's plausible, but I'd need to inspect the repository to give you an accurate answer — specifically the YAML schema definition, any security-related PRDs, and any sample YAML files that include security blocks.</text:p>
        <text:p text:style-name="P8">Per your standing instructions, before I do any repo work I should confirm: <text:span text:style-name="Strong_20_Emphasis">which CLAUDE.md should I read for the YAML investigation — the one in </text:span><text:span text:style-name="Strong_20_Emphasis"><text:span text:style-name="Source_20_Text">crmbuilder</text:span></text:span><text:span text:style-name="Strong_20_Emphasis">, or do you want to defer the YAML question until after the How-To work is done?</text:span></text:p>
        <text:h text:style-name="Heading_20_2" text:outline-level="2">Yes. Defer the YAML Question until next action. It deserves a focused discussion.</text:h>
        <text:p text:style-name="P9">12:35 AM</text:p>
      </text:section>
      <text:p text:style-name="P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color="#c9211e" loext:opacity="100%" style:font-name="FreeSans1" fo:font-family="FreeSans" style:font-family-generic="swiss" style:font-pitch="variable" fo:font-size="14pt" fo:font-style="italic" fo:font-weight="bold" style:font-name-asian="Noto Serif CJK SC" style:font-family-asian="'Noto Serif CJK SC'" style:font-family-generic-asian="system" style:font-pitch-asian="variable" style:font-size-asian="14pt" style:font-style-asian="italic" style:font-weight-asian="bold" style:font-name-complex="FreeSans2" style:font-family-complex="FreeSans" style:font-family-generic-complex="system" style:font-pitch-complex="variable" style:font-size-complex="14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0T00:36:06.526940819</meta:creation-date>
    <dc:date>2026-05-20T01:27:47.640182123</dc:date>
    <meta:editing-duration>PT41M7S</meta:editing-duration>
    <meta:editing-cycles>1</meta:editing-cycles>
    <meta:document-statistic meta:table-count="38" meta:image-count="0" meta:object-count="0" meta:page-count="40" meta:paragraph-count="1204" meta:word-count="12534" meta:character-count="79621" meta:non-whitespace-character-count="68256"/>
    <meta:generator>LibreOffice/24.2.7.2$Linux_X86_64 LibreOffice_project/420$Build-2</meta:generator>
  </office:meta>
</office:document-meta>
</file>